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T Astra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PT Astra Serif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PT Astra Serif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PT Astra Serif" fo:font-size="14pt" style:font-name-asian="Times New Roman" style:font-size-asian="14pt" style:font-name-complex="Times New Roman" style:font-size-complex="14pt" style:language-complex="ar" style:country-complex="SA"/>
    </style:style>
    <style:style style:name="P8" style:family="paragraph" style:parent-style-name="Standard">
      <style:paragraph-properties fo:margin-left="1.129cm" fo:margin-right="0cm" fo:text-align="start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9" style:family="paragraph" style:parent-style-name="Standard">
      <style:paragraph-properties fo:margin-left="1.199cm" fo:margin-right="0cm" fo:text-align="justify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2">
      <style:paragraph-properties fo:margin-left="1.129cm" fo:margin-right="0cm" fo:text-align="start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5" style:family="paragraph" style:parent-style-name="Standard" style:list-style-name="L2">
      <style:paragraph-properties fo:margin-left="1.129cm" fo:margin-right="0cm" fo:text-align="start" style:justify-single-word="false" fo:text-indent="-1.199cm" style:auto-text-indent="false" style:snap-to-layout-grid="false">
        <style:tab-stops/>
      </style:paragraph-properties>
      <style:text-properties style:font-name="PT Astra Serif" fo:font-size="14pt" style:font-size-asian="14pt" style:font-size-complex="14pt"/>
    </style:style>
    <style:style style:name="P16" style:family="paragraph" style:parent-style-name="Standard" style:list-style-name="L3">
      <style:paragraph-properties fo:margin-left="-0.03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17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8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9" style:family="paragraph" style:parent-style-name="Standard" style:list-style-name="L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style:font-name-asian="Times New Roman" style:font-name-complex="Times New Roman" style:language-complex="ar" style:country-complex="SA"/>
    </style:style>
    <style:style style:name="T5" style:family="text">
      <style:text-properties style:font-name="PT Astra Serif"/>
    </style:style>
    <style:style style:name="T6" style:family="text">
      <style:text-properties style:font-name="PT Astra Serif" fo:font-weight="bold" style:font-weight-asian="bold" style:font-weight-complex="bold"/>
    </style:style>
    <style:style style:name="T7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439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0.878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318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1.757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2.196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2.635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3.074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3.514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3.953cm" text:min-label-width="0.635cm"/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4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Протокол № 8</text:p>
      <text:p text:style-name="P2">рабочего совещания отделения социального обслуживания на <text:s text:c="2"/></text:p>
      <text:p text:style-name="P2"><text:s text:c="3"/>от <text:span text:style-name="T7">27</text:span>.08.<text:span text:style-name="T7">25</text:span></text:p>
      <text:p text:style-name="P2"/>
      <text:p text:style-name="P3"><text:s text:c="3"/><text:span text:style-name="T3">Присутствовали:</text:span></text:p>
      <text:list xml:id="list6103711511231407816" text:style-name="L1">
        <text:list-item>
          <text:p text:style-name="P10">Евстратова Г.А.</text:p>
        </text:list-item>
        <text:list-item>
          <text:p text:style-name="P11">Бойкова К.Ю.</text:p>
        </text:list-item>
        <text:list-item>
          <text:p text:style-name="P10">Рудник Т.С. </text:p>
        </text:list-item>
        <text:list-item>
          <text:p text:style-name="P10">Делиу Г.С. </text:p>
        </text:list-item>
        <text:list-item>
          <text:p text:style-name="P10">Булычева И.А.</text:p>
        </text:list-item>
        <text:list-item>
          <text:p text:style-name="P10">Кошелева С.А.</text:p>
        </text:list-item>
        <text:list-item>
          <text:p text:style-name="P10">Коньшина Т.С</text:p>
        </text:list-item>
        <text:list-item>
          <text:p text:style-name="P10">Обыденнова С.А.</text:p>
        </text:list-item>
        <text:list-item>
          <text:p text:style-name="P10">Беспалова Л.И.</text:p>
        </text:list-item>
        <text:list-item>
          <text:p text:style-name="P10">Чепенко Ю.С.</text:p>
        </text:list-item>
        <text:list-item>
          <text:p text:style-name="P10">Мнацаканянц И.В.</text:p>
        </text:list-item>
        <text:list-item>
          <text:p text:style-name="P10">Калинкина Л.М.</text:p>
        </text:list-item>
        <text:list-item>
          <text:p text:style-name="P10">Барябина О.А.</text:p>
        </text:list-item>
        <text:list-item>
          <text:p text:style-name="P12">Чипига Е.В.</text:p>
        </text:list-item>
        <text:list-item>
          <text:p text:style-name="P12">Смарунь Т.В</text:p>
        </text:list-item>
      </text:list>
      <text:p text:style-name="P6"/>
      <text:p text:style-name="P2">Повестка дня</text:p>
      <text:list xml:id="list6946895715123696622" text:style-name="L2">
        <text:list-item>
          <text:list>
            <text:list-item>
              <text:list>
                <text:list-item>
                  <text:p text:style-name="P15">Подведение итогов работы по набору численности.</text:p>
                </text:list-item>
                <text:list-item>
                  <text:p text:style-name="P14">Отчет социального работника Евстратовой Г.А.</text:p>
                </text:list-item>
              </text:list>
            </text:list-item>
          </text:list>
        </text:list-item>
      </text:list>
      <text:p text:style-name="P8"><text:s text:c="15"/>3. Разное. <text:s text:c="9"/></text:p>
      <text:list xml:id="list2849300965104857595" text:style-name="L3">
        <text:list-header>
          <text:p text:style-name="P16">1. <text:s text:c="3"/>По первому вопросу заслушали информацию зав. отделением <text:s text:c="2"/>Шершневой Т.И.</text:p>
        </text:list-header>
      </text:list>
      <text:p text:style-name="P4"><text:s text:c="10"/><text:span text:style-name="T3">Решение: принять информацию к сведению.</text:span></text:p>
      <text:p text:style-name="P4"><text:span text:style-name="T3"><text:s text:c="11"/>2.По второму вопросу заслушали <text:s/></text:span><text:span text:style-name="T4">соц. работника Евстратову Г.А.</text:span></text:p>
      <text:p text:style-name="P7">Решение: признать работу соц. работника Евстратовой Г.А. - удовлетворительной</text:p>
      <text:p text:style-name="P5">Разное:</text:p>
      <text:p text:style-name="P4">2. Решение: работу социального работника признать <text:s text:c="5"/>удовлетворительной.</text:p>
      <text:p text:style-name="P9"><text:s text:c="10"/>3. Разное:</text:p>
      <text:list xml:id="list2968553443175485383" text:style-name="L4">
        <text:list-header>
          <text:p text:style-name="P17"><text:span text:style-name="T1">-</text:span> <text:s/>работа с актами сдачи-приёмки оказанных потребителями услуг, соц. работниками; </text:p>
        </text:list-header>
      </text:list>
      <text:list xml:id="list8020531761456600467" text:style-name="L5">
        <text:list-header>
          <text:p text:style-name="P18"><text:span text:style-name="T1">- </text:span>прохождение флюорографического обследования в соответствии с графиком (один раз в год); </text:p>
          <text:p text:style-name="P18"><text:span text:style-name="T2">-</text:span> <text:s text:c="3"/>Работа с маршрутными листами,</text:p>
        </text:list-header>
      </text:list>
      <text:list xml:id="list3945837231730676119" text:style-name="L6">
        <text:list-item>
          <text:list>
            <text:list-item>
              <text:list>
                <text:list-item>
                  <text:list>
                    <text:list-item>
                      <text:p text:style-name="P19">Работа с личными делами.</text:p>
                      <text:p text:style-name="P19"/>
                      <text:p text:style-name="P19"><text:s text:c="51"/></text:p>
                    </text:list-item>
                  </text:list>
                </text:list-item>
              </text:list>
            </text:list-item>
          </text:list>
        </text:list-item>
      </text:list>
      <text:list xml:id="list4304568994923185417" text:style-name="L7">
        <text:list-header>
          <text:p text:style-name="P13"><text:span text:style-name="T5"><text:s text:c="14"/></text:span><text:span text:style-name="T6"><text:s text:c="4"/>зав. Отделением № 9 <text:s text:c="19"/>Т.И. Шершнева <text:s text:c="18"/></text:span><text:span text:style-name="T5"><text:s text:c="9"/></text:span><text:s text:c="5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12cm" fo:margin-bottom="0.462cm" fo:margin-left="1.11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8-01-30T11:40:35</meta:creation-date>
    <dc:date>2025-07-29T15:15:31.67</dc:date>
    <meta:print-date>2020-09-22T12:10:39.04</meta:print-date>
    <dc:language>ru-RU</dc:language>
    <meta:editing-cycles>97</meta:editing-cycles>
    <meta:editing-duration>PT23H59M26S</meta:editing-duration>
    <meta:document-statistic meta:table-count="0" meta:image-count="0" meta:object-count="0" meta:page-count="1" meta:paragraph-count="36" meta:word-count="155" meta:character-count="1289"/>
    <meta:user-defined meta:name="Info 1"/>
    <meta:user-defined meta:name="Info 2"/>
    <meta:user-defined meta:name="Info 3"/>
    <meta:user-defined meta:name="Info 4"/>
  </office:meta>
</office:document-meta>
</file>
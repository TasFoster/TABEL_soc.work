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PT Astra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1.129cm" fo:margin-right="0cm" fo:text-align="start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6" style:family="paragraph" style:parent-style-name="Standard">
      <style:paragraph-properties fo:margin-left="1.199cm" fo:margin-right="0cm" fo:text-align="justify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0" style:family="paragraph" style:parent-style-name="Standard" style:list-style-name="L2">
      <style:paragraph-properties fo:margin-left="1.129cm" fo:margin-right="0cm" fo:text-align="start" style:justify-single-word="false" fo:text-indent="-1.199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1" style:family="paragraph" style:parent-style-name="Standard" style:list-style-name="L3">
      <style:paragraph-properties fo:margin-left="-0.03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12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3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4" style:family="paragraph" style:parent-style-name="Standard" style:list-style-name="L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5" style:family="paragraph" style:parent-style-name="Standard" style:list-style-name="L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6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PT Astra Serif" fo:font-size="14pt" style:font-name-asian="Times New Roman" style:font-size-asian="14pt" style:font-name-complex="Times New Roman" style:font-size-complex="14pt" style:language-complex="ar" style:country-complex="SA"/>
    </style:style>
    <style:style style:name="P17" style:family="paragraph" style:parent-style-name="Standard" style:list-style-name="L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font-name="PT Astra Serif"/>
    </style:style>
    <style:style style:name="T5" style:family="text">
      <style:text-properties style:font-name-asian="Times New Roman" style:font-name-complex="Times New Roman" style:language-complex="ar" style:country-complex="SA"/>
    </style:style>
    <style:style style:name="T6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439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87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318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757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196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63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074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514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3.95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Протокол № 7</text:p>
      <text:p text:style-name="P2">рабочего совещания отделения социального обслуживания на дому № 9</text:p>
      <text:p text:style-name="P2"><text:s text:c="90"/>от <text:span text:style-name="T6">30</text:span>.07.2<text:span text:style-name="T6">5</text:span></text:p>
      <text:p text:style-name="P4">Присутствовали:</text:p>
      <text:list xml:id="list3055605493653966936" text:style-name="L1">
        <text:list-item>
          <text:p text:style-name="P7">Евстратова Г.А.</text:p>
        </text:list-item>
        <text:list-item>
          <text:p text:style-name="P8">Бойкова К.Ю.</text:p>
        </text:list-item>
        <text:list-item>
          <text:p text:style-name="P7">Рудник Т.С. </text:p>
        </text:list-item>
        <text:list-item>
          <text:p text:style-name="P7">Делиу Г.С. </text:p>
        </text:list-item>
        <text:list-item>
          <text:p text:style-name="P7">Булычева И.А.</text:p>
        </text:list-item>
        <text:list-item>
          <text:p text:style-name="P7">Кошелева С.А.</text:p>
        </text:list-item>
        <text:list-item>
          <text:p text:style-name="P7">Коньшина Т.С</text:p>
        </text:list-item>
        <text:list-item>
          <text:p text:style-name="P7">Обыденнова С.А.</text:p>
        </text:list-item>
        <text:list-item>
          <text:p text:style-name="P7">Беспалова Л.И.</text:p>
        </text:list-item>
        <text:list-item>
          <text:p text:style-name="P7">Чепенко Ю.С.</text:p>
        </text:list-item>
        <text:list-item>
          <text:p text:style-name="P7">Мнацаканянц И.В.</text:p>
        </text:list-item>
        <text:list-item>
          <text:p text:style-name="P7">Калинкина Л.М.</text:p>
        </text:list-item>
        <text:list-item>
          <text:p text:style-name="P7">Барябина О.А.</text:p>
        </text:list-item>
        <text:list-item>
          <text:p text:style-name="P9">Чипига Е.В.</text:p>
        </text:list-item>
        <text:list-item>
          <text:p text:style-name="P9">Смарунь Т.В</text:p>
          <text:p text:style-name="P7"><text:s text:c="73"/></text:p>
        </text:list-item>
      </text:list>
      <text:p text:style-name="P2">Повестка дня</text:p>
      <text:list xml:id="list8241961902011373502" text:style-name="L2">
        <text:list-item>
          <text:list>
            <text:list-item>
              <text:list>
                <text:list-item>
                  <text:p text:style-name="P10">Контроль за качеством выполнения социальных услуг</text:p>
                </text:list-item>
                <text:list-item>
                  <text:p text:style-name="P10">Отчет социального работника Калинкиной Л. М. <text:s text:c="9"/></text:p>
                </text:list-item>
              </text:list>
            </text:list-item>
          </text:list>
        </text:list-item>
      </text:list>
      <text:p text:style-name="P5"><text:s text:c="15"/>3. Разное. <text:s text:c="9"/></text:p>
      <text:list xml:id="list7445755270922896187" text:style-name="L3">
        <text:list-header>
          <text:p text:style-name="P11"><text:s/>1. По первому вопросу заслушали информацию зав. отделением Шершневу Т. И.</text:p>
        </text:list-header>
      </text:list>
      <text:p text:style-name="P3"><text:s text:c="12"/>Решение: работу отделения <text:s/>признать <text:s text:c="3"/>удовлетворительной.</text:p>
      <text:list xml:id="list453331837866871798" text:style-name="L4">
        <text:list-header>
          <text:p text:style-name="P12">2.<text:span text:style-name="T3">По второму вопросу заслушали <text:s/></text:span><text:span text:style-name="T5">соц. работника Калинкину Л. М. <text:s/></text:span></text:p>
          <text:p text:style-name="P16">Решение: признать работу соц. работника Калинкиной Л. М.- удовлетворительной</text:p>
        </text:list-header>
      </text:list>
      <text:p text:style-name="P6"><text:s text:c="9"/>3.Разное:</text:p>
      <text:list xml:id="list7430816882200110506" text:style-name="L5">
        <text:list-header>
          <text:p text:style-name="P13"><text:span text:style-name="T1">-</text:span> работа с актами сдачи-приёмки оказанных потребителями услуг, соц. работниками; </text:p>
        </text:list-header>
      </text:list>
      <text:list xml:id="list5260814471464669182" text:style-name="L6">
        <text:list-header>
          <text:p text:style-name="P14"><text:span text:style-name="T1">- </text:span>прохождение флюорографического обследования в соответствии с графиком (один раз в год); </text:p>
          <text:p text:style-name="P14"><text:span text:style-name="T2">-</text:span> <text:s text:c="3"/>Работа с маршрутными листами,</text:p>
        </text:list-header>
      </text:list>
      <text:list xml:id="list6528274264788937041" text:style-name="L7">
        <text:list-item>
          <text:list>
            <text:list-item>
              <text:list>
                <text:list-item>
                  <text:list>
                    <text:list-item>
                      <text:p text:style-name="P15">Работа с личными делами.</text:p>
                      <text:p text:style-name="P15"/>
                      <text:p text:style-name="P17"><text:span text:style-name="T4"><text:s text:c="8"/>зав. Отделением № 9 <text:s text:c="17"/>Т. И.Шершнева</text:span> <text:s text:c="86"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12cm" fo:margin-bottom="0.462cm" fo:margin-left="1.11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8-01-30T11:40:35</meta:creation-date>
    <dc:date>2025-07-29T15:14:08.15</dc:date>
    <meta:print-date>2020-09-22T11:53:03.50</meta:print-date>
    <dc:language>ru-RU</dc:language>
    <meta:editing-cycles>95</meta:editing-cycles>
    <meta:editing-duration>PT23H15M29S</meta:editing-duration>
    <meta:document-statistic meta:table-count="0" meta:image-count="0" meta:object-count="0" meta:page-count="1" meta:paragraph-count="34" meta:word-count="152" meta:character-count="1328"/>
    <meta:user-defined meta:name="Info 1"/>
    <meta:user-defined meta:name="Info 2"/>
    <meta:user-defined meta:name="Info 3"/>
    <meta:user-defined meta:name="Info 4"/>
  </office:meta>
</office:document-meta>
</file>
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fo:language="en" fo:country="US" style:font-size-asian="14pt" style:font-name-complex="Times New Roman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list-style-name="L2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 style:list-style-name="L2">
      <style:paragraph-properties style:snap-to-layout-grid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Standard" style:list-style-name="WW8Num1">
      <style:paragraph-properties fo:margin-left="1.953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style:font-name-asian="Times New Roman" style:font-name-complex="Times New Roman" style:language-complex="ar" style:country-complex="SA"/>
    </style:style>
    <style:style style:name="T5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отокол № 6</text:p>
      <text:p text:style-name="P1"><text:span text:style-name="T1">рабочего совещания отделения социального обслуживания на дому № 5 от 25</text:span><text:span text:style-name="T2">.06</text:span><text:span text:style-name="T1">.2025</text:span></text:p>
      <text:p text:style-name="P2"/>
      <text:p text:style-name="P5"/>
      <text:p text:style-name="P5">Присутствовали:</text:p>
      <text:list xml:id="list1272550145415755064" text:style-name="L1">
        <text:list-item>
          <text:p text:style-name="P12">Клеина Е.В.</text:p>
        </text:list-item>
        <text:list-item>
          <text:p text:style-name="P12">Ерастова М.Ю.</text:p>
        </text:list-item>
        <text:list-item>
          <text:p text:style-name="P12">Чурикова О.Ю.</text:p>
        </text:list-item>
        <text:list-item>
          <text:p text:style-name="P12">Кузнецова Н.В.</text:p>
        </text:list-item>
        <text:list-item>
          <text:p text:style-name="P12">Преображенская И.В.</text:p>
        </text:list-item>
        <text:list-item>
          <text:p text:style-name="P12">Серебрякова Е.Е.</text:p>
        </text:list-item>
        <text:list-item>
          <text:p text:style-name="P12">Иванова Е.Г.</text:p>
        </text:list-item>
        <text:list-item>
          <text:p text:style-name="P12">Былинкина О.В.</text:p>
        </text:list-item>
        <text:list-item>
          <text:p text:style-name="P12">Морозова М.А.</text:p>
        </text:list-item>
        <text:list-item>
          <text:p text:style-name="P12">Доронина Ю.Г.</text:p>
        </text:list-item>
        <text:list-item>
          <text:p text:style-name="P12">Хабарова В.В.</text:p>
        </text:list-item>
        <text:list-item>
          <text:p text:style-name="P12">Березуцкая О.С.</text:p>
          <text:p text:style-name="P16"/>
        </text:list-item>
      </text:list>
      <text:p text:style-name="P5">Отсутствующие: Козлова Е.А. , Лапина К.И. <text:s text:c="4"/>отпуск.</text:p>
      <text:p text:style-name="P8">Повестка дня:</text:p>
      <text:p text:style-name="P4"/>
      <text:p text:style-name="P10"><text:s text:c="5"/>1.Итоги работы отделения за 1-<text:span text:style-name="T5">е полугодие</text:span> <text:s/>2025года.</text:p>
      <text:list xml:id="list8478933981907922606" text:style-name="L2">
        <text:list-item>
          <text:p text:style-name="P13">Отчет социального работника Серебряковой Е.Е.</text:p>
        </text:list-item>
        <text:list-item>
          <text:p text:style-name="P15"><text:s/>Разное.</text:p>
        </text:list-item>
      </text:list>
      <text:p text:style-name="P4">По первому вопросу <text:s/>заслушали зав. отд. Мишакову И.Г . она ознакомила с итогами работы за 1-е полугодие 2025 г.</text:p>
      <text:p text:style-name="P6">Решение: принять информацию к сведению.</text:p>
      <text:p text:style-name="P3"><text:span text:style-name="T3">По второму вопросу заслушали <text:s/></text:span><text:span text:style-name="T4">соц. работника <text:s text:c="2"/>Серебрякову Е.Е</text:span></text:p>
      <text:p text:style-name="P9">Решение: признать работу соц. работника Серебряковой Е.Е — удовлетворительной</text:p>
      <text:p text:style-name="P6">Разное:</text:p>
      <text:list xml:id="list5012063750608101179" text:style-name="L3">
        <text:list-item>
          <text:list>
            <text:list-item>
              <text:p text:style-name="P17"><text:span text:style-name="T3">Работа с маршрутными листами.</text:span> </text:p>
            </text:list-item>
            <text:list-item>
              <text:p text:style-name="P14">работа с актами сдачи-приёмки оказанных потребителям услуг, соц. работниками; </text:p>
            </text:list-item>
            <text:list-item>
              <text:p text:style-name="P14">прохождение флюорографического обследования в соответствии с графиком (один раз в год); </text:p>
            </text:list-item>
            <text:list-item>
              <text:p text:style-name="P14">Работа с маршрутными листами.</text:p>
            </text:list-item>
          </text:list>
        </text:list-item>
      </text:list>
      <text:list xml:id="list499688132307068616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8">Работа с личными делами.</text:p>
                    </text:list-item>
                    <text:list-item>
                      <text:p text:style-name="P18">Поздравление на дому юбиляров не находящихся на обслуживании центра от министерства социального развития.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7">Зав.отделением №5 <text:s text:c="34"/>И.Г. Мишаков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4T14:35:05.58</dc:date>
    <meta:print-date>2023-02-28T16:59:06.72</meta:print-date>
    <meta:editing-cycles>22</meta:editing-cycles>
    <meta:editing-duration>P1DT1H11M45S</meta:editing-duration>
    <meta:generator>OpenOffice/4.1.4$Win32 OpenOffice.org_project/414m5$Build-9788</meta:generator>
    <meta:document-statistic meta:table-count="0" meta:image-count="0" meta:object-count="0" meta:page-count="1" meta:paragraph-count="32" meta:word-count="172" meta:character-count="1200"/>
    <dc:creator>Татьяна Шершнева</dc:creator>
  </office:meta>
</office:document-meta>
</file>
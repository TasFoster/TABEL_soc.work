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ahoma2" svg:font-family="Tahoma"/>
    <style:font-face style:name="Arial Unicode MS" svg:font-family="'Arial Unicode MS'" style:font-pitch="variable"/>
    <style:font-face style:name="Tahoma" svg:font-family="Tahoma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T Astra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8" style:family="paragraph" style:parent-style-name="Standard" style:list-style-name="L2">
      <style:text-properties style:font-name="PT Astra Serif" fo:font-size="14pt" style:font-size-asian="14pt" style:font-size-complex="14pt"/>
    </style:style>
    <style:style style:name="P9" style:family="paragraph" style:parent-style-name="Standard" style:list-style-name="L3">
      <style:text-properties style:font-name="PT Astra Serif" fo:font-size="14pt" style:font-size-asian="14pt" style:font-size-complex="14pt"/>
    </style:style>
    <style:style style:name="P10" style:family="paragraph" style:parent-style-name="Standard" style:list-style-name="L4"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2" style:family="paragraph" style:parent-style-name="Standard" style:list-style-name="L5">
      <style:text-properties style:font-name="PT Astra Serif"/>
    </style:style>
    <style:style style:name="P13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4" style:family="paragraph" style:parent-style-name="Standard" style:list-style-name="L6">
      <style:paragraph-properties fo:margin-left="0.212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font-name="PT Astra Serif"/>
    </style:style>
    <style:style style:name="T3" style:family="text">
      <style:text-properties style:font-name="PT Astra Serif" fo:font-weight="bold" style:font-weight-asian="bold" style:font-weight-complex="bold"/>
    </style:style>
    <style:style style:name="T4" style:family="text">
      <style:text-properties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43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87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318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757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196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63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074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514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3.953cm" text:min-label-width="0.635cm"/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Протокол № 9 </text:p>
      <text:p text:style-name="P2">рабочего совещания отделения социального обслуживания на дому</text:p>
      <text:p text:style-name="P2"><text:s text:c="9"/>от <text:span text:style-name="T1">29</text:span>.09.202<text:span text:style-name="T1">5</text:span>.</text:p>
      <text:p text:style-name="P4"/>
      <text:p text:style-name="P4"><text:s text:c="5"/></text:p>
      <text:p text:style-name="P4"><text:s text:c="4"/><text:span text:style-name="T4">Присутствовали:</text:span></text:p>
      <text:list xml:id="list4164588751684169070" text:style-name="L1">
        <text:list-item>
          <text:p text:style-name="P6">Евстратова Г.А.</text:p>
        </text:list-item>
        <text:list-item>
          <text:p text:style-name="P7">Бойкова К.Ю.</text:p>
        </text:list-item>
        <text:list-item>
          <text:p text:style-name="P6">Рудник Т.С. </text:p>
        </text:list-item>
        <text:list-item>
          <text:p text:style-name="P6">Делиу Г.С. </text:p>
        </text:list-item>
        <text:list-item>
          <text:p text:style-name="P6">Булычева И.А.</text:p>
        </text:list-item>
        <text:list-item>
          <text:p text:style-name="P6">Кошелева С.А.</text:p>
        </text:list-item>
        <text:list-item>
          <text:p text:style-name="P6">Коньшина Т.С</text:p>
        </text:list-item>
        <text:list-item>
          <text:p text:style-name="P6">Обыденнова С.А.</text:p>
        </text:list-item>
        <text:list-item>
          <text:p text:style-name="P6">Беспалова Л.И.</text:p>
        </text:list-item>
        <text:list-item>
          <text:p text:style-name="P6">Чепенко Ю.С.</text:p>
        </text:list-item>
        <text:list-item>
          <text:p text:style-name="P6">Мнацаканянц И.В.</text:p>
        </text:list-item>
        <text:list-item>
          <text:p text:style-name="P6">Калинкина Л.М.</text:p>
        </text:list-item>
        <text:list-item>
          <text:p text:style-name="P6">Барябина О.А.</text:p>
        </text:list-item>
        <text:list-item>
          <text:p text:style-name="P11">Чипига Е.В.</text:p>
        </text:list-item>
        <text:list-item>
          <text:p text:style-name="P11">Смарунь Т.В</text:p>
        </text:list-item>
      </text:list>
      <text:p text:style-name="P5"/>
      <text:p text:style-name="P2">Повестка дня</text:p>
      <text:list xml:id="list2842876077077484063" text:style-name="L2">
        <text:list-item>
          <text:p text:style-name="P8"><text:s/>Итоги работы отделения за 3 квартал 2025 года.</text:p>
        </text:list-item>
        <text:list-item>
          <text:p text:style-name="P8"><text:s/>Отчет социального работника Рудник Т. С.</text:p>
        </text:list-item>
        <text:list-item>
          <text:p text:style-name="P8"><text:s text:c="2"/>Разное. <text:s text:c="7"/></text:p>
        </text:list-item>
      </text:list>
      <text:list xml:id="list2781537740378598934" text:style-name="L3">
        <text:list-item>
          <text:p text:style-name="P9"><text:s text:c="3"/>По первому вопросу заслушали <text:s text:c="3"/>заведующую отделением <text:s/>Шершневу Т.И.</text:p>
          <text:p text:style-name="P9"><text:s/>Решение: работу отделения <text:s/>признать <text:s text:c="3"/>удовлетворительной.</text:p>
        </text:list-item>
        <text:list-item>
          <text:p text:style-name="P9">По второму вопросу заслушали отчет соц. <text:s/>работника <text:s text:c="4"/>Рудник Т. С.</text:p>
          <text:p text:style-name="P9"><text:s text:c="2"/>Решение: работу социального работника <text:s/>признать <text:s text:c="3"/>удовлетворительной.</text:p>
        </text:list-item>
        <text:list-item>
          <text:p text:style-name="P9">Разное:</text:p>
        </text:list-item>
      </text:list>
      <text:list xml:id="list6823540196307025633" text:style-name="L4">
        <text:list-item>
          <text:p text:style-name="P10">работа с актами сдачи-приёмки оказанных потребителям услуг, соц. работниками; </text:p>
        </text:list-item>
        <text:list-item>
          <text:p text:style-name="P10">прохождение флюорографического обследования в соответствии с графиком (один раз в год); </text:p>
        </text:list-item>
        <text:list-item>
          <text:p text:style-name="P10">Работа с маршрутными листами.</text:p>
        </text:list-item>
        <text:list-item>
          <text:p text:style-name="P10">Работа с личными делами.</text:p>
        </text:list-item>
        <text:list-item>
          <text:p text:style-name="P10"><text:s/>Подворный обход соц. работниками участка .</text:p>
        </text:list-item>
        <text:list-item>
          <text:p text:style-name="P10">Поздравление на дому юбиляров не находящихся на обслуживании центра от министерства социального развития.</text:p>
        </text:list-item>
      </text:list>
      <text:p text:style-name="P3"/>
      <text:list xml:id="list4545790667722970185" text:style-name="L5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  <text:list xml:id="list5669305068027522891" text:style-name="L6">
        <text:list-header>
          <text:p text:style-name="P14"><text:span text:style-name="T2"><text:s text:c="8"/></text:span><text:span text:style-name="T3">зав. Отделением № 9 <text:s text:c="17"/>Т. И. Шершнева </text:span><text:span text:style-name="T2"><text:s text:c="32"/></text:span><text:s text:c="49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ahoma2" svg:font-family="Tahoma"/>
    <style:font-face style:name="Arial Unicode MS" svg:font-family="'Arial Unicode MS'" style:font-pitch="variable"/>
    <style:font-face style:name="Tahoma" svg:font-family="Tahoma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12cm" fo:margin-bottom="0.462cm" fo:margin-left="1.11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7-29T15:16:22.40</dc:date>
    <meta:print-date>2025-07-29T15:16:04.18</meta:print-date>
    <dc:language>ru-RU</dc:language>
    <meta:editing-cycles>100</meta:editing-cycles>
    <meta:editing-duration>P1DT8M4S</meta:editing-duration>
    <meta:document-statistic meta:table-count="0" meta:image-count="0" meta:object-count="0" meta:page-count="1" meta:paragraph-count="36" meta:word-count="171" meta:character-count="1270"/>
    <meta:user-defined meta:name="Info 1"/>
    <meta:user-defined meta:name="Info 2"/>
    <meta:user-defined meta:name="Info 3"/>
    <meta:user-defined meta:name="Info 4"/>
  </office:meta>
</office:document-meta>
</file>
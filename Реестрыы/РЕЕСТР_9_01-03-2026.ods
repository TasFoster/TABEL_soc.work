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T Astra Serif1" style:font-name-asian="PT Astra Serif1" style:font-name-complex="PT Astra Serif1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/>
    </style:style>
    <style:style style:name="ce4" style:family="table-cell" style:parent-style-name="Default" style:data-style-name="N0"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/>
    </style:style>
    <style:style style:name="ce6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/>
    </style:style>
    <style:style style:name="ce7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8" style:family="table-cell" style:parent-style-name="Default" style:data-style-name="N0"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" style:family="table-cell" style:parent-style-name="Default" style:data-style-name="N0"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style:font-family-generic="roman"/>
    </style:style>
    <style:style style:name="ce32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style:font-family-generic="roman"/>
    </style:style>
    <style:style style:name="ce33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35" style:family="table-cell" style:parent-style-name="Default" style:data-style-name="N36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top" fo:wrap-option="wrap"/>
      <style:text-properties style:font-name="PT Astra Serif" style:font-name-asian="PT Astra Serif" style:font-name-complex="PT Astra Serif" style:font-family-generic="roman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0" style:family="table-cell" style:parent-style-name="Excel_32_Built-in_32_Normal" style:data-style-name="N39">
      <style:table-cell-properties fo:border="thin solid #000000" style:vertical-align="top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1" style:family="table-cell" style:parent-style-name="Default" style:data-style-name="N2">
      <style:table-cell-properties fo:border="thin solid #000000" style:vertical-align="automatic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4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00CC33"/>
      <style:text-properties style:font-name="PT Astra Serif" style:font-name-asian="PT Astra Serif" style:font-name-complex="PT Astra Serif" style:font-family-generic="roman"/>
    </style:style>
    <style:style style:name="ce44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45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46" style:family="table-cell" style:parent-style-name="Default" style:data-style-name="N0">
      <style:table-cell-properties fo:background-color="transparent"/>
    </style:style>
    <style:style style:name="ce47" style:family="table-cell" style:parent-style-name="Default" style:data-style-name="N0">
      <style:table-cell-properties fo:border="thin solid #000000" style:vertical-align="automatic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48" style:family="table-cell" style:parent-style-name="Default" style:data-style-name="N2">
      <style:table-cell-properties fo:border="thin solid #000000" style:vertical-align="middle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49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0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51" style:family="table-cell" style:parent-style-name="Default" style:data-style-name="N2">
      <style:table-cell-properties fo:border="thin solid #000000" style:vertical-align="top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2" style:family="table-cell" style:parent-style-name="Default" style:data-style-name="N2">
      <style:table-cell-properties fo:border="thin solid #000000" style:vertical-align="automatic" fo:background-color="#33FF99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53" style:family="table-cell" style:parent-style-name="Default" style:data-style-name="N2">
      <style:table-cell-properties fo:border="thin solid #000000" style:vertical-align="automatic" fo:background-color="#33FF99"/>
      <style:text-properties style:font-name="PT Astra Serif" style:font-name-asian="PT Astra Serif" style:font-name-complex="PT Astra Serif" style:font-family-generic="roman"/>
    </style:style>
    <style:style style:name="ce54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style:font-family-generic="roman"/>
    </style:style>
    <style:style style:name="ce55" style:family="table-cell" style:parent-style-name="Default" style:data-style-name="N0"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7" style:family="table-cell" style:parent-style-name="Default" style:data-style-name="N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62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6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8pt" style:font-size-asian="8pt" style:font-size-complex="8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2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fo:background-color="transparent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86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="thin solid #000000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4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5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96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PT Astra Serif" style:font-name-asian="PT Astra Serif" style:font-name-complex="PT Astra Serif" fo:font-size="9pt" style:font-size-asian="9pt" style:font-size-complex="9pt" fo:font-weight="bold" style:font-weight-asian="bold" style:font-weight-complex="bold" style:font-family-generic="roman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Default" style:data-style-name="N2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01" style:family="table-cell" style:parent-style-name="Default" style:data-style-name="N0"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7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12" style:family="table-cell" style:parent-style-name="Default" style:data-style-name="N0">
      <style:table-cell-properties fo:border="thin solid #000000" style:vertical-align="automatic" fo:background-color="#00CC33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18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1" style:family="table-cell" style:parent-style-name="Default" style:data-style-name="N36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2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2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2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27" style:family="table-cell" style:parent-style-name="Default" style:data-style-name="N0">
      <style:table-cell-properties style:vertical-align="middle" fo:background-color="transparent"/>
      <style:text-properties style:font-name="PT Astra Serif" style:font-name-asian="PT Astra Serif" style:font-name-complex="PT Astra Serif" style:font-family-generic="roman"/>
    </style:style>
    <style:style style:name="ce12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415cm"/>
    </style:style>
    <style:style style:name="co7" style:family="table-column">
      <style:table-column-properties fo:break-before="auto" style:column-width="2.053166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7145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0.867833333333333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4.2545cm"/>
    </style:style>
    <style:style style:name="co14" style:family="table-column">
      <style:table-column-properties fo:break-before="auto" style:column-width="2.3495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1.67216666666667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8533333333333cm"/>
    </style:style>
    <style:style style:name="co19" style:family="table-column">
      <style:table-column-properties fo:break-before="auto" style:column-width="1.73566666666667cm"/>
    </style:style>
    <style:style style:name="co20" style:family="table-column">
      <style:table-column-properties fo:break-before="auto" style:column-width="2.26483333333333cm"/>
    </style:style>
    <style:style style:name="co21" style:family="table-column">
      <style:table-column-properties fo:break-before="auto" style:column-width="7.40833333333333cm"/>
    </style:style>
    <style:style style:name="co22" style:family="table-column">
      <style:table-column-properties fo:break-before="auto" style:column-width="3.25966666666667cm"/>
    </style:style>
    <style:style style:name="co23" style:family="table-column">
      <style:table-column-properties fo:break-before="auto" style:column-width="2.45533333333333cm"/>
    </style:style>
    <style:style style:name="co24" style:family="table-column">
      <style:table-column-properties fo:break-before="auto" style:column-width="3.429cm"/>
    </style:style>
    <style:style style:name="co25" style:family="table-column">
      <style:table-column-properties fo:break-before="auto" style:column-width="2.77283333333333cm"/>
    </style:style>
    <style:style style:name="co26" style:family="table-column">
      <style:table-column-properties fo:break-before="auto" style:column-width="6.24416666666667cm"/>
    </style:style>
    <style:style style:name="co27" style:family="table-column">
      <style:table-column-properties fo:break-before="auto" style:column-width="1.82033333333333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66.9pt" style:use-optimal-row-height="fals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44.7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5.6pt" style:use-optimal-row-height="true" fo:break-before="auto"/>
    </style:style>
    <style:style style:name="ro11" style:family="table-row">
      <style:table-row-properties style:row-height="12.6pt" style:use-optimal-row-height="false" fo:break-before="auto"/>
    </style:style>
    <style:style style:name="ro12" style:family="table-row">
      <style:table-row-properties style:row-height="20.25pt" style:use-optimal-row-height="false" fo:break-before="auto"/>
    </style:style>
    <style:style style:name="ro13" style:family="table-row">
      <style:table-row-properties style:row-height="14.8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50pt" style:use-optimal-row-height="false" fo:break-before="auto"/>
    </style:style>
    <style:style style:name="ro16" style:family="table-row">
      <style:table-row-properties style:row-height="30pt" style:use-optimal-row-height="false" fo:break-before="auto"/>
    </style:style>
    <style:style style:name="ro17" style:family="table-row">
      <style:table-row-properties style:row-height="22.35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64.35pt" style:use-optimal-row-height="false" fo:break-before="auto"/>
    </style:style>
    <style:style style:name="ro20" style:family="table-row">
      <style:table-row-properties style:row-height="36.9pt" style:use-optimal-row-height="false" fo:break-before="auto"/>
    </style:style>
    <style:style style:name="ro21" style:family="table-row">
      <style:table-row-properties style:row-height="54.45pt" style:use-optimal-row-height="false" fo:break-before="auto"/>
    </style:style>
    <style:style style:name="ro22" style:family="table-row">
      <style:table-row-properties style:row-height="62.7pt" style:use-optimal-row-height="false" fo:break-before="auto"/>
    </style:style>
    <style:style style:name="ro23" style:family="table-row">
      <style:table-row-properties style:row-height="51.75pt" style:use-optimal-row-height="false" fo:break-before="auto"/>
    </style:style>
    <style:style style:name="ro24" style:family="table-row">
      <style:table-row-properties style:row-height="51.45pt" style:use-optimal-row-height="false" fo:break-before="auto"/>
    </style:style>
    <style:style style:name="ro25" style:family="table-row">
      <style:table-row-properties style:row-height="19.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ro27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с_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0"/>
        <table:table-column table:style-name="co4" table:default-cell-style-name="ce19"/>
        <table:table-column table:style-name="co5" table:default-cell-style-name="ce22"/>
        <table:table-column table:style-name="co6" table:default-cell-style-name="ce22"/>
        <table:table-column table:style-name="co1" table:default-cell-style-name="ce23"/>
        <table:table-column table:style-name="co7" table:default-cell-style-name="ce24"/>
        <table:table-column table:style-name="co8" table:default-cell-style-name="ce25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style-name="ce2"/>
          <table:table-cell table:style-name="ce3"/>
          <table:table-cell table:number-columns-repeated="3" table:style-name="ce2"/>
          <table:table-cell table:style-name="ce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4">
            <text:p>МИНИСТЕРСТВО ТРУДА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4">
            <text:p>И СОЦИАЛЬНОЙ ЗАЩИТЫ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5">
            <text:p>ФИЛИАЛ ГОСУДАРСТВЕННОГО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5">
            <text:p>АВТОНОМНОГО УЧРЕЖДЕНИЯ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5">
            <text:p>САРАТОВСКОЙ ОБЛАСТИ</text:p>
          </table:table-cell>
          <table:covered-table-cell/>
          <table:table-cell table:style-name="ce6"/>
          <table:table-cell office:value-type="string" table:style-name="ce8">
            <text:p>Главному бухгалтеру</text:p>
          </table:table-cell>
          <table:table-cell table:number-columns-repeated="2" table:style-name="ce8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5">
            <text:p>«КОМПЛЕКСНЫЙ ЦЕНТР</text:p>
          </table:table-cell>
          <table:covered-table-cell/>
          <table:table-cell table:style-name="ce6"/>
          <table:table-cell office:value-type="string" table:style-name="ce8">
            <text:p>ГАУ СО КЦСОН г.Саратова</text:p>
          </table:table-cell>
          <table:table-cell table:style-name="ce8"/>
          <table:table-cell table:style-name="ce11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5">
            <text:p>СОЦИАЛЬНОГО ОБСЛУЖИВАНИЯ</text:p>
          </table:table-cell>
          <table:covered-table-cell/>
          <table:table-cell table:style-name="ce6"/>
          <table:table-cell office:value-type="string" table:style-name="ce12">
            <text:p>Г.А.Кулаевой</text:p>
          </table:table-cell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5">
            <text:p>НАСЕЛЕНИЯ Г. САРАТОВА»</text:p>
          </table:table-cell>
          <table:covered-table-cell/>
          <table:table-cell table:style-name="ce14"/>
          <table:table-cell table:style-name="ce12"/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5">
            <text:p>ПО ЗАВОДСКОМУ РАЙОНУ</text:p>
          </table:table-cell>
          <table:covered-table-cell/>
          <table:table-cell table:number-columns-repeated="3" table:style-name="ce14"/>
          <table:table-cell table:style-name="ce15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5">
            <text:p>(Филиал ГАУ СО «КЦСОН г. Саратова»</text:p>
          </table:table-cell>
          <table:covered-table-cell/>
          <table:table-cell table:number-columns-repeated="2" table:style-name="ce14"/>
          <table:table-cell table:number-columns-repeated="2" table:style-name="ce16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6">
            <text:p>по Заводскому району)</text:p>
          </table:table-cell>
          <table:covered-table-cell/>
          <table:table-cell table:style-name="ce17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2">
          <table:table-cell/>
          <table:table-cell office:value-type="string" table:number-columns-spanned="2" table:number-rows-spanned="1" table:style-name="ce67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covered-table-cell/>
          <table:table-cell table:style-name="ce18"/>
          <table:table-cell table:style-name="ce17"/>
          <table:table-cell table:number-columns-repeated="2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8">
            <text:p>_______________№ <text:s/>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69">
            <text:p>на №_______________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3">
          <table:table-cell/>
          <table:table-cell table:style-name="ce19"/>
          <table:table-cell table:style-name="ce20"/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/>
        </table:table-row>
        <table:table-row table:style-name="ro4">
          <table:table-cell/>
          <table:table-cell office:value-type="string" table:number-columns-spanned="6" table:number-rows-spanned="1" table:style-name="ce70">
            <text:p><text:s text:c="4"/>Предоставляем денежные средства в объеме 0 (ноль рублей 00 копеек) для оплаты в кассу учреждения государственных услуг, оказанных филиалом в марте 2026 г. в соответствии <text:s/>с заключенными <text:s/>договорами.</text:p>
          </table:table-cell>
          <table:covered-table-cell table:number-columns-repeated="5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26"/>
          <table:table-cell table:style-name="ce27"/>
          <table:table-cell office:value-type="string" table:style-name="ce28">
            <text:p>Отделение СОД №9</text:p>
          </table:table-cell>
          <table:table-cell table:style-name="ce29"/>
          <table:table-cell table:style-name="ce30"/>
          <table:table-cell table:style-name="ce29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1" table:number-rows-spanned="2" table:style-name="ce71">
            <text:p>№</text:p>
          </table:table-cell>
          <table:table-cell office:value-type="string" table:number-columns-spanned="1" table:number-rows-spanned="2" table:style-name="ce72">
            <text:p>ФИО <text:s/>обслуживаемого</text:p>
          </table:table-cell>
          <table:table-cell office:value-type="string" table:number-columns-spanned="1" table:number-rows-spanned="2" table:style-name="ce73">
            <text:p>Номер договора</text:p>
          </table:table-cell>
          <table:table-cell office:value-type="string" table:number-columns-spanned="1" table:number-rows-spanned="2" table:style-name="ce73">
            <text:p>Сумма оплаты по договору ( руб)</text:p>
          </table:table-cell>
          <table:table-cell office:value-type="string" table:number-columns-spanned="1" table:number-rows-spanned="2" table:style-name="ce73">
            <text:p>Сумма к оплате (руб)</text:p>
          </table:table-cell>
          <table:table-cell table:number-columns-spanned="1" table:number-rows-spanned="2" table:style-name="ce74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5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Барябина Ольга Анатол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Антонова Ксения Пет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Зубкова Людмила Никола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Илясова Наталия Никола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649.52" table:style-name="ce42">
            <text:p>2649,5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опотев Леонид Ивано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76.02" table:style-name="ce42">
            <text:p>276,0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Яшина Елена Юр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88.32" table:style-name="ce42">
            <text:p>88,3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3058.02" table:style-name="ce49">
            <text:p>3058,02</text:p>
          </table:table-cell>
          <table:table-cell office:value-type="float" office:value="3058.02" table:style-name="ce50">
            <text:p>3058,0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Беспалова Лейла Ильга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Жилина Татьяна Геннад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662.4" table:style-name="ce42">
            <text:p>662,4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атыш Валентина Алексе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331.19" table:style-name="ce42">
            <text:p>331,19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Рязанцева Валентина Васил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32.47999999999999" table:style-name="ce42">
            <text:p>132,4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Шафеева Валентина Андре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54.56" table:style-name="ce42">
            <text:p>154,56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1280.6300000000001" table:style-name="ce49">
            <text:p>1280,63</text:p>
          </table:table-cell>
          <table:table-cell office:value-type="float" office:value="1280.6300000000001" table:style-name="ce50">
            <text:p>1280,6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Бойкова Кристина Ю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Гусарова Антонина Александ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Прокофьев Анатолий Петро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152.7600000000002" table:style-name="ce42">
            <text:p>2152,76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Селиверстов Александр Александро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816.44" table:style-name="ce42">
            <text:p>2816,44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Селиверстова Галина Владими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10.6" table:style-name="ce42">
            <text:p>110,6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Сергеев Вячеслав Николае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Ситчихина Наталья Александ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050.5999999999999" table:style-name="ce42">
            <text:p>1050,6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Юськив Мария Васил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598.56" table:style-name="ce42">
            <text:p>2598,56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8773.1200000000008" table:style-name="ce49">
            <text:p>8773,12</text:p>
          </table:table-cell>
          <table:table-cell office:value-type="float" office:value="8773.1200000000008" table:style-name="ce50">
            <text:p>8773,1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Новикова Анна Ю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Мухортова Мария Иван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514.32" table:style-name="ce42">
            <text:p>1514,3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Паникар Наталия Павл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514.32" table:style-name="ce42">
            <text:p>1514,3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3028.64" table:style-name="ce49">
            <text:p>3028,64</text:p>
          </table:table-cell>
          <table:table-cell office:value-type="float" office:value="3028.64" table:style-name="ce50">
            <text:p>3028,64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Делиу Галина Станислав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Егунов Евгений Викторо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331.19" table:style-name="ce42">
            <text:p>331,19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Ергунева Галина Алексе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325.98" table:style-name="ce42">
            <text:p>1325,9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отлова Валентина Яковл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684.52" table:style-name="ce42">
            <text:p>684,5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рисак Тамара Борис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551.91999999999996" table:style-name="ce42">
            <text:p>551,9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Новикова Галина Александ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331.19" table:style-name="ce42">
            <text:p>331,19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3224.8" table:style-name="ce49">
            <text:p>3224,80</text:p>
          </table:table-cell>
          <table:table-cell office:value-type="float" office:value="3224.8" table:style-name="ce50">
            <text:p>3224,80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Евстратова Галина Алексе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Волкова Екатерина Александ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Мартирова Галина Пет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0.78" table:style-name="ce42">
            <text:p>220,7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242.86" table:style-name="ce49">
            <text:p>242,86</text:p>
          </table:table-cell>
          <table:table-cell office:value-type="float" office:value="242.86" table:style-name="ce50">
            <text:p>242,8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Калинкина Лариса Михайл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Белоусова Галина Васил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086.7199999999998" table:style-name="ce42">
            <text:p>2086,7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Володина Надежда Никола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Орешина Эльвира Александ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772.78" table:style-name="ce42">
            <text:p>772,7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Степанова Виктория Викто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Филатова Галина Александ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331.8" table:style-name="ce42">
            <text:p>331,8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3235.46" table:style-name="ce49">
            <text:p>3235,46</text:p>
          </table:table-cell>
          <table:table-cell office:value-type="float" office:value="3235.46" table:style-name="ce50">
            <text:p>3235,4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Коньшина Татьяна Серге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Архипенко Галина Алексе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рапотухина Лидия Григор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учкина Надежда Семен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713.6" table:style-name="ce42">
            <text:p>1713,6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Рябихин Виктор Андрее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242.0899999999999" table:style-name="ce42">
            <text:p>1242,09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Шапкарин Александр Владимиро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76.02" table:style-name="ce42">
            <text:p>276,0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3275.87" table:style-name="ce49">
            <text:p>3275,87</text:p>
          </table:table-cell>
          <table:table-cell office:value-type="float" office:value="3275.87" table:style-name="ce50">
            <text:p>3275,87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Кошелева Светлана Александ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Гусева Светлана Михайл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10.39" table:style-name="ce42">
            <text:p>110,39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ондракова Людмила Анатол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33.119999999999997" table:style-name="ce42">
            <text:p>33,1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Ляпина Мария Федо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Пудовкин Николай Петро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7.59" table:style-name="ce42">
            <text:p>27,59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193.18" table:style-name="ce49">
            <text:p>193,18</text:p>
          </table:table-cell>
          <table:table-cell office:value-type="float" office:value="193.18" table:style-name="ce50">
            <text:p>193,1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Мнацаканянц Инна Вале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Геворкян Ромела Максим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аширская Ольга Борис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580.5" table:style-name="ce42">
            <text:p>580,5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Наумова Галина Пет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Рыжикова Надежда Владими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960.43" table:style-name="ce42">
            <text:p>1960,43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2585.09" table:style-name="ce49">
            <text:p>2585,09</text:p>
          </table:table-cell>
          <table:table-cell office:value-type="float" office:value="2585.09" table:style-name="ce50">
            <text:p>2585,09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Обыденнова Светлана Александ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Владыкина Клавда Степан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706.38" table:style-name="ce42">
            <text:p>2706,3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Зюлькова Ольга Никола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7.59" table:style-name="ce42">
            <text:p>27,59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Пчелинцева Раиса Алексе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44.16" table:style-name="ce42">
            <text:p>44,16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Резник Елена Владими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7.59" table:style-name="ce42">
            <text:p>27,59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Суркова Людмила Федо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38.01" table:style-name="ce42">
            <text:p>138,01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2943.73" table:style-name="ce49">
            <text:p>2943,73</text:p>
          </table:table-cell>
          <table:table-cell office:value-type="float" office:value="2943.73" table:style-name="ce50">
            <text:p>2943,7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Рудник Татьяна Серге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еречанина Людмила Васил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урчавова Лидия Андре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663.6" table:style-name="ce42">
            <text:p>663,6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Павлова Лидия Никола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Полякова Тамара Пет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189.96" table:style-name="ce42">
            <text:p>2189,96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Ступина Любовь Борис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66.239999999999995" table:style-name="ce42">
            <text:p>66,24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2963.96" table:style-name="ce49">
            <text:p>2963,96</text:p>
          </table:table-cell>
          <table:table-cell office:value-type="float" office:value="2963.96" table:style-name="ce50">
            <text:p>2963,9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Смарунь Татьяна Викторо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Бизяева Валентина Евген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33.119999999999997" table:style-name="ce42">
            <text:p>33,12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Заломнов Владимир Ивано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9.309999999999999" table:style-name="ce42">
            <text:p>19,31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усакина Раиса Дмитри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484.15" table:style-name="ce42">
            <text:p>2484,15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Муругова Таисия Дмитри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2558.66" table:style-name="ce49">
            <text:p>2558,66</text:p>
          </table:table-cell>
          <table:table-cell office:value-type="float" office:value="2558.66" table:style-name="ce50">
            <text:p>2558,6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Чепенко Юлия Серге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Бирюкова Екатерина Никола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629.64" table:style-name="ce42">
            <text:p>1629,64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Горбунова Галина Васил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Гришина Галина Никола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обызева Людмила Никола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озлова Валентина Ильинич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Печенкин Анатолий Ивано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048.78" table:style-name="ce42">
            <text:p>1048,7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Репкина Валентина Александ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745.04" table:style-name="ce42">
            <text:p>745,04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Халиулин Виктор Хуснуло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496.77" table:style-name="ce42">
            <text:p>496,77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4008.55" table:style-name="ce49">
            <text:p>4008,55</text:p>
          </table:table-cell>
          <table:table-cell office:value-type="float" office:value="4008.55" table:style-name="ce50">
            <text:p>4008,55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75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6">
            <text:p>Чипига Евгения Валер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онушина Людмила Василь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492.2" table:style-name="ce42">
            <text:p>1492,2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Кукушкина Мария Михайл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2.08" table:style-name="ce42">
            <text:p>22,08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Сикаренко Александра Александро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276.5" table:style-name="ce42">
            <text:p>276,5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Терентьева Валентина Алексеевна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1008" table:style-name="ce42">
            <text:p>1008,00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style-name="ce37">
            <text:p>Д.</text:p>
          </table:table-cell>
          <table:table-cell office:value-type="string" table:style-name="ce38">
            <text:p>Хомутов Виктор Сергеевич</text:p>
          </table:table-cell>
          <table:table-cell table:style-name="ce39"/>
          <table:table-cell table:number-columns-repeated="2" table:style-name="ce40"/>
          <table:table-cell table:style-name="ce41"/>
          <table:table-cell office:value-type="float" office:value="745.04" table:style-name="ce42">
            <text:p>745,04</text:p>
          </table:table-cell>
          <table:table-cell table:style-name="ce43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77">
            <text:p>Итого:</text:p>
          </table:table-cell>
          <table:covered-table-cell/>
          <table:table-cell table:style-name="ce47"/>
          <table:table-cell office:value-type="float" office:value="0" table:style-name="ce48">
            <text:p>0,00</text:p>
          </table:table-cell>
          <table:table-cell office:value-type="float" office:value="0" table:style-name="ce48">
            <text:p>0,00</text:p>
          </table:table-cell>
          <table:table-cell table:style-name="ce48"/>
          <table:table-cell office:value-type="float" office:value="3543.82" table:style-name="ce49">
            <text:p>3543,82</text:p>
          </table:table-cell>
          <table:table-cell office:value-type="float" office:value="3543.82" table:style-name="ce50">
            <text:p>3543,8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78">
            <text:p>Всего:</text:p>
          </table:table-cell>
          <table:covered-table-cell/>
          <table:table-cell table:style-name="ce36"/>
          <table:table-cell office:value-type="float" office:value="0" table:style-name="ce51">
            <text:p>0,00</text:p>
          </table:table-cell>
          <table:table-cell office:value-type="float" office:value="0" table:style-name="ce51">
            <text:p>0,00</text:p>
          </table:table-cell>
          <table:table-cell table:style-name="ce51"/>
          <table:table-cell office:value-type="float" office:value="44916.39" table:style-name="ce52">
            <text:p>44916,39</text:p>
          </table:table-cell>
          <table:table-cell office:value-type="float" office:value="44916.39" table:style-name="ce53">
            <text:p>44916,39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31"/>
          <table:table-cell table:style-name="ce54"/>
          <table:table-cell table:style-name="ce31"/>
          <table:table-cell table:style-name="ce32"/>
          <table:table-cell office:value-type="float" office:value="0" table:style-name="ce55">
            <text:p>0</text:p>
          </table:table-cell>
          <table:table-cell table:style-name="ce55"/>
          <table:table-cell table:style-name="ce56"/>
          <table:table-cell table:style-name="ce57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8">
          <table:table-cell/>
          <table:table-cell office:value-type="string" table:number-columns-spanned="10" table:number-rows-spanned="1" table:style-name="ce79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58"/>
          <table:table-cell table:style-name="ce5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style-name="ce58">
            <text:p>Кассир ______________________ /__________________/</text:p>
          </table:table-cell>
          <table:table-cell table:style-name="ce5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58"/>
          <table:table-cell table:style-name="ce5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style-name="ce58">
            <text:p>Зам. Директора ______________С.В. Конюхова</text:p>
          </table:table-cell>
          <table:table-cell table:style-name="ce5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58"/>
          <table:table-cell table:style-name="ce5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style-name="ce58">
            <text:p>Директор филиала по Заводскому району ______________Е.И. Колесниченко</text:p>
          </table:table-cell>
          <table:table-cell table:style-name="ce59"/>
          <table:table-cell table:number-columns-repeated="4" table:style-name="ce60"/>
          <table:table-cell table:style-name="ce61"/>
          <table:table-cell table:number-columns-repeated="2" table:style-name="ce9"/>
          <table:table-cell table:style-name="ce63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number-rows-repeated="784" table:style-name="ro3">
          <table:table-cell table:number-columns-repeated="8"/>
          <table:table-cell table:number-columns-repeated="19" table:style-name="ce19"/>
          <table:table-cell table:number-columns-repeated="16357"/>
        </table:table-row>
        <table:table-row table:number-rows-repeated="1047549" table:style-name="ro3">
          <table:table-cell table:number-columns-repeated="16384"/>
        </table:table-row>
        <table:table-row table:number-rows-repeated="6" table:style-name="ro9">
          <table:table-cell table:number-columns-repeated="16384"/>
        </table:table-row>
        <table:table-row table:number-rows-repeated="93" table:style-name="ro3">
          <table:table-cell table:number-columns-repeated="16384"/>
        </table:table-row>
      </table:table>
      <table:table table:name="Доп" table:style-name="ta2">
        <table:table-column table:style-name="co11" table:default-cell-style-name="ce1"/>
        <table:table-column table:style-name="co12" table:default-cell-style-name="ce9"/>
        <table:table-column table:style-name="co13" table:default-cell-style-name="ce87"/>
        <table:table-column table:style-name="co14" table:default-cell-style-name="ce62"/>
        <table:table-column table:style-name="co15" table:default-cell-style-name="ce62"/>
        <table:table-column table:style-name="co16" table:default-cell-style-name="ce9"/>
        <table:table-column table:style-name="co9" table:default-cell-style-name="ce100"/>
        <table:table-column table:style-name="co17" table:default-cell-style-name="ce9"/>
        <table:table-column table:style-name="co1" table:default-cell-style-name="ce9"/>
        <table:table-column table:style-name="co16" table:default-cell-style-name="ce9"/>
        <table:table-column table:style-name="co18" table:default-cell-style-name="ce63"/>
        <table:table-column table:style-name="co19" table:number-columns-repeated="242" table:default-cell-style-name="ce9"/>
        <table:table-column table:style-name="co20" table:number-columns-repeated="771" table:default-cell-style-name="ce9"/>
        <table:table-column table:style-name="co5" table:number-columns-repeated="15360" table:default-cell-style-name="ce1"/>
        <table:table-row table:number-rows-repeated="2" table:style-name="ro10">
          <table:table-cell table:style-name="ce1"/>
          <table:table-cell table:number-columns-repeated="2" table:style-name="ce80"/>
          <table:table-cell table:number-columns-repeated="7" table:style-name="ce9"/>
          <table:table-cell table:style-name="ce81"/>
          <table:table-cell table:number-columns-repeated="16373" table:style-name="ce1"/>
        </table:table-row>
        <table:table-row table:number-rows-repeated="2" table:style-name="ro10">
          <table:table-cell table:style-name="ce1"/>
          <table:table-cell table:number-columns-repeated="2" table:style-name="ce80"/>
          <table:table-cell table:number-columns-repeated="2" table:style-name="ce82"/>
          <table:table-cell table:number-columns-repeated="5" table:style-name="ce9"/>
          <table:table-cell table:style-name="ce81"/>
          <table:table-cell table:number-columns-repeated="16373" table:style-name="ce1"/>
        </table:table-row>
        <table:table-row table:style-name="ro10">
          <table:table-cell table:style-name="ce1"/>
          <table:table-cell table:style-name="ce80"/>
          <table:table-cell office:value-type="string" table:style-name="ce82">
            <text:p>МИНИСТЕРСТВО ТРУДА</text:p>
          </table:table-cell>
          <table:table-cell table:number-columns-repeated="2" table:style-name="ce82"/>
          <table:table-cell table:style-name="ce1"/>
          <table:table-cell table:number-columns-repeated="4" table:style-name="ce9"/>
          <table:table-cell table:style-name="ce81"/>
          <table:table-cell table:number-columns-repeated="16373" table:style-name="ce1"/>
        </table:table-row>
        <table:table-row table:style-name="ro10">
          <table:table-cell table:style-name="ce1"/>
          <table:table-cell table:style-name="ce80"/>
          <table:table-cell office:value-type="string" table:style-name="ce82">
            <text:p>И СОЦИАЛЬНОЙ ЗАЩИТЫ</text:p>
          </table:table-cell>
          <table:table-cell table:number-columns-repeated="2" table:style-name="ce82"/>
          <table:table-cell table:style-name="ce1"/>
          <table:table-cell table:number-columns-repeated="4" table:style-name="ce9"/>
          <table:table-cell table:style-name="ce81"/>
          <table:table-cell table:number-columns-repeated="16373" table:style-name="ce1"/>
        </table:table-row>
        <table:table-row table:style-name="ro11">
          <table:table-cell table:style-name="ce1"/>
          <table:table-cell table:style-name="ce80"/>
          <table:table-cell office:value-type="string" table:style-name="ce83">
            <text:p>ФИЛИАЛ ГОСУДАРСТВЕННОГО</text:p>
          </table:table-cell>
          <table:table-cell table:number-columns-repeated="2" table:style-name="ce82"/>
          <table:table-cell table:style-name="ce1"/>
          <table:table-cell table:number-columns-repeated="4" table:style-name="ce9"/>
          <table:table-cell table:style-name="ce81"/>
          <table:table-cell table:number-columns-repeated="16373" table:style-name="ce1"/>
        </table:table-row>
        <table:table-row table:style-name="ro11">
          <table:table-cell table:style-name="ce1"/>
          <table:table-cell table:style-name="ce80"/>
          <table:table-cell office:value-type="string" table:style-name="ce83">
            <text:p>АВТОНОМНОГО УЧРЕЖДЕНИЯ</text:p>
          </table:table-cell>
          <table:table-cell table:number-columns-repeated="2" table:style-name="ce82"/>
          <table:table-cell table:style-name="ce1"/>
          <table:table-cell table:number-columns-repeated="4" table:style-name="ce9"/>
          <table:table-cell table:style-name="ce81"/>
          <table:table-cell table:number-columns-repeated="16373" table:style-name="ce1"/>
        </table:table-row>
        <table:table-row table:style-name="ro12">
          <table:table-cell table:style-name="ce1"/>
          <table:table-cell table:style-name="ce80"/>
          <table:table-cell office:value-type="string" table:style-name="ce83">
            <text:p>САРАТОВСКОЙ ОБЛАСТИ</text:p>
          </table:table-cell>
          <table:table-cell table:number-columns-repeated="2" table:style-name="ce82"/>
          <table:table-cell table:style-name="ce1"/>
          <table:table-cell office:value-type="string" table:style-name="ce8">
            <text:p>Главному бухгалтеру</text:p>
          </table:table-cell>
          <table:table-cell table:number-columns-repeated="3" table:style-name="ce9"/>
          <table:table-cell table:style-name="ce81"/>
          <table:table-cell table:number-columns-repeated="16373" table:style-name="ce1"/>
        </table:table-row>
        <table:table-row table:style-name="ro13">
          <table:table-cell table:style-name="ce1"/>
          <table:table-cell table:style-name="ce80"/>
          <table:table-cell office:value-type="string" table:style-name="ce83">
            <text:p>«КОМПЛЕКСНЫЙ ЦЕНТР</text:p>
          </table:table-cell>
          <table:table-cell table:number-columns-repeated="2" table:style-name="ce82"/>
          <table:table-cell table:style-name="ce1"/>
          <table:table-cell office:value-type="string" table:style-name="ce8">
            <text:p>ГАУ СО КЦСОН г.Саратова</text:p>
          </table:table-cell>
          <table:table-cell table:number-columns-repeated="3" table:style-name="ce9"/>
          <table:table-cell table:style-name="ce81"/>
          <table:table-cell table:number-columns-repeated="16373" table:style-name="ce1"/>
        </table:table-row>
        <table:table-row table:style-name="ro13">
          <table:table-cell table:style-name="ce1"/>
          <table:table-cell table:style-name="ce80"/>
          <table:table-cell office:value-type="string" table:style-name="ce83">
            <text:p>СОЦИАЛЬНОГО ОБСЛУЖИВАНИЯ</text:p>
          </table:table-cell>
          <table:table-cell table:number-columns-repeated="2" table:style-name="ce82"/>
          <table:table-cell table:style-name="ce1"/>
          <table:table-cell office:value-type="string" table:style-name="ce12">
            <text:p>Г.А.Кулаевой</text:p>
          </table:table-cell>
          <table:table-cell table:number-columns-repeated="3" table:style-name="ce9"/>
          <table:table-cell table:style-name="ce81"/>
          <table:table-cell table:number-columns-repeated="16373" table:style-name="ce1"/>
        </table:table-row>
        <table:table-row table:style-name="ro13">
          <table:table-cell table:style-name="ce1"/>
          <table:table-cell table:style-name="ce80"/>
          <table:table-cell office:value-type="string" table:style-name="ce83">
            <text:p>НАСЕЛЕНИЯ Г. САРАТОВА»</text:p>
          </table:table-cell>
          <table:table-cell table:number-columns-repeated="2" table:style-name="ce82"/>
          <table:table-cell table:style-name="ce1"/>
          <table:table-cell table:number-columns-repeated="4" table:style-name="ce10"/>
          <table:table-cell table:style-name="ce84"/>
          <table:table-cell table:number-columns-repeated="16373" table:style-name="ce1"/>
        </table:table-row>
        <table:table-row table:style-name="ro13">
          <table:table-cell table:style-name="ce1"/>
          <table:table-cell table:style-name="ce80"/>
          <table:table-cell office:value-type="string" table:style-name="ce83">
            <text:p>ПО ЗАВОДСКОМУ РАЙОНУ</text:p>
          </table:table-cell>
          <table:table-cell table:number-columns-repeated="2" table:style-name="ce82"/>
          <table:table-cell table:style-name="ce1"/>
          <table:table-cell table:number-columns-repeated="4" table:style-name="ce10"/>
          <table:table-cell table:style-name="ce84"/>
          <table:table-cell table:number-columns-repeated="16373" table:style-name="ce1"/>
        </table:table-row>
        <table:table-row table:style-name="ro13">
          <table:table-cell table:style-name="ce1"/>
          <table:table-cell table:style-name="ce80"/>
          <table:table-cell office:value-type="string" table:style-name="ce83">
            <text:p>(Филиал ГАУ СО «КЦСОН г. Саратова»</text:p>
          </table:table-cell>
          <table:table-cell table:number-columns-repeated="2" table:style-name="ce82"/>
          <table:table-cell table:style-name="ce1"/>
          <table:table-cell table:number-columns-repeated="2" table:style-name="ce8"/>
          <table:table-cell table:style-name="ce11"/>
          <table:table-cell table:style-name="ce9"/>
          <table:table-cell table:style-name="ce81"/>
          <table:table-cell table:number-columns-repeated="16373" table:style-name="ce1"/>
        </table:table-row>
        <table:table-row table:style-name="ro14">
          <table:table-cell table:style-name="ce1"/>
          <table:table-cell table:style-name="ce80"/>
          <table:table-cell office:value-type="string" table:style-name="ce83">
            <text:p>по Заводскому району)</text:p>
          </table:table-cell>
          <table:table-cell table:number-columns-repeated="2" table:style-name="ce82"/>
          <table:table-cell table:style-name="ce1"/>
          <table:table-cell table:style-name="ce12"/>
          <table:table-cell table:number-columns-repeated="2" table:style-name="ce8"/>
          <table:table-cell table:style-name="ce9"/>
          <table:table-cell table:style-name="ce81"/>
          <table:table-cell table:number-columns-repeated="16373" table:style-name="ce1"/>
        </table:table-row>
        <table:table-row table:style-name="ro15">
          <table:table-cell table:style-name="ce1"/>
          <table:table-cell table:style-name="ce80"/>
          <table:table-cell office:value-type="string" table:style-name="ce85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table-cell table:number-columns-repeated="2" table:style-name="ce82"/>
          <table:table-cell table:number-columns-repeated="4" table:style-name="ce1"/>
          <table:table-cell table:style-name="ce62"/>
          <table:table-cell table:style-name="ce81"/>
          <table:table-cell table:number-columns-repeated="16373" table:style-name="ce1"/>
        </table:table-row>
        <table:table-row table:style-name="ro16">
          <table:table-cell/>
          <table:table-cell table:style-name="ce82"/>
          <table:table-cell office:value-type="string" table:style-name="ce80">
            <text:p>_______________№ <text:s/>____________</text:p>
          </table:table-cell>
          <table:table-cell table:number-columns-repeated="2" table:style-name="ce86"/>
          <table:table-cell table:number-columns-repeated="4" table:style-name="ce1"/>
          <table:table-cell table:style-name="ce62"/>
          <table:table-cell table:style-name="ce81"/>
          <table:table-cell table:number-columns-repeated="16373" table:style-name="ce1"/>
        </table:table-row>
        <table:table-row table:style-name="ro17">
          <table:table-cell/>
          <table:table-cell table:style-name="ce1"/>
          <table:table-cell office:value-type="string" table:style-name="ce82">
            <text:p>на №___________________________</text:p>
          </table:table-cell>
          <table:table-cell table:number-columns-repeated="2" table:style-name="ce13"/>
          <table:table-cell table:number-columns-repeated="4" table:style-name="ce1"/>
          <table:table-cell table:style-name="ce62"/>
          <table:table-cell table:style-name="ce81"/>
          <table:table-cell table:number-columns-repeated="16373" table:style-name="ce1"/>
        </table:table-row>
        <table:table-row table:style-name="ro18">
          <table:table-cell/>
          <table:table-cell table:style-name="ce1"/>
          <table:table-cell table:style-name="ce87"/>
          <table:table-cell table:number-columns-repeated="2" table:style-name="ce13"/>
          <table:table-cell table:number-columns-repeated="4" table:style-name="ce1"/>
          <table:table-cell table:style-name="ce62"/>
          <table:table-cell table:style-name="ce81"/>
          <table:table-cell table:number-columns-repeated="16373" table:style-name="ce1"/>
        </table:table-row>
        <table:table-row table:style-name="ro19">
          <table:table-cell/>
          <table:table-cell office:value-type="string" table:number-columns-spanned="10" table:number-rows-spanned="1" table:style-name="ce102">
            <text:p>Предоставляем денежные средства в объеме 44916,39 (сорок четыре тысячи девятьсот шестнадцать рублей 39 копеек) для оплаты в кассу учреждения дополнительных услуг, оказанных филиалом в марте 2026 г. в соответствии с заключенными <text:s/>договорами.</text:p>
          </table:table-cell>
          <table:covered-table-cell table:number-columns-repeated="9"/>
          <table:table-cell table:number-columns-repeated="16373" table:style-name="ce1"/>
        </table:table-row>
        <table:table-row table:style-name="ro20">
          <table:table-cell/>
          <table:table-cell office:value-type="string" table:number-columns-spanned="10" table:number-rows-spanned="1" table:style-name="ce103">
            <text:p><text:s/>ОСОД № <text:s/>9</text:p>
          </table:table-cell>
          <table:covered-table-cell table:number-columns-repeated="9"/>
          <table:table-cell table:number-columns-repeated="16373" table:style-name="ce1"/>
        </table:table-row>
        <table:table-row table:style-name="ro21">
          <table:table-cell/>
          <table:table-cell office:value-type="string" table:number-columns-spanned="1" table:number-rows-spanned="2" table:style-name="ce104">
            <text:p>№</text:p>
          </table:table-cell>
          <table:table-cell office:value-type="string" table:number-columns-spanned="1" table:number-rows-spanned="2" table:style-name="ce105">
            <text:p>ФИО <text:s/>обслуживаемого</text:p>
          </table:table-cell>
          <table:table-cell office:value-type="string" table:number-columns-spanned="1" table:number-rows-spanned="2" table:style-name="ce106">
            <text:p>Номер договора</text:p>
          </table:table-cell>
          <table:table-cell office:value-type="string" table:number-columns-spanned="1" table:number-rows-spanned="2" table:style-name="ce106">
            <text:p>дата</text:p>
          </table:table-cell>
          <table:table-cell office:value-type="string" table:number-columns-spanned="1" table:number-rows-spanned="2" table:style-name="ce106">
            <text:p>Сумма <text:s/>оплаты по договору (руб.)</text:p>
          </table:table-cell>
          <table:table-cell office:value-type="string" table:number-columns-spanned="1" table:number-rows-spanned="2" table:style-name="ce107">
            <text:p>Сумма без учета НДС (руб.)</text:p>
          </table:table-cell>
          <table:table-cell office:value-type="string" table:number-columns-spanned="1" table:number-rows-spanned="2" table:style-name="ce106">
            <text:p>Ставка НДС %</text:p>
          </table:table-cell>
          <table:table-cell office:value-type="string" table:number-columns-spanned="1" table:number-rows-spanned="2" table:style-name="ce106">
            <text:p>Сумма НДС (руб.)</text:p>
          </table:table-cell>
          <table:table-cell office:value-type="string" table:number-columns-spanned="1" table:number-rows-spanned="2" table:style-name="ce106">
            <text:p>Сумма с учетом НДС к оплате (руб.)</text:p>
          </table:table-cell>
          <table:table-cell table:number-columns-spanned="1" table:number-rows-spanned="2" table:style-name="ce74"/>
          <table:table-cell table:number-columns-repeated="16373" table:style-name="ce1"/>
        </table:table-row>
        <table:table-row table:style-name="ro2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3">
          <table:table-cell/>
          <table:table-cell office:value-type="float" office:value="1" table:style-name="ce88">
            <text:p>1</text:p>
          </table:table-cell>
          <table:table-cell office:value-type="string" table:style-name="ce89">
            <text:p>Антонова Ксения Петровна 30.10.1939г.р.</text:p>
          </table:table-cell>
          <table:table-cell office:value-type="string" table:style-name="ce90">
            <text:p>Договор №804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" table:style-name="ce88">
            <text:p>2</text:p>
          </table:table-cell>
          <table:table-cell office:value-type="string" table:style-name="ce89">
            <text:p>Архипенко Галина Алексеевна 01.10.1947г.р.</text:p>
          </table:table-cell>
          <table:table-cell office:value-type="string" table:style-name="ce90">
            <text:p>Договор №462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" table:style-name="ce88">
            <text:p>3</text:p>
          </table:table-cell>
          <table:table-cell office:value-type="string" table:style-name="ce89">
            <text:p>Белоусова Галина Васильевна 14.05.1940г.р.</text:p>
          </table:table-cell>
          <table:table-cell office:value-type="string" table:style-name="ce90">
            <text:p>Договор №828-З-09</text:p>
          </table:table-cell>
          <table:table-cell office:value-type="string" table:style-name="ce91">
            <text:p>09.02.2026</text:p>
          </table:table-cell>
          <table:table-cell office:value-type="float" office:value="2086.7199999999998" table:style-name="ce92">
            <text:p>2 086,72</text:p>
          </table:table-cell>
          <table:table-cell office:value-type="float" office:value="2086.7199999999998" table:style-name="ce92">
            <text:p>2 086,7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086.7199999999998" table:style-name="ce92">
            <text:p>2 086,7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" table:style-name="ce88">
            <text:p>4</text:p>
          </table:table-cell>
          <table:table-cell office:value-type="string" table:style-name="ce89">
            <text:p>Бизяева Валентина Евгеньевна 18.08.1938г.р.</text:p>
          </table:table-cell>
          <table:table-cell office:value-type="string" table:style-name="ce90">
            <text:p>Договор №379-З-09</text:p>
          </table:table-cell>
          <table:table-cell office:value-type="string" table:style-name="ce91">
            <text:p>02.03.2026</text:p>
          </table:table-cell>
          <table:table-cell office:value-type="float" office:value="33.119999999999997" table:style-name="ce92">
            <text:p>33,12</text:p>
          </table:table-cell>
          <table:table-cell office:value-type="float" office:value="33.119999999999997" table:style-name="ce92">
            <text:p>33,1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33.119999999999997" table:style-name="ce92">
            <text:p>33,1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" table:style-name="ce88">
            <text:p>5</text:p>
          </table:table-cell>
          <table:table-cell office:value-type="string" table:style-name="ce89">
            <text:p>Бирюкова Екатерина Николаевна 09.04.1952г.р.</text:p>
          </table:table-cell>
          <table:table-cell office:value-type="string" table:style-name="ce90">
            <text:p>Договор №98-З-09-Д</text:p>
          </table:table-cell>
          <table:table-cell office:value-type="string" table:style-name="ce91">
            <text:p>01.04.2026</text:p>
          </table:table-cell>
          <table:table-cell office:value-type="float" office:value="1629.64" table:style-name="ce92">
            <text:p>1 629,64</text:p>
          </table:table-cell>
          <table:table-cell office:value-type="float" office:value="1629.64" table:style-name="ce92">
            <text:p>1 629,64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629.64" table:style-name="ce92">
            <text:p>1 629,64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" table:style-name="ce88">
            <text:p>6</text:p>
          </table:table-cell>
          <table:table-cell office:value-type="string" table:style-name="ce89">
            <text:p>Владыкина Клавда Степановна 30.07.1950г.р.</text:p>
          </table:table-cell>
          <table:table-cell office:value-type="string" table:style-name="ce90">
            <text:p>Договор №854-З-09</text:p>
          </table:table-cell>
          <table:table-cell office:value-type="string" table:style-name="ce91">
            <text:p>09.02.2026</text:p>
          </table:table-cell>
          <table:table-cell office:value-type="float" office:value="2706.38" table:style-name="ce92">
            <text:p>2 706,38</text:p>
          </table:table-cell>
          <table:table-cell office:value-type="float" office:value="2706.38" table:style-name="ce92">
            <text:p>2 706,3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706.38" table:style-name="ce92">
            <text:p>2 706,3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7" table:style-name="ce88">
            <text:p>7</text:p>
          </table:table-cell>
          <table:table-cell office:value-type="string" table:style-name="ce89">
            <text:p>Волкова Екатерина Александровна 22.09.1977г.р.</text:p>
          </table:table-cell>
          <table:table-cell office:value-type="string" table:style-name="ce90">
            <text:p>Договор №832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8" table:style-name="ce88">
            <text:p>8</text:p>
          </table:table-cell>
          <table:table-cell office:value-type="string" table:style-name="ce89">
            <text:p>Володина Надежда Николаевна 12.10.1960г.р.</text:p>
          </table:table-cell>
          <table:table-cell office:value-type="string" table:style-name="ce90">
            <text:p>Договор №380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9" table:style-name="ce88">
            <text:p>9</text:p>
          </table:table-cell>
          <table:table-cell office:value-type="string" table:style-name="ce89">
            <text:p>Геворкян Ромела Максимовна 27.07.1955г.р.</text:p>
          </table:table-cell>
          <table:table-cell office:value-type="string" table:style-name="ce90">
            <text:p>Договор №710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0" table:style-name="ce88">
            <text:p>10</text:p>
          </table:table-cell>
          <table:table-cell office:value-type="string" table:style-name="ce89">
            <text:p>Горбунова Галина Васильевна 08.09.1940г.р.</text:p>
          </table:table-cell>
          <table:table-cell office:value-type="string" table:style-name="ce90">
            <text:p>Договор №75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1" table:style-name="ce88">
            <text:p>11</text:p>
          </table:table-cell>
          <table:table-cell office:value-type="string" table:style-name="ce89">
            <text:p>Гришина Галина Николаевна 06.03.1957г.р.</text:p>
          </table:table-cell>
          <table:table-cell office:value-type="string" table:style-name="ce90">
            <text:p>Договор №952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2" table:style-name="ce88">
            <text:p>12</text:p>
          </table:table-cell>
          <table:table-cell office:value-type="string" table:style-name="ce89">
            <text:p>Гусарова Антонина Александровна 23.12.1951г.р.</text:p>
          </table:table-cell>
          <table:table-cell office:value-type="string" table:style-name="ce90">
            <text:p>Договор №410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3" table:style-name="ce88">
            <text:p>13</text:p>
          </table:table-cell>
          <table:table-cell office:value-type="string" table:style-name="ce89">
            <text:p>Гусева Светлана Михайловна 29.11.1940г.р.</text:p>
          </table:table-cell>
          <table:table-cell office:value-type="string" table:style-name="ce90">
            <text:p>Договор №945-З-09</text:p>
          </table:table-cell>
          <table:table-cell office:value-type="string" table:style-name="ce91">
            <text:p>02.03.2026</text:p>
          </table:table-cell>
          <table:table-cell office:value-type="float" office:value="110.39" table:style-name="ce92">
            <text:p>110,39</text:p>
          </table:table-cell>
          <table:table-cell office:value-type="float" office:value="110.39" table:style-name="ce92">
            <text:p>110,39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10.39" table:style-name="ce92">
            <text:p>110,39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4" table:style-name="ce88">
            <text:p>14</text:p>
          </table:table-cell>
          <table:table-cell office:value-type="string" table:style-name="ce89">
            <text:p>Егунов Евгений Викторович 22.08.1949г.р.</text:p>
          </table:table-cell>
          <table:table-cell office:value-type="string" table:style-name="ce90">
            <text:p>Договор №243-З-09</text:p>
          </table:table-cell>
          <table:table-cell office:value-type="string" table:style-name="ce91">
            <text:p>02.03.2026</text:p>
          </table:table-cell>
          <table:table-cell office:value-type="float" office:value="331.19" table:style-name="ce92">
            <text:p>331,19</text:p>
          </table:table-cell>
          <table:table-cell office:value-type="float" office:value="331.19" table:style-name="ce92">
            <text:p>331,19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331.19" table:style-name="ce92">
            <text:p>331,19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5" table:style-name="ce88">
            <text:p>15</text:p>
          </table:table-cell>
          <table:table-cell office:value-type="string" table:style-name="ce89">
            <text:p>Ергунева Галина Алексеевна 08.08.1940г.р.</text:p>
          </table:table-cell>
          <table:table-cell office:value-type="string" table:style-name="ce90">
            <text:p>Договор №986-З-09</text:p>
          </table:table-cell>
          <table:table-cell office:value-type="string" table:style-name="ce91">
            <text:p>09.02.2026</text:p>
          </table:table-cell>
          <table:table-cell office:value-type="float" office:value="1325.98" table:style-name="ce92">
            <text:p>1 325,98</text:p>
          </table:table-cell>
          <table:table-cell office:value-type="float" office:value="1325.98" table:style-name="ce92">
            <text:p>1 325,9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325.98" table:style-name="ce92">
            <text:p>1 325,9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6" table:style-name="ce88">
            <text:p>16</text:p>
          </table:table-cell>
          <table:table-cell office:value-type="string" table:style-name="ce89">
            <text:p>Жилина Татьяна Геннадьевна 17.03.1952г.р.</text:p>
          </table:table-cell>
          <table:table-cell office:value-type="string" table:style-name="ce90">
            <text:p>Договор №63-З-09-Д</text:p>
          </table:table-cell>
          <table:table-cell office:value-type="string" table:style-name="ce91">
            <text:p>09.02.2026</text:p>
          </table:table-cell>
          <table:table-cell office:value-type="float" office:value="662.4" table:style-name="ce92">
            <text:p>662,40</text:p>
          </table:table-cell>
          <table:table-cell office:value-type="float" office:value="662.4" table:style-name="ce92">
            <text:p>662,4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662.4" table:style-name="ce92">
            <text:p>662,4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7" table:style-name="ce88">
            <text:p>17</text:p>
          </table:table-cell>
          <table:table-cell office:value-type="string" table:style-name="ce89">
            <text:p>Заломнов Владимир Иванович 15.02.1937г.р.</text:p>
          </table:table-cell>
          <table:table-cell office:value-type="string" table:style-name="ce90">
            <text:p>Договор №955-З-09</text:p>
          </table:table-cell>
          <table:table-cell office:value-type="string" table:style-name="ce91">
            <text:p>02.03.2026</text:p>
          </table:table-cell>
          <table:table-cell office:value-type="float" office:value="19.309999999999999" table:style-name="ce92">
            <text:p>19,31</text:p>
          </table:table-cell>
          <table:table-cell office:value-type="float" office:value="19.309999999999999" table:style-name="ce92">
            <text:p>19,31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9.309999999999999" table:style-name="ce92">
            <text:p>19,31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8" table:style-name="ce88">
            <text:p>18</text:p>
          </table:table-cell>
          <table:table-cell office:value-type="string" table:style-name="ce89">
            <text:p>Зубкова Людмила Николаевна 12.01.1941г.р.</text:p>
          </table:table-cell>
          <table:table-cell office:value-type="string" table:style-name="ce90">
            <text:p>Договор №848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19" table:style-name="ce88">
            <text:p>19</text:p>
          </table:table-cell>
          <table:table-cell office:value-type="string" table:style-name="ce89">
            <text:p>Зюлькова Ольга Николаевна 12.07.1954г.р.</text:p>
          </table:table-cell>
          <table:table-cell office:value-type="string" table:style-name="ce90">
            <text:p>Договор №307-З-09</text:p>
          </table:table-cell>
          <table:table-cell office:value-type="string" table:style-name="ce91">
            <text:p>02.03.2026</text:p>
          </table:table-cell>
          <table:table-cell office:value-type="float" office:value="27.59" table:style-name="ce92">
            <text:p>27,59</text:p>
          </table:table-cell>
          <table:table-cell office:value-type="float" office:value="27.59" table:style-name="ce92">
            <text:p>27,59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7.59" table:style-name="ce92">
            <text:p>27,59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0" table:style-name="ce88">
            <text:p>20</text:p>
          </table:table-cell>
          <table:table-cell office:value-type="string" table:style-name="ce89">
            <text:p>Илясова Наталия Николаевна 02.09.1950г.р.</text:p>
          </table:table-cell>
          <table:table-cell office:value-type="string" table:style-name="ce90">
            <text:p>Доп. соглашение №1 к договору №152-З-09</text:p>
          </table:table-cell>
          <table:table-cell office:value-type="string" table:style-name="ce91">
            <text:p>02.03.2026</text:p>
          </table:table-cell>
          <table:table-cell office:value-type="float" office:value="2649.52" table:style-name="ce92">
            <text:p>2 649,52</text:p>
          </table:table-cell>
          <table:table-cell office:value-type="float" office:value="2649.52" table:style-name="ce92">
            <text:p>2 649,5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649.52" table:style-name="ce92">
            <text:p>2 649,5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1" table:style-name="ce88">
            <text:p>21</text:p>
          </table:table-cell>
          <table:table-cell office:value-type="string" table:style-name="ce89">
            <text:p>Катыш Валентина Алексеевна 24.01.1951г.р.</text:p>
          </table:table-cell>
          <table:table-cell office:value-type="string" table:style-name="ce90">
            <text:p>Договор №413-З-09</text:p>
          </table:table-cell>
          <table:table-cell office:value-type="string" table:style-name="ce91">
            <text:p>02.03.2026</text:p>
          </table:table-cell>
          <table:table-cell office:value-type="float" office:value="331.19" table:style-name="ce92">
            <text:p>331,19</text:p>
          </table:table-cell>
          <table:table-cell office:value-type="float" office:value="331.19" table:style-name="ce92">
            <text:p>331,19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331.19" table:style-name="ce92">
            <text:p>331,19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2" table:style-name="ce88">
            <text:p>22</text:p>
          </table:table-cell>
          <table:table-cell office:value-type="string" table:style-name="ce89">
            <text:p>Каширская Ольга Борисовна 17.12.1966г.р.</text:p>
          </table:table-cell>
          <table:table-cell office:value-type="string" table:style-name="ce90">
            <text:p>Договор №980-З-09</text:p>
          </table:table-cell>
          <table:table-cell office:value-type="string" table:style-name="ce91">
            <text:p>02.03.2026</text:p>
          </table:table-cell>
          <table:table-cell office:value-type="float" office:value="580.5" table:style-name="ce92">
            <text:p>580,50</text:p>
          </table:table-cell>
          <table:table-cell office:value-type="float" office:value="580.5" table:style-name="ce92">
            <text:p>580,5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580.5" table:style-name="ce92">
            <text:p>580,5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3" table:style-name="ce88">
            <text:p>23</text:p>
          </table:table-cell>
          <table:table-cell office:value-type="string" table:style-name="ce89">
            <text:p>Керечанина Людмила Васильевна 19.01.1958г.р.</text:p>
          </table:table-cell>
          <table:table-cell office:value-type="string" table:style-name="ce90">
            <text:p>Договор №956-З-09</text:p>
          </table:table-cell>
          <table:table-cell office:value-type="string" table:style-name="ce91">
            <text:p>09.02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4" table:style-name="ce88">
            <text:p>24</text:p>
          </table:table-cell>
          <table:table-cell office:value-type="string" table:style-name="ce89">
            <text:p>Кобызева Людмила Николаевна 12.02.1940г.р.</text:p>
          </table:table-cell>
          <table:table-cell office:value-type="string" table:style-name="ce90">
            <text:p>Договор №997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5" table:style-name="ce88">
            <text:p>25</text:p>
          </table:table-cell>
          <table:table-cell office:value-type="string" table:style-name="ce89">
            <text:p>Козлова Валентина Ильинична 12.01.1941г.р.</text:p>
          </table:table-cell>
          <table:table-cell office:value-type="string" table:style-name="ce90">
            <text:p>Договор №415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6" table:style-name="ce88">
            <text:p>26</text:p>
          </table:table-cell>
          <table:table-cell office:value-type="string" table:style-name="ce89">
            <text:p>Кондракова Людмила Анатольевна 05.08.1947г.р.</text:p>
          </table:table-cell>
          <table:table-cell office:value-type="string" table:style-name="ce90">
            <text:p>Договор №163-З-09</text:p>
          </table:table-cell>
          <table:table-cell office:value-type="string" table:style-name="ce91">
            <text:p>09.02.2026</text:p>
          </table:table-cell>
          <table:table-cell office:value-type="float" office:value="33.119999999999997" table:style-name="ce92">
            <text:p>33,12</text:p>
          </table:table-cell>
          <table:table-cell office:value-type="float" office:value="33.119999999999997" table:style-name="ce92">
            <text:p>33,1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33.119999999999997" table:style-name="ce92">
            <text:p>33,1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7" table:style-name="ce88">
            <text:p>27</text:p>
          </table:table-cell>
          <table:table-cell office:value-type="string" table:style-name="ce89">
            <text:p>Конушина Людмила Васильевна 28.09.1945г.р.</text:p>
          </table:table-cell>
          <table:table-cell office:value-type="string" table:style-name="ce90">
            <text:p>Договор №472-З-09</text:p>
          </table:table-cell>
          <table:table-cell office:value-type="string" table:style-name="ce91">
            <text:p>09.02.2026</text:p>
          </table:table-cell>
          <table:table-cell office:value-type="float" office:value="1492.2" table:style-name="ce92">
            <text:p>1 492,20</text:p>
          </table:table-cell>
          <table:table-cell office:value-type="float" office:value="1492.2" table:style-name="ce92">
            <text:p>1 492,2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492.2" table:style-name="ce92">
            <text:p>1 492,2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8" table:style-name="ce88">
            <text:p>28</text:p>
          </table:table-cell>
          <table:table-cell office:value-type="string" table:style-name="ce89">
            <text:p>Копотев Леонид Иванович 12.01.1950г.р.</text:p>
          </table:table-cell>
          <table:table-cell office:value-type="string" table:style-name="ce90">
            <text:p>Договор №64-З-09-Д</text:p>
          </table:table-cell>
          <table:table-cell office:value-type="string" table:style-name="ce91">
            <text:p>09.02.2026</text:p>
          </table:table-cell>
          <table:table-cell office:value-type="float" office:value="276.02" table:style-name="ce92">
            <text:p>276,02</text:p>
          </table:table-cell>
          <table:table-cell office:value-type="float" office:value="276.02" table:style-name="ce92">
            <text:p>276,0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76.02" table:style-name="ce92">
            <text:p>276,0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29" table:style-name="ce88">
            <text:p>29</text:p>
          </table:table-cell>
          <table:table-cell office:value-type="string" table:style-name="ce89">
            <text:p>Котлова Валентина Яковлевна 19.08.1946г.р.</text:p>
          </table:table-cell>
          <table:table-cell office:value-type="string" table:style-name="ce90">
            <text:p>Договор №452-З-09</text:p>
          </table:table-cell>
          <table:table-cell office:value-type="string" table:style-name="ce91">
            <text:p>09.02.2026</text:p>
          </table:table-cell>
          <table:table-cell office:value-type="float" office:value="684.52" table:style-name="ce92">
            <text:p>684,52</text:p>
          </table:table-cell>
          <table:table-cell office:value-type="float" office:value="684.52" table:style-name="ce92">
            <text:p>684,5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684.52" table:style-name="ce92">
            <text:p>684,5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0" table:style-name="ce88">
            <text:p>30</text:p>
          </table:table-cell>
          <table:table-cell office:value-type="string" table:style-name="ce89">
            <text:p>Крапотухина Лидия Григорьевна 31.12.1938г.р.</text:p>
          </table:table-cell>
          <table:table-cell office:value-type="string" table:style-name="ce90">
            <text:p>Договор №960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1" table:style-name="ce88">
            <text:p>31</text:p>
          </table:table-cell>
          <table:table-cell office:value-type="string" table:style-name="ce89">
            <text:p>Крисак Тамара Борисовна 12.03.1938г.р.</text:p>
          </table:table-cell>
          <table:table-cell office:value-type="string" table:style-name="ce90">
            <text:p>Договор №412-З-09</text:p>
          </table:table-cell>
          <table:table-cell office:value-type="string" table:style-name="ce91">
            <text:p>09.02.2026</text:p>
          </table:table-cell>
          <table:table-cell office:value-type="float" office:value="551.91999999999996" table:style-name="ce92">
            <text:p>551,92</text:p>
          </table:table-cell>
          <table:table-cell office:value-type="float" office:value="551.91999999999996" table:style-name="ce92">
            <text:p>551,9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551.91999999999996" table:style-name="ce92">
            <text:p>551,9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2" table:style-name="ce88">
            <text:p>32</text:p>
          </table:table-cell>
          <table:table-cell office:value-type="string" table:style-name="ce89">
            <text:p>Кукушкина Мария Михайловна 28.06.1949г.р.</text:p>
          </table:table-cell>
          <table:table-cell office:value-type="string" table:style-name="ce90">
            <text:p>Договор №190-З-09</text:p>
          </table:table-cell>
          <table:table-cell office:value-type="string" table:style-name="ce91">
            <text:p>09.02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3" table:style-name="ce88">
            <text:p>33</text:p>
          </table:table-cell>
          <table:table-cell office:value-type="string" table:style-name="ce89">
            <text:p>Курчавова Лидия Андреевна 02.08.1940г.р.</text:p>
          </table:table-cell>
          <table:table-cell office:value-type="string" table:style-name="ce90">
            <text:p>Договор №228-З-09</text:p>
          </table:table-cell>
          <table:table-cell office:value-type="string" table:style-name="ce91">
            <text:p>09.02.2026</text:p>
          </table:table-cell>
          <table:table-cell office:value-type="float" office:value="663.6" table:style-name="ce92">
            <text:p>663,60</text:p>
          </table:table-cell>
          <table:table-cell office:value-type="float" office:value="663.6" table:style-name="ce92">
            <text:p>663,6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663.6" table:style-name="ce92">
            <text:p>663,6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4" table:style-name="ce88">
            <text:p>34</text:p>
          </table:table-cell>
          <table:table-cell office:value-type="string" table:style-name="ce89">
            <text:p>Кусакина Раиса Дмитриевна 30.09.1946г.р.</text:p>
          </table:table-cell>
          <table:table-cell office:value-type="string" table:style-name="ce90">
            <text:p>Договор №198-З-09</text:p>
          </table:table-cell>
          <table:table-cell office:value-type="string" table:style-name="ce91">
            <text:p>04.05.2026</text:p>
          </table:table-cell>
          <table:table-cell office:value-type="float" office:value="2484.15" table:style-name="ce92">
            <text:p>2 484,15</text:p>
          </table:table-cell>
          <table:table-cell office:value-type="float" office:value="2484.15" table:style-name="ce92">
            <text:p>2 484,15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484.15" table:style-name="ce92">
            <text:p>2 484,15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5" table:style-name="ce88">
            <text:p>35</text:p>
          </table:table-cell>
          <table:table-cell office:value-type="string" table:style-name="ce89">
            <text:p>Кучкина Надежда Семеновна 25.04.1950г.р.</text:p>
          </table:table-cell>
          <table:table-cell office:value-type="string" table:style-name="ce90">
            <text:p>Договор №314-З-09</text:p>
          </table:table-cell>
          <table:table-cell office:value-type="string" table:style-name="ce91">
            <text:p>09.02.2026</text:p>
          </table:table-cell>
          <table:table-cell office:value-type="float" office:value="1713.6" table:style-name="ce92">
            <text:p>1 713,60</text:p>
          </table:table-cell>
          <table:table-cell office:value-type="float" office:value="1713.6" table:style-name="ce92">
            <text:p>1 713,6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713.6" table:style-name="ce92">
            <text:p>1 713,6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6" table:style-name="ce88">
            <text:p>36</text:p>
          </table:table-cell>
          <table:table-cell office:value-type="string" table:style-name="ce89">
            <text:p>Ляпина Мария Федоровна 04.11.1934г.р.</text:p>
          </table:table-cell>
          <table:table-cell office:value-type="string" table:style-name="ce90">
            <text:p>Договор №160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7" table:style-name="ce88">
            <text:p>37</text:p>
          </table:table-cell>
          <table:table-cell office:value-type="string" table:style-name="ce89">
            <text:p>Мартирова Галина Петровна 16.08.1943г.р.</text:p>
          </table:table-cell>
          <table:table-cell office:value-type="string" table:style-name="ce90">
            <text:p>Договор №510-З-09</text:p>
          </table:table-cell>
          <table:table-cell office:value-type="string" table:style-name="ce91">
            <text:p>09.02.2026</text:p>
          </table:table-cell>
          <table:table-cell office:value-type="float" office:value="220.78" table:style-name="ce92">
            <text:p>220,78</text:p>
          </table:table-cell>
          <table:table-cell office:value-type="float" office:value="220.78" table:style-name="ce92">
            <text:p>220,7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0.78" table:style-name="ce92">
            <text:p>220,7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8" table:style-name="ce88">
            <text:p>38</text:p>
          </table:table-cell>
          <table:table-cell office:value-type="string" table:style-name="ce89">
            <text:p>Муругова Таисия Дмитриевна 01.10.1940г.р.</text:p>
          </table:table-cell>
          <table:table-cell office:value-type="string" table:style-name="ce90">
            <text:p>Договор №737-З-09</text:p>
          </table:table-cell>
          <table:table-cell office:value-type="string" table:style-name="ce91">
            <text:p>09.02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39" table:style-name="ce88">
            <text:p>39</text:p>
          </table:table-cell>
          <table:table-cell office:value-type="string" table:style-name="ce89">
            <text:p>Мухортова Мария Ивановна 15.02.1941г.р.</text:p>
          </table:table-cell>
          <table:table-cell office:value-type="string" table:style-name="ce90">
            <text:p>Договор №1014-З-09</text:p>
          </table:table-cell>
          <table:table-cell office:value-type="string" table:style-name="ce91">
            <text:p>09.02.2026</text:p>
          </table:table-cell>
          <table:table-cell office:value-type="float" office:value="1514.32" table:style-name="ce92">
            <text:p>1 514,32</text:p>
          </table:table-cell>
          <table:table-cell office:value-type="float" office:value="1514.32" table:style-name="ce92">
            <text:p>1 514,3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514.32" table:style-name="ce92">
            <text:p>1 514,3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0" table:style-name="ce88">
            <text:p>40</text:p>
          </table:table-cell>
          <table:table-cell office:value-type="string" table:style-name="ce89">
            <text:p>Наумова Галина Петровна 15.06.1948г.р.</text:p>
          </table:table-cell>
          <table:table-cell office:value-type="string" table:style-name="ce90">
            <text:p>Договор №738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1" table:style-name="ce88">
            <text:p>41</text:p>
          </table:table-cell>
          <table:table-cell office:value-type="string" table:style-name="ce89">
            <text:p>Новикова Галина Александровна 15.09.1950г.р.</text:p>
          </table:table-cell>
          <table:table-cell office:value-type="string" table:style-name="ce90">
            <text:p>Договор №495-З-09</text:p>
          </table:table-cell>
          <table:table-cell office:value-type="string" table:style-name="ce91">
            <text:p>09.02.2026</text:p>
          </table:table-cell>
          <table:table-cell office:value-type="float" office:value="331.19" table:style-name="ce92">
            <text:p>331,19</text:p>
          </table:table-cell>
          <table:table-cell office:value-type="float" office:value="331.19" table:style-name="ce92">
            <text:p>331,19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331.19" table:style-name="ce92">
            <text:p>331,19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2" table:style-name="ce88">
            <text:p>42</text:p>
          </table:table-cell>
          <table:table-cell office:value-type="string" table:style-name="ce89">
            <text:p>Орешина Эльвира Александровна 06.09.1945г.р.</text:p>
          </table:table-cell>
          <table:table-cell office:value-type="string" table:style-name="ce90">
            <text:p>Договор №539-З-09</text:p>
          </table:table-cell>
          <table:table-cell office:value-type="string" table:style-name="ce91">
            <text:p>09.02.2026</text:p>
          </table:table-cell>
          <table:table-cell office:value-type="float" office:value="772.78" table:style-name="ce92">
            <text:p>772,78</text:p>
          </table:table-cell>
          <table:table-cell office:value-type="float" office:value="772.78" table:style-name="ce92">
            <text:p>772,7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772.78" table:style-name="ce92">
            <text:p>772,7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3" table:style-name="ce88">
            <text:p>43</text:p>
          </table:table-cell>
          <table:table-cell office:value-type="string" table:style-name="ce89">
            <text:p>Павлова Лидия Николаевна 01.03.1937г.р.</text:p>
          </table:table-cell>
          <table:table-cell office:value-type="string" table:style-name="ce90">
            <text:p>Договор №746-З-09</text:p>
          </table:table-cell>
          <table:table-cell office:value-type="string" table:style-name="ce91">
            <text:p>09.02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4" table:style-name="ce88">
            <text:p>44</text:p>
          </table:table-cell>
          <table:table-cell office:value-type="string" table:style-name="ce89">
            <text:p>Паникар Наталия Павловна 08.05.1950г.р.</text:p>
          </table:table-cell>
          <table:table-cell office:value-type="string" table:style-name="ce90">
            <text:p>Договор №1019-З-09</text:p>
          </table:table-cell>
          <table:table-cell office:value-type="string" table:style-name="ce91">
            <text:p>09.02.2026</text:p>
          </table:table-cell>
          <table:table-cell office:value-type="float" office:value="1514.32" table:style-name="ce92">
            <text:p>1 514,32</text:p>
          </table:table-cell>
          <table:table-cell office:value-type="float" office:value="1514.32" table:style-name="ce92">
            <text:p>1 514,3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514.32" table:style-name="ce92">
            <text:p>1 514,3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5" table:style-name="ce88">
            <text:p>45</text:p>
          </table:table-cell>
          <table:table-cell office:value-type="string" table:style-name="ce89">
            <text:p>Печенкин Анатолий Иванович 11.03.1947г.р.</text:p>
          </table:table-cell>
          <table:table-cell office:value-type="string" table:style-name="ce90">
            <text:p>Договор №67-З-09-Д</text:p>
          </table:table-cell>
          <table:table-cell office:value-type="string" table:style-name="ce91">
            <text:p>09.02.2026</text:p>
          </table:table-cell>
          <table:table-cell office:value-type="float" office:value="1048.78" table:style-name="ce92">
            <text:p>1 048,78</text:p>
          </table:table-cell>
          <table:table-cell office:value-type="float" office:value="1048.78" table:style-name="ce92">
            <text:p>1 048,7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048.78" table:style-name="ce92">
            <text:p>1 048,7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6" table:style-name="ce88">
            <text:p>46</text:p>
          </table:table-cell>
          <table:table-cell office:value-type="string" table:style-name="ce89">
            <text:p>Полякова Тамара Петровна 09.07.1940г.р.</text:p>
          </table:table-cell>
          <table:table-cell office:value-type="string" table:style-name="ce90">
            <text:p>Договор №964-З-09</text:p>
          </table:table-cell>
          <table:table-cell office:value-type="string" table:style-name="ce91">
            <text:p>09.02.2026</text:p>
          </table:table-cell>
          <table:table-cell office:value-type="float" office:value="2189.96" table:style-name="ce92">
            <text:p>2 189,96</text:p>
          </table:table-cell>
          <table:table-cell office:value-type="float" office:value="2189.96" table:style-name="ce92">
            <text:p>2 189,96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189.96" table:style-name="ce92">
            <text:p>2 189,96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7" table:style-name="ce88">
            <text:p>47</text:p>
          </table:table-cell>
          <table:table-cell office:value-type="string" table:style-name="ce89">
            <text:p>Прокофьев Анатолий Петрович 01.01.1952г.р.</text:p>
          </table:table-cell>
          <table:table-cell office:value-type="string" table:style-name="ce90">
            <text:p>Договор №70-З-09-Д</text:p>
          </table:table-cell>
          <table:table-cell office:value-type="string" table:style-name="ce91">
            <text:p>09.02.2026</text:p>
          </table:table-cell>
          <table:table-cell office:value-type="float" office:value="2152.7600000000002" table:style-name="ce92">
            <text:p>2 152,76</text:p>
          </table:table-cell>
          <table:table-cell office:value-type="float" office:value="2152.7600000000002" table:style-name="ce92">
            <text:p>2 152,76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152.7600000000002" table:style-name="ce92">
            <text:p>2 152,76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8" table:style-name="ce88">
            <text:p>48</text:p>
          </table:table-cell>
          <table:table-cell office:value-type="string" table:style-name="ce89">
            <text:p>Пудовкин Николай Петрович 24.02.1948г.р.</text:p>
          </table:table-cell>
          <table:table-cell office:value-type="string" table:style-name="ce90">
            <text:p>Договор №703-З-09</text:p>
          </table:table-cell>
          <table:table-cell office:value-type="string" table:style-name="ce91">
            <text:p>02.03.2026</text:p>
          </table:table-cell>
          <table:table-cell office:value-type="float" office:value="27.59" table:style-name="ce92">
            <text:p>27,59</text:p>
          </table:table-cell>
          <table:table-cell office:value-type="float" office:value="27.59" table:style-name="ce92">
            <text:p>27,59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7.59" table:style-name="ce92">
            <text:p>27,59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49" table:style-name="ce88">
            <text:p>49</text:p>
          </table:table-cell>
          <table:table-cell office:value-type="string" table:style-name="ce89">
            <text:p>Пчелинцева Раиса Алексеевна 15.06.1946г.р.</text:p>
          </table:table-cell>
          <table:table-cell office:value-type="string" table:style-name="ce90">
            <text:p>Договор №208-З-09</text:p>
          </table:table-cell>
          <table:table-cell office:value-type="string" table:style-name="ce91">
            <text:p>02.03.2026</text:p>
          </table:table-cell>
          <table:table-cell office:value-type="float" office:value="44.16" table:style-name="ce92">
            <text:p>44,16</text:p>
          </table:table-cell>
          <table:table-cell office:value-type="float" office:value="44.16" table:style-name="ce92">
            <text:p>44,16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44.16" table:style-name="ce92">
            <text:p>44,16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0" table:style-name="ce88">
            <text:p>50</text:p>
          </table:table-cell>
          <table:table-cell office:value-type="string" table:style-name="ce89">
            <text:p>Резник Елена Владимировна 14.09.1940г.р.</text:p>
          </table:table-cell>
          <table:table-cell office:value-type="string" table:style-name="ce90">
            <text:p>Договор №440-З-09</text:p>
          </table:table-cell>
          <table:table-cell office:value-type="string" table:style-name="ce91">
            <text:p>04.05.2026</text:p>
          </table:table-cell>
          <table:table-cell office:value-type="float" office:value="27.59" table:style-name="ce92">
            <text:p>27,59</text:p>
          </table:table-cell>
          <table:table-cell office:value-type="float" office:value="27.59" table:style-name="ce92">
            <text:p>27,59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7.59" table:style-name="ce92">
            <text:p>27,59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1" table:style-name="ce88">
            <text:p>51</text:p>
          </table:table-cell>
          <table:table-cell office:value-type="string" table:style-name="ce89">
            <text:p>Репкина Валентина Александровна 26.05.1949г.р.</text:p>
          </table:table-cell>
          <table:table-cell office:value-type="string" table:style-name="ce90">
            <text:p>Договор №68-З-09-Д</text:p>
          </table:table-cell>
          <table:table-cell office:value-type="string" table:style-name="ce91">
            <text:p>09.02.2026</text:p>
          </table:table-cell>
          <table:table-cell office:value-type="float" office:value="745.04" table:style-name="ce92">
            <text:p>745,04</text:p>
          </table:table-cell>
          <table:table-cell office:value-type="float" office:value="745.04" table:style-name="ce92">
            <text:p>745,04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745.04" table:style-name="ce92">
            <text:p>745,04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2" table:style-name="ce88">
            <text:p>52</text:p>
          </table:table-cell>
          <table:table-cell office:value-type="string" table:style-name="ce89">
            <text:p>Рыжикова Надежда Владимировна 03.08.1957г.р.</text:p>
          </table:table-cell>
          <table:table-cell office:value-type="string" table:style-name="ce90">
            <text:p>Договор №749-З-09</text:p>
          </table:table-cell>
          <table:table-cell office:value-type="string" table:style-name="ce91">
            <text:p>09.02.2026</text:p>
          </table:table-cell>
          <table:table-cell office:value-type="float" office:value="1960.43" table:style-name="ce92">
            <text:p>1 960,43</text:p>
          </table:table-cell>
          <table:table-cell office:value-type="float" office:value="1960.43" table:style-name="ce92">
            <text:p>1 960,43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960.43" table:style-name="ce92">
            <text:p>1 960,43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3" table:style-name="ce88">
            <text:p>53</text:p>
          </table:table-cell>
          <table:table-cell office:value-type="string" table:style-name="ce89">
            <text:p>Рябихин Виктор Андреевич 29.06.1954г.р.</text:p>
          </table:table-cell>
          <table:table-cell office:value-type="string" table:style-name="ce90">
            <text:p>Договор №65-З-09-Д</text:p>
          </table:table-cell>
          <table:table-cell office:value-type="string" table:style-name="ce91">
            <text:p>09.02.2026</text:p>
          </table:table-cell>
          <table:table-cell office:value-type="float" office:value="1242.0899999999999" table:style-name="ce92">
            <text:p>1 242,09</text:p>
          </table:table-cell>
          <table:table-cell office:value-type="float" office:value="1242.0899999999999" table:style-name="ce92">
            <text:p>1 242,09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242.0899999999999" table:style-name="ce92">
            <text:p>1 242,09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4" table:style-name="ce88">
            <text:p>54</text:p>
          </table:table-cell>
          <table:table-cell office:value-type="string" table:style-name="ce89">
            <text:p>Рязанцева Валентина Васильевна 27.07.1938г.р.</text:p>
          </table:table-cell>
          <table:table-cell office:value-type="string" table:style-name="ce90">
            <text:p>Договор №334-З-09</text:p>
          </table:table-cell>
          <table:table-cell office:value-type="string" table:style-name="ce91">
            <text:p>09.02.2026</text:p>
          </table:table-cell>
          <table:table-cell office:value-type="float" office:value="132.47999999999999" table:style-name="ce92">
            <text:p>132,48</text:p>
          </table:table-cell>
          <table:table-cell office:value-type="float" office:value="132.47999999999999" table:style-name="ce92">
            <text:p>132,4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32.47999999999999" table:style-name="ce92">
            <text:p>132,4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5" table:style-name="ce88">
            <text:p>55</text:p>
          </table:table-cell>
          <table:table-cell office:value-type="string" table:style-name="ce89">
            <text:p>Селиверстов Александр Александрович 01.01.1981г.р.</text:p>
          </table:table-cell>
          <table:table-cell office:value-type="string" table:style-name="ce90">
            <text:p>Договор №66-З-09-Д</text:p>
          </table:table-cell>
          <table:table-cell office:value-type="string" table:style-name="ce91">
            <text:p>09.02.2026</text:p>
          </table:table-cell>
          <table:table-cell office:value-type="float" office:value="2816.44" table:style-name="ce92">
            <text:p>2 816,44</text:p>
          </table:table-cell>
          <table:table-cell office:value-type="float" office:value="2816.44" table:style-name="ce92">
            <text:p>2 816,44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816.44" table:style-name="ce92">
            <text:p>2 816,44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6" table:style-name="ce88">
            <text:p>56</text:p>
          </table:table-cell>
          <table:table-cell office:value-type="string" table:style-name="ce89">
            <text:p>Селиверстова Галина Владимировна 24.09.1953г.р.</text:p>
          </table:table-cell>
          <table:table-cell office:value-type="string" table:style-name="ce90">
            <text:p>Договор №880-З-09</text:p>
          </table:table-cell>
          <table:table-cell office:value-type="string" table:style-name="ce91">
            <text:p>01.04.2026</text:p>
          </table:table-cell>
          <table:table-cell office:value-type="float" office:value="110.6" table:style-name="ce92">
            <text:p>110,60</text:p>
          </table:table-cell>
          <table:table-cell office:value-type="float" office:value="110.6" table:style-name="ce92">
            <text:p>110,6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10.6" table:style-name="ce92">
            <text:p>110,6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7" table:style-name="ce88">
            <text:p>57</text:p>
          </table:table-cell>
          <table:table-cell office:value-type="string" table:style-name="ce89">
            <text:p>Сергеев Вячеслав Николаевич 04.04.1957г.р.</text:p>
          </table:table-cell>
          <table:table-cell office:value-type="string" table:style-name="ce90">
            <text:p>Договор №1026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8" table:style-name="ce88">
            <text:p>58</text:p>
          </table:table-cell>
          <table:table-cell office:value-type="string" table:style-name="ce89">
            <text:p>Сикаренко Александра Александровна 07.03.1945г.р.</text:p>
          </table:table-cell>
          <table:table-cell office:value-type="string" table:style-name="ce90">
            <text:p>Договор №438-З-09</text:p>
          </table:table-cell>
          <table:table-cell office:value-type="string" table:style-name="ce91">
            <text:p>04.05.2026</text:p>
          </table:table-cell>
          <table:table-cell office:value-type="float" office:value="276.5" table:style-name="ce92">
            <text:p>276,50</text:p>
          </table:table-cell>
          <table:table-cell office:value-type="float" office:value="276.5" table:style-name="ce92">
            <text:p>276,5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76.5" table:style-name="ce92">
            <text:p>276,5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59" table:style-name="ce88">
            <text:p>59</text:p>
          </table:table-cell>
          <table:table-cell office:value-type="string" table:style-name="ce89">
            <text:p>Ситчихина Наталья Александровна 02.01.1954г.р.</text:p>
          </table:table-cell>
          <table:table-cell office:value-type="string" table:style-name="ce90">
            <text:p>Договор №299-З-09</text:p>
          </table:table-cell>
          <table:table-cell office:value-type="string" table:style-name="ce91">
            <text:p>01.04.2026</text:p>
          </table:table-cell>
          <table:table-cell office:value-type="float" office:value="1050.5999999999999" table:style-name="ce92">
            <text:p>1 050,60</text:p>
          </table:table-cell>
          <table:table-cell office:value-type="float" office:value="1050.5999999999999" table:style-name="ce92">
            <text:p>1 050,6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050.5999999999999" table:style-name="ce92">
            <text:p>1 050,6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0" table:style-name="ce88">
            <text:p>60</text:p>
          </table:table-cell>
          <table:table-cell office:value-type="string" table:style-name="ce89">
            <text:p>Степанова Виктория Викторовна 04.04.1964г.р.</text:p>
          </table:table-cell>
          <table:table-cell office:value-type="string" table:style-name="ce90">
            <text:p>Договор №967-З-09</text:p>
          </table:table-cell>
          <table:table-cell office:value-type="string" table:style-name="ce91">
            <text:p>02.03.2026</text:p>
          </table:table-cell>
          <table:table-cell office:value-type="float" office:value="22.08" table:style-name="ce92">
            <text:p>22,08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2.08" table:style-name="ce92">
            <text:p>22,08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1" table:style-name="ce88">
            <text:p>61</text:p>
          </table:table-cell>
          <table:table-cell office:value-type="string" table:style-name="ce89">
            <text:p>Ступина Любовь Борисовна 05.07.1943г.р.</text:p>
          </table:table-cell>
          <table:table-cell office:value-type="string" table:style-name="ce90">
            <text:p>Договор №753-З-09</text:p>
          </table:table-cell>
          <table:table-cell office:value-type="string" table:style-name="ce91">
            <text:p>04.05.2026</text:p>
          </table:table-cell>
          <table:table-cell office:value-type="float" office:value="66.239999999999995" table:style-name="ce92">
            <text:p>66,24</text:p>
          </table:table-cell>
          <table:table-cell office:value-type="float" office:value="66.239999999999995" table:style-name="ce92">
            <text:p>66,24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66.239999999999995" table:style-name="ce92">
            <text:p>66,24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2" table:style-name="ce88">
            <text:p>62</text:p>
          </table:table-cell>
          <table:table-cell office:value-type="string" table:style-name="ce89">
            <text:p>Суркова Людмила Федоровна 08.01.1952г.р.</text:p>
          </table:table-cell>
          <table:table-cell office:value-type="string" table:style-name="ce90">
            <text:p>Договор №105-З-09-Д</text:p>
          </table:table-cell>
          <table:table-cell office:value-type="string" table:style-name="ce91">
            <text:p>04.05.2026</text:p>
          </table:table-cell>
          <table:table-cell office:value-type="float" office:value="138.01" table:style-name="ce92">
            <text:p>138,01</text:p>
          </table:table-cell>
          <table:table-cell office:value-type="float" office:value="138.01" table:style-name="ce92">
            <text:p>138,01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38.01" table:style-name="ce92">
            <text:p>138,01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3" table:style-name="ce88">
            <text:p>63</text:p>
          </table:table-cell>
          <table:table-cell office:value-type="string" table:style-name="ce89">
            <text:p>Терентьева Валентина Алексеевна 04.09.1952г.р.</text:p>
          </table:table-cell>
          <table:table-cell office:value-type="string" table:style-name="ce90">
            <text:p>Договор №679-З-09</text:p>
          </table:table-cell>
          <table:table-cell office:value-type="string" table:style-name="ce91">
            <text:p>09.02.2026</text:p>
          </table:table-cell>
          <table:table-cell office:value-type="float" office:value="1008" table:style-name="ce92">
            <text:p>1 008,00</text:p>
          </table:table-cell>
          <table:table-cell office:value-type="float" office:value="1008" table:style-name="ce92">
            <text:p>1 008,0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008" table:style-name="ce92">
            <text:p>1 008,0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4" table:style-name="ce88">
            <text:p>64</text:p>
          </table:table-cell>
          <table:table-cell office:value-type="string" table:style-name="ce89">
            <text:p>Филатова Галина Александровна 19.11.1952г.р.</text:p>
          </table:table-cell>
          <table:table-cell office:value-type="string" table:style-name="ce90">
            <text:p>Договор №163-З-09</text:p>
          </table:table-cell>
          <table:table-cell office:value-type="string" table:style-name="ce91">
            <text:p>02.03.2026</text:p>
          </table:table-cell>
          <table:table-cell office:value-type="float" office:value="331.8" table:style-name="ce92">
            <text:p>331,80</text:p>
          </table:table-cell>
          <table:table-cell office:value-type="float" office:value="331.8" table:style-name="ce92">
            <text:p>331,80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331.8" table:style-name="ce92">
            <text:p>331,80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5" table:style-name="ce88">
            <text:p>65</text:p>
          </table:table-cell>
          <table:table-cell office:value-type="string" table:style-name="ce89">
            <text:p>Халиулин Виктор Хуснулович 19.01.1938г.р.</text:p>
          </table:table-cell>
          <table:table-cell office:value-type="string" table:style-name="ce90">
            <text:p>Договор №85-З-09-Д</text:p>
          </table:table-cell>
          <table:table-cell office:value-type="string" table:style-name="ce91">
            <text:p>02.03.2026</text:p>
          </table:table-cell>
          <table:table-cell office:value-type="float" office:value="496.77" table:style-name="ce92">
            <text:p>496,77</text:p>
          </table:table-cell>
          <table:table-cell office:value-type="float" office:value="496.77" table:style-name="ce92">
            <text:p>496,77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496.77" table:style-name="ce92">
            <text:p>496,77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6" table:style-name="ce88">
            <text:p>66</text:p>
          </table:table-cell>
          <table:table-cell office:value-type="string" table:style-name="ce89">
            <text:p>Хомутов Виктор Сергеевич 01.04.1956г.р.</text:p>
          </table:table-cell>
          <table:table-cell office:value-type="string" table:style-name="ce90">
            <text:p>Договор №363-З-09</text:p>
          </table:table-cell>
          <table:table-cell office:value-type="string" table:style-name="ce91">
            <text:p>09.02.2026</text:p>
          </table:table-cell>
          <table:table-cell office:value-type="float" office:value="745.04" table:style-name="ce92">
            <text:p>745,04</text:p>
          </table:table-cell>
          <table:table-cell office:value-type="float" office:value="745.04" table:style-name="ce92">
            <text:p>745,04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745.04" table:style-name="ce92">
            <text:p>745,04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7" table:style-name="ce88">
            <text:p>67</text:p>
          </table:table-cell>
          <table:table-cell office:value-type="string" table:style-name="ce89">
            <text:p>Шапкарин Александр Владимирович 12.10.1961г.р.</text:p>
          </table:table-cell>
          <table:table-cell office:value-type="string" table:style-name="ce90">
            <text:p>Договор №92-З-09-Д</text:p>
          </table:table-cell>
          <table:table-cell office:value-type="string" table:style-name="ce91">
            <text:p>02.03.2026</text:p>
          </table:table-cell>
          <table:table-cell office:value-type="float" office:value="276.02" table:style-name="ce92">
            <text:p>276,02</text:p>
          </table:table-cell>
          <table:table-cell office:value-type="float" office:value="276.02" table:style-name="ce92">
            <text:p>276,0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76.02" table:style-name="ce92">
            <text:p>276,0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8" table:style-name="ce88">
            <text:p>68</text:p>
          </table:table-cell>
          <table:table-cell office:value-type="string" table:style-name="ce89">
            <text:p>Шафеева Валентина Андреевна 29.03.1949г.р.</text:p>
          </table:table-cell>
          <table:table-cell office:value-type="string" table:style-name="ce90">
            <text:p>Договор №530-З-09</text:p>
          </table:table-cell>
          <table:table-cell office:value-type="string" table:style-name="ce91">
            <text:p>02.03.2026</text:p>
          </table:table-cell>
          <table:table-cell office:value-type="float" office:value="154.56" table:style-name="ce92">
            <text:p>154,56</text:p>
          </table:table-cell>
          <table:table-cell office:value-type="float" office:value="154.56" table:style-name="ce92">
            <text:p>154,56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154.56" table:style-name="ce92">
            <text:p>154,56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69" table:style-name="ce88">
            <text:p>69</text:p>
          </table:table-cell>
          <table:table-cell office:value-type="string" table:style-name="ce89">
            <text:p>Юськив Мария Васильевна 30.07.1948г.р.</text:p>
          </table:table-cell>
          <table:table-cell office:value-type="string" table:style-name="ce90">
            <text:p>Договор №329-З-09</text:p>
          </table:table-cell>
          <table:table-cell office:value-type="string" table:style-name="ce91">
            <text:p>09.02.2026</text:p>
          </table:table-cell>
          <table:table-cell office:value-type="float" office:value="2598.56" table:style-name="ce92">
            <text:p>2 598,56</text:p>
          </table:table-cell>
          <table:table-cell office:value-type="float" office:value="2598.56" table:style-name="ce92">
            <text:p>2 598,56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2598.56" table:style-name="ce92">
            <text:p>2 598,56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float" office:value="70" table:style-name="ce88">
            <text:p>70</text:p>
          </table:table-cell>
          <table:table-cell office:value-type="string" table:style-name="ce89">
            <text:p>Яшина Елена Юрьевна 23.05.1961г.р.</text:p>
          </table:table-cell>
          <table:table-cell office:value-type="string" table:style-name="ce90">
            <text:p>Договор №390-З-09</text:p>
          </table:table-cell>
          <table:table-cell office:value-type="string" table:style-name="ce91">
            <text:p>02.03.2026</text:p>
          </table:table-cell>
          <table:table-cell office:value-type="float" office:value="88.32" table:style-name="ce92">
            <text:p>88,32</text:p>
          </table:table-cell>
          <table:table-cell office:value-type="float" office:value="88.32" table:style-name="ce92">
            <text:p>88,32</text:p>
          </table:table-cell>
          <table:table-cell office:value-type="string" table:style-name="ce93">
            <text:p>Без НДС</text:p>
          </table:table-cell>
          <table:table-cell office:value-type="float" office:value="0" table:style-name="ce94">
            <text:p>0,00</text:p>
          </table:table-cell>
          <table:table-cell office:value-type="float" office:value="88.32" table:style-name="ce92">
            <text:p>88,32</text:p>
          </table:table-cell>
          <table:table-cell office:value-type="string" table:style-name="ce95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string" table:number-columns-spanned="2" table:number-rows-spanned="1" table:style-name="ce106">
            <text:p>ИТОГО:</text:p>
          </table:table-cell>
          <table:covered-table-cell/>
          <table:table-cell table:number-columns-repeated="2" table:style-name="ce93"/>
          <table:table-cell office:value-type="float" office:value="44916.39" table:style-name="ce96">
            <text:p>44916,39</text:p>
          </table:table-cell>
          <table:table-cell office:value-type="float" office:value="44916.39" table:style-name="ce96">
            <text:p>44916,39</text:p>
          </table:table-cell>
          <table:table-cell table:style-name="ce97"/>
          <table:table-cell table:style-name="ce98"/>
          <table:table-cell office:value-type="float" office:value="44916.39" table:style-name="ce96">
            <text:p>44916,39</text:p>
          </table:table-cell>
          <table:table-cell table:style-name="ce95"/>
          <table:table-cell table:number-columns-repeated="1013" table:style-name="ce9"/>
          <table:table-cell table:number-columns-repeated="15360"/>
        </table:table-row>
        <table:table-row table:style-name="ro24">
          <table:table-cell/>
          <table:table-cell office:value-type="string" table:number-columns-spanned="10" table:number-rows-spanned="1" table:style-name="ce108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373" table:style-name="ce1"/>
        </table:table-row>
        <table:table-row table:style-name="ro12">
          <table:table-cell/>
          <table:table-cell table:style-name="ce58"/>
          <table:table-cell table:style-name="ce9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373" table:style-name="ce1"/>
        </table:table-row>
        <table:table-row table:style-name="ro25">
          <table:table-cell/>
          <table:table-cell office:value-type="string" table:style-name="ce58">
            <text:p>Кассир ______________________ /__________________/</text:p>
          </table:table-cell>
          <table:table-cell table:style-name="ce9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373" table:style-name="ce1"/>
        </table:table-row>
        <table:table-row table:style-name="ro10">
          <table:table-cell/>
          <table:table-cell table:style-name="ce58"/>
          <table:table-cell table:style-name="ce9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373" table:style-name="ce1"/>
        </table:table-row>
        <table:table-row table:style-name="ro12">
          <table:table-cell/>
          <table:table-cell office:value-type="string" table:style-name="ce58">
            <text:p>Зам. Директора ______________С.В. Конюхова</text:p>
          </table:table-cell>
          <table:table-cell table:style-name="ce9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373" table:style-name="ce1"/>
        </table:table-row>
        <table:table-row table:style-name="ro10">
          <table:table-cell/>
          <table:table-cell table:style-name="ce58"/>
          <table:table-cell table:style-name="ce99"/>
          <table:table-cell table:number-columns-repeated="4" table:style-name="ce60"/>
          <table:table-cell table:style-name="ce61"/>
          <table:table-cell table:number-columns-repeated="2" table:style-name="ce62"/>
          <table:table-cell table:style-name="ce63"/>
          <table:table-cell table:number-columns-repeated="16373" table:style-name="ce1"/>
        </table:table-row>
        <table:table-row table:style-name="ro10">
          <table:table-cell/>
          <table:table-cell office:value-type="string" table:style-name="ce58">
            <text:p>Директор филиала по Заводскому району ______________Е.И. Колесниченко</text:p>
          </table:table-cell>
          <table:table-cell table:style-name="ce99"/>
          <table:table-cell table:number-columns-repeated="4" table:style-name="ce60"/>
          <table:table-cell table:style-name="ce61"/>
          <table:table-cell table:number-columns-repeated="2" table:style-name="ce9"/>
          <table:table-cell table:style-name="ce63"/>
          <table:table-cell table:number-columns-repeated="16373" table:style-name="ce1"/>
        </table:table-row>
        <table:table-row table:number-rows-repeated="9" table:style-name="ro10">
          <table:table-cell table:style-name="ce9"/>
          <table:table-cell table:style-name="ce9"/>
          <table:table-cell table:style-name="ce87"/>
          <table:table-cell table:number-columns-repeated="2" table:style-name="ce62"/>
          <table:table-cell table:style-name="ce9"/>
          <table:table-cell table:style-name="ce100"/>
          <table:table-cell table:number-columns-repeated="3" table:style-name="ce9"/>
          <table:table-cell table:style-name="ce63"/>
          <table:table-cell table:number-columns-repeated="16373" table:style-name="ce9"/>
        </table:table-row>
        <table:table-row table:number-rows-repeated="2" table:style-name="ro10">
          <table:table-cell table:style-name="ce9"/>
          <table:table-cell table:style-name="ce9"/>
          <table:table-cell table:style-name="ce87"/>
          <table:table-cell table:number-columns-repeated="7" table:style-name="ce9"/>
          <table:table-cell table:style-name="ce101"/>
          <table:table-cell table:number-columns-repeated="16373" table:style-name="ce9"/>
        </table:table-row>
        <table:table-row table:number-rows-repeated="8" table:style-name="ro10">
          <table:table-cell table:number-columns-repeated="2" table:style-name="ce9"/>
          <table:table-cell table:style-name="ce87"/>
          <table:table-cell table:number-columns-repeated="7" table:style-name="ce9"/>
          <table:table-cell table:style-name="ce101"/>
          <table:table-cell table:number-columns-repeated="16373" table:style-name="ce9"/>
        </table:table-row>
        <table:table-row table:number-rows-repeated="8" table:style-name="ro10">
          <table:table-cell table:number-columns-repeated="2"/>
          <table:table-cell table:style-name="ce87"/>
          <table:table-cell table:number-columns-repeated="2" table:style-name="ce62"/>
          <table:table-cell table:style-name="ce9"/>
          <table:table-cell table:style-name="ce100"/>
          <table:table-cell table:number-columns-repeated="3" table:style-name="ce9"/>
          <table:table-cell table:style-name="ce63"/>
          <table:table-cell table:number-columns-repeated="16373"/>
        </table:table-row>
        <table:table-row table:number-rows-repeated="7" table:style-name="ro10">
          <table:table-cell table:number-columns-repeated="16384"/>
        </table:table-row>
        <table:table-row table:number-rows-repeated="1048441" table:style-name="ro26">
          <table:table-cell table:number-columns-repeated="16384"/>
        </table:table-row>
      </table:table>
      <table:table table:name="деньги" table:style-name="ta3">
        <table:table-column table:style-name="co2" table:default-cell-style-name="ce19"/>
        <table:table-column table:style-name="co21" table:default-cell-style-name="ce114"/>
        <table:table-column table:style-name="co22" table:default-cell-style-name="ce109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6" table:default-cell-style-name="ce1"/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Барябина Ольга Анатолье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Антонова Ксения Пет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Зубкова Людмила Никола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Илясова Наталия Никола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опотев Леонид Ивано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Яшина Елена Юр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3058.02" table:style-name="ce113">
            <text:p>3058,0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Беспалова Лейла Ильгаро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Жилина Татьяна Геннад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атыш Валентина Алексе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Рязанцева Валентина Васил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Шафеева Валентина Андре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1280.6300000000001" table:style-name="ce113">
            <text:p>1280,6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Бойкова Кристина Юрье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Гусарова Антонина Александ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Прокофьев Анатолий Петро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Селиверстов Александр Александро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Селиверстова Галина Владими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Сергеев Вячеслав Николае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Ситчихина Наталья Александ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Юськив Мария Васил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8773.1200000000008" table:style-name="ce113">
            <text:p>8773,1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Новикова Анна Юрье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Мухортова Мария Иван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Паникар Наталия Павл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3028.64" table:style-name="ce113">
            <text:p>3028,64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Делиу Галина Станиславо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Егунов Евгений Викторо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Ергунева Галина Алексе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отлова Валентина Яковл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рисак Тамара Борис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Новикова Галина Александ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3224.8" table:style-name="ce113">
            <text:p>3224,80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Евстратова Галина Алексее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Волкова Екатерина Александ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Мартирова Галина Пет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242.86" table:style-name="ce113">
            <text:p>242,8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Калинкина Лариса Михайло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Белоусова Галина Васил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Володина Надежда Никола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Орешина Эльвира Александ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Степанова Виктория Викто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Филатова Галина Александ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3235.46" table:style-name="ce113">
            <text:p>3235,4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Коньшина Татьяна Сергее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Архипенко Галина Алексе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рапотухина Лидия Григор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учкина Надежда Семен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Рябихин Виктор Андрее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Шапкарин Александр Владимиро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3275.87" table:style-name="ce113">
            <text:p>3275,87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Кошелева Светлана Александро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Гусева Светлана Михайл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ондракова Людмила Анатол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Ляпина Мария Федо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Пудовкин Николай Петро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193.18" table:style-name="ce113">
            <text:p>193,18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Мнацаканянц Инна Валерье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Геворкян Ромела Максим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аширская Ольга Борис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Наумова Галина Пет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Рыжикова Надежда Владими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2585.09" table:style-name="ce113">
            <text:p>2585,09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Обыденнова Светлана Александро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Владыкина Клавда Степан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Зюлькова Ольга Никола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Пчелинцева Раиса Алексе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Резник Елена Владими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Суркова Людмила Федо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2943.73" table:style-name="ce113">
            <text:p>2943,73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Рудник Татьяна Сергее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еречанина Людмила Васил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урчавова Лидия Андре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Павлова Лидия Никола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Полякова Тамара Пет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Ступина Любовь Борис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2963.96" table:style-name="ce113">
            <text:p>2963,9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Смарунь Татьяна Викторо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Бизяева Валентина Евген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Заломнов Владимир Ивано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усакина Раиса Дмитри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Муругова Таисия Дмитри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2558.66" table:style-name="ce113">
            <text:p>2558,66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Чепенко Юлия Сергее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Бирюкова Екатерина Никола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Горбунова Галина Васил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Гришина Галина Никола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обызева Людмила Никола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озлова Валентина Ильинич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Печенкин Анатолий Ивано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Репкина Валентина Александ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Халиулин Виктор Хуснуло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4008.55" table:style-name="ce113">
            <text:p>4008,55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17">
            <text:p>Чипига Евгения Валерьевна</text:p>
          </table:table-cell>
          <table:covered-table-cell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онушина Людмила Василь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Кукушкина Мария Михайл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Сикаренко Александра Александро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Терентьева Валентина Алексеевна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 table:visibility="collapse">
          <table:table-cell office:value-type="string" table:style-name="ce110">
            <text:p>Д.</text:p>
          </table:table-cell>
          <table:table-cell office:value-type="string" table:style-name="ce111">
            <text:p>Хомутов Виктор Сергеевич</text:p>
          </table:table-cell>
          <table:table-cell table:style-name="ce112"/>
          <table:table-cell table:number-columns-repeated="18" table:style-name="ce44"/>
          <table:table-cell table:number-columns-repeated="992" table:style-name="ce45"/>
          <table:table-cell table:number-columns-repeated="4" table:style-name="ce46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18">
            <text:p>Итого:</text:p>
          </table:table-cell>
          <table:covered-table-cell/>
          <table:table-cell office:value-type="float" office:value="3543.82" table:style-name="ce113">
            <text:p>3543,8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2" table:style-name="ro3">
          <table:table-cell table:style-name="ce19"/>
          <table:table-cell table:style-name="ce114"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table:style-name="ce21"/>
          <table:table-cell table:style-name="ce46"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6" table:style-name="ro3">
          <table:table-cell table:style-name="ce21"/>
          <table:table-cell table:style-name="ce115"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4" table:style-name="ro3">
          <table:table-cell table:style-name="ce19"/>
          <table:table-cell table:style-name="ce114"/>
          <table:table-cell table:style-name="ce109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780" table:style-name="ro3">
          <table:table-cell table:number-columns-repeated="3"/>
          <table:table-cell table:number-columns-repeated="18" table:style-name="ce19"/>
          <table:table-cell table:number-columns-repeated="16363"/>
        </table:table-row>
        <table:table-row table:number-rows-repeated="1047549" table:style-name="ro3">
          <table:table-cell table:number-columns-repeated="16384"/>
        </table:table-row>
        <table:table-row table:number-rows-repeated="7" table:style-name="ro9">
          <table:table-cell table:number-columns-repeated="16384"/>
        </table:table-row>
        <table:table-row table:number-rows-repeated="112" table:style-name="ro3">
          <table:table-cell table:number-columns-repeated="16384"/>
        </table:table-row>
      </table:table>
      <table:table table:name="пересмотр" table:style-name="ta4">
        <table:table-column table:style-name="co2" table:default-cell-style-name="ce44"/>
        <table:table-column table:style-name="co21" table:default-cell-style-name="ce128"/>
        <table:table-column table:style-name="co23" table:default-cell-style-name="ce44"/>
        <table:table-column table:style-name="co24" table:default-cell-style-name="ce119"/>
        <table:table-column table:style-name="co25" table:default-cell-style-name="ce119"/>
        <table:table-column table:style-name="co19" table:default-cell-style-name="ce119"/>
        <table:table-column table:style-name="co26" table:default-cell-style-name="ce120"/>
        <table:table-column table:style-name="co27" table:default-cell-style-name="ce45"/>
        <table:table-column table:style-name="co9" table:number-columns-repeated="18" table:default-cell-style-name="ce45"/>
        <table:table-column table:style-name="co10" table:number-columns-repeated="992" table:default-cell-style-name="ce45"/>
        <table:table-column table:style-name="co10" table:number-columns-repeated="5" table:default-cell-style-name="ce46"/>
        <table:table-column table:style-name="co5" table:default-cell-style-name="ce46"/>
        <table:table-column table:style-name="co5" table:number-columns-repeated="15360" table:default-cell-style-name="ce1"/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Барябина Ольга Анатолье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Антонова Ксения Пет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Зубкова Людмила Никола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Илясова Наталия Никола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Копотев Леонид Ивано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5" table:style-name="ce122">
            <text:p>5</text:p>
          </table:table-cell>
          <table:table-cell office:value-type="string" table:style-name="ce123">
            <text:p>Яшина Елена Юр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Беспалова Лейла Ильгаро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Жилина Татьяна Геннад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Катыш Валентина Алексе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Рязанцева Валентина Васил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Шафеева Валентина Андре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Бойкова Кристина Юрье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Гусарова Антонина Александ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Прокофьев Анатолий Петро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Селиверстов Александр Александро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Селиверстова Галина Владими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5" table:style-name="ce122">
            <text:p>5</text:p>
          </table:table-cell>
          <table:table-cell office:value-type="string" table:style-name="ce123">
            <text:p>Сергеев Вячеслав Николае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6" table:style-name="ce122">
            <text:p>6</text:p>
          </table:table-cell>
          <table:table-cell office:value-type="string" table:style-name="ce123">
            <text:p>Ситчихина Наталья Александ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7" table:style-name="ce122">
            <text:p>7</text:p>
          </table:table-cell>
          <table:table-cell office:value-type="string" table:style-name="ce123">
            <text:p>Юськив Мария Васил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Новикова Анна Юрье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Мухортова Мария Иван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Паникар Наталия Павл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Делиу Галина Станиславо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Егунов Евгений Викторо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Ергунева Галина Алексе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Котлова Валентина Яковл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Крисак Тамара Борис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5" table:style-name="ce122">
            <text:p>5</text:p>
          </table:table-cell>
          <table:table-cell office:value-type="string" table:style-name="ce123">
            <text:p>Новикова Галина Александ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Евстратова Галина Алексее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Волкова Екатерина Александ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Мартирова Галина Пет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Калинкина Лариса Михайло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Белоусова Галина Васил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Володина Надежда Никола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Орешина Эльвира Александ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Степанова Виктория Викто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5" table:style-name="ce122">
            <text:p>5</text:p>
          </table:table-cell>
          <table:table-cell office:value-type="string" table:style-name="ce123">
            <text:p>Филатова Галина Александ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Коньшина Татьяна Сергее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Архипенко Галина Алексе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Крапотухина Лидия Григор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Кучкина Надежда Семен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Рябихин Виктор Андрее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5" table:style-name="ce122">
            <text:p>5</text:p>
          </table:table-cell>
          <table:table-cell office:value-type="string" table:style-name="ce123">
            <text:p>Шапкарин Александр Владимиро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Кошелева Светлана Александро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Гусева Светлана Михайл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Кондракова Людмила Анатол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Ляпина Мария Федо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Пудовкин Николай Петро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Мнацаканянц Инна Валерье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Геворкян Ромела Максим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Каширская Ольга Борис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Наумова Галина Пет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Рыжикова Надежда Владими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Обыденнова Светлана Александро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Владыкина Клавда Степан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Зюлькова Ольга Никола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Пчелинцева Раиса Алексе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Резник Елена Владими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5" table:style-name="ce122">
            <text:p>5</text:p>
          </table:table-cell>
          <table:table-cell office:value-type="string" table:style-name="ce123">
            <text:p>Суркова Людмила Федо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Рудник Татьяна Сергее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Керечанина Людмила Васил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Курчавова Лидия Андре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Павлова Лидия Никола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Полякова Тамара Пет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5" table:style-name="ce122">
            <text:p>5</text:p>
          </table:table-cell>
          <table:table-cell office:value-type="string" table:style-name="ce123">
            <text:p>Ступина Любовь Борис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Смарунь Татьяна Викторо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Бизяева Валентина Евген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Заломнов Владимир Ивано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Кусакина Раиса Дмитри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Муругова Таисия Дмитри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Чепенко Юлия Сергее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Бирюкова Екатерина Никола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Горбунова Галина Васил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Гришина Галина Никола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Кобызева Людмила Никола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5" table:style-name="ce122">
            <text:p>5</text:p>
          </table:table-cell>
          <table:table-cell office:value-type="string" table:style-name="ce123">
            <text:p>Козлова Валентина Ильинич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6" table:style-name="ce122">
            <text:p>6</text:p>
          </table:table-cell>
          <table:table-cell office:value-type="string" table:style-name="ce123">
            <text:p>Печенкин Анатолий Ивано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7" table:style-name="ce122">
            <text:p>7</text:p>
          </table:table-cell>
          <table:table-cell office:value-type="string" table:style-name="ce123">
            <text:p>Репкина Валентина Александ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8" table:style-name="ce122">
            <text:p>8</text:p>
          </table:table-cell>
          <table:table-cell office:value-type="string" table:style-name="ce123">
            <text:p>Халиулин Виктор Хуснуло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6">
          <table:table-cell office:value-type="string" table:number-columns-spanned="2" table:number-rows-spanned="1" table:style-name="ce116">
            <text:p><text:s/>Социальный работник<text:s text:c="4"/></text:p>
          </table:table-cell>
          <table:covered-table-cell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17">
            <text:p>Чипига Евгения Валерьевна</text:p>
          </table:table-cell>
          <table:covered-table-cell/>
          <table:table-cell table:style-name="ce44"/>
          <table:table-cell table:number-columns-repeated="2" table:style-name="ce119"/>
          <table:table-cell table:style-name="ce121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style-name="ro27">
          <table:table-cell office:value-type="float" office:value="1" table:style-name="ce122">
            <text:p>1</text:p>
          </table:table-cell>
          <table:table-cell office:value-type="string" table:style-name="ce123">
            <text:p>Конушина Людмила Василь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2" table:style-name="ce122">
            <text:p>2</text:p>
          </table:table-cell>
          <table:table-cell office:value-type="string" table:style-name="ce123">
            <text:p>Кукушкина Мария Михайл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3" table:style-name="ce122">
            <text:p>3</text:p>
          </table:table-cell>
          <table:table-cell office:value-type="string" table:style-name="ce123">
            <text:p>Сикаренко Александра Александро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4" table:style-name="ce122">
            <text:p>4</text:p>
          </table:table-cell>
          <table:table-cell office:value-type="string" table:style-name="ce123">
            <text:p>Терентьева Валентина Алексеевна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style-name="ro27">
          <table:table-cell office:value-type="float" office:value="5" table:style-name="ce122">
            <text:p>5</text:p>
          </table:table-cell>
          <table:table-cell office:value-type="string" table:style-name="ce123">
            <text:p>Хомутов Виктор Сергеевич</text:p>
          </table:table-cell>
          <table:table-cell table:style-name="ce122"/>
          <table:table-cell table:style-name="ce123"/>
          <table:table-cell office:value-type="string" table:style-name="ce124">
            <text:p/>
          </table:table-cell>
          <table:table-cell office:value-type="string" table:style-name="ce125">
            <text:p/>
          </table:table-cell>
          <table:table-cell table:style-name="ce126"/>
          <table:table-cell table:number-columns-repeated="248" table:style-name="ce127"/>
          <table:table-cell table:number-columns-repeated="16129" table:style-name="ce46"/>
        </table:table-row>
        <table:table-row table:number-rows-repeated="12" table:style-name="ro3">
          <table:table-cell table:style-name="ce44"/>
          <table:table-cell table:style-name="ce128"/>
          <table:table-cell table:style-name="ce44"/>
          <table:table-cell table:number-columns-repeated="3" table:style-name="ce119"/>
          <table:table-cell table:style-name="ce120"/>
          <table:table-cell table:number-columns-repeated="19" table:style-name="ce44"/>
          <table:table-cell table:number-columns-repeated="992" table:style-name="ce45"/>
          <table:table-cell table:number-columns-repeated="15366"/>
        </table:table-row>
        <table:table-row table:number-rows-repeated="770" table:style-name="ro3">
          <table:table-cell table:number-columns-repeated="7"/>
          <table:table-cell table:number-columns-repeated="19" table:style-name="ce44"/>
          <table:table-cell table:number-columns-repeated="16358"/>
        </table:table-row>
        <table:table-row table:number-rows-repeated="1047549" table:style-name="ro3">
          <table:table-cell table:number-columns-repeated="16384"/>
        </table:table-row>
        <table:table-row table:number-rows-repeated="83" table:style-name="ro9">
          <table:table-cell table:number-columns-repeated="16384"/>
        </table:table-row>
        <table:table-row table:number-rows-repeated="62" table:style-name="ro3">
          <table:table-cell table:number-columns-repeated="16384"/>
        </table:table-row>
        <table:named-expressions>
          <table:named-expression table:name="Print_Area" table:expression="of:=[пересмотр.#REF!]" table:base-cell-address="Гос_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.196850393700787in" fo:margin-bottom="0.196850393700787in" fo:margin-left="0in" fo:margin-right="0.196850393700787in" style:print-orientation="portrait" style:print-page-order="ttb" style:first-page-number="continue" style:scale-to="100%" style:table-centering="none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4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User</dc:creator>
    <meta:creation-date>2026-02-11T16:06:54Z</meta:creation-date>
    <dc:date>2026-06-14T21:31:39Z</dc:date>
    <meta:print-date>2026-06-05T11:38:41Z</meta:print-date>
    <meta:editing-cycles>11</meta:editing-cycles>
    <meta:editing-duration>PT42720S</meta:editing-duration>
  </office:meta>
</office:document-meta>
</file>
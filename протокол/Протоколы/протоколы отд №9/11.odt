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2" style:family="paragraph" style:parent-style-name="Standard"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PT Astra Serif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PT Astra Serif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PT Astra Serif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style:font-name="PT Astra Serif" fo:font-size="14pt" style:font-size-asian="14pt" style:font-size-complex="14pt"/>
    </style:style>
    <style:style style:name="P11" style:family="paragraph" style:parent-style-name="Standard" style:list-style-name="L2">
      <style:text-properties style:font-name="PT Astra Serif" fo:font-size="14pt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-asian="Times New Roman" style:font-name-complex="Arial" style:language-complex="ar" style:country-complex="SA"/>
    </style:style>
    <style:style style:name="T3" style:family="text">
      <style:text-properties style:font-name="PT Astra Serif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Протокол № 11</text:p>
      <text:p text:style-name="P3">рабочего совещания отделения социального обслуживания на дому № 9</text:p>
      <text:p text:style-name="P3"><text:s/>от <text:span text:style-name="T4">26</text:span>.11.202<text:span text:style-name="T4">5</text:span> г.</text:p>
      <text:p text:style-name="P3"/>
      <text:p text:style-name="P5"/>
      <text:p text:style-name="P6"><text:s/><text:span text:style-name="T5">Присутствовали:</text:span></text:p>
      <text:list xml:id="list4158716219982600079" text:style-name="L1">
        <text:list-item>
          <text:p text:style-name="P9">Евстратова Г.А.</text:p>
        </text:list-item>
        <text:list-item>
          <text:p text:style-name="P10">Бойкова К.Ю.</text:p>
        </text:list-item>
        <text:list-item>
          <text:p text:style-name="P9">Рудник Т.С. </text:p>
        </text:list-item>
        <text:list-item>
          <text:p text:style-name="P9">Делиу Г.С. </text:p>
        </text:list-item>
        <text:list-item>
          <text:p text:style-name="P9">Булычева И.А.</text:p>
        </text:list-item>
        <text:list-item>
          <text:p text:style-name="P9">Кошелева С.А.</text:p>
        </text:list-item>
        <text:list-item>
          <text:p text:style-name="P9">Коньшина Т.С</text:p>
        </text:list-item>
        <text:list-item>
          <text:p text:style-name="P9">Обыденнова С.А.</text:p>
        </text:list-item>
        <text:list-item>
          <text:p text:style-name="P9">Беспалова Л.И.</text:p>
        </text:list-item>
        <text:list-item>
          <text:p text:style-name="P9">Чепенко Ю.С.</text:p>
        </text:list-item>
        <text:list-item>
          <text:p text:style-name="P9">Мнацаканянц И.В.</text:p>
        </text:list-item>
        <text:list-item>
          <text:p text:style-name="P9">Калинкина Л.М.</text:p>
        </text:list-item>
        <text:list-item>
          <text:p text:style-name="P9">Барябина О.А.</text:p>
        </text:list-item>
        <text:list-item>
          <text:p text:style-name="P12">Чипига Е.В.</text:p>
        </text:list-item>
        <text:list-item>
          <text:p text:style-name="P12">Смарунь Т.В</text:p>
        </text:list-item>
      </text:list>
      <text:p text:style-name="P7"/>
      <text:p text:style-name="P4"/>
      <text:p text:style-name="P3">Повестка дня:</text:p>
      <text:p text:style-name="P4">1. Участие в работе по развитию наставничества с целью приобретения практического опыта работы </text:p>
      <text:p text:style-name="P4">2. Отчет социального работника Чепенко Ю.С.</text:p>
      <text:p text:style-name="P4">3. Разное.</text:p>
      <text:p text:style-name="P4"/>
      <text:list xml:id="list8928817258967006594" text:style-name="L2">
        <text:list-item>
          <text:p text:style-name="P11">По первому вопросу <text:s/>заслушали зав. отд. Шершневу Т.И .</text:p>
          <text:p text:style-name="P13">Решение: принять информацию к сведению.</text:p>
        </text:list-item>
      </text:list>
      <text:p text:style-name="P4"><text:s text:c="6"/>2.По второму вопросу заслушали <text:s/>социального работника Чепенко Ю.С., она ознакомила <text:span text:style-name="T2">с анализом качества ведения актов приемки оказания социальных услуг.</text:span></text:p>
      <text:p text:style-name="P1"><text:span text:style-name="T2">Решение: признать работу соц. работника </text:span><text:span text:style-name="T3">Чепенко Ю.С.</text:span><text:span text:style-name="T2"> - удовлетворительной</text:span></text:p>
      <text:p text:style-name="P4">Разное:</text:p>
      <text:p text:style-name="P4"/>
      <text:p text:style-name="P4">- о правильном заполнении маршрутных листов, </text:p>
      <text:p text:style-name="P4">- о правильном заполнении актов. </text:p>
      <text:p text:style-name="P4">- о прохождении <text:span text:style-name="T1">FL</text:span>/соответствии <text:span text:style-name="T1">c</text:span> графиком/.</text:p>
      <text:p text:style-name="P4"/>
      <text:p text:style-name="P4"/>
      <text:p text:style-name="P2">Зав.отделением №9 <text:s text:c="36"/>Шершнева Т.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7-29T15:16:58.42</dc:date>
    <meta:print-date>2024-04-08T10:54:33.61</meta:print-date>
    <meta:editing-cycles>14</meta:editing-cycles>
    <meta:editing-duration>PT52M34S</meta:editing-duration>
    <meta:generator>OpenOffice/4.1.7$Win32 OpenOffice.org_project/417m1$Build-9800</meta:generator>
    <meta:document-statistic meta:table-count="0" meta:image-count="0" meta:object-count="0" meta:page-count="1" meta:paragraph-count="32" meta:word-count="149" meta:character-count="1024"/>
  </office:meta>
</office:document-meta>
</file>
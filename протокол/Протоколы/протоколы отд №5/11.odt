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WW8Num1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WW8Num1">
      <style:text-properties style:font-name="Times New Roman" fo:font-size="14pt" style:font-size-asian="14pt" style:font-size-complex="14pt"/>
    </style:style>
    <style:style style:name="P15" style:family="paragraph" style:parent-style-name="Standard" style:list-style-name="L2">
      <style:paragraph-properties fo:margin-top="0cm" fo:margin-bottom="0cm" style:snap-to-layout-grid="false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Text_20_body_20_indent" style:list-style-name="L2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name-complex="Times New Roman"/>
    </style:style>
    <style:style style:name="T5" style:family="text">
      <style:text-properties style:font-name-asian="Times New Roman" style:font-name-complex="Times New Roman" style:language-complex="ar" style:country-complex="SA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11</text:p>
      <text:p text:style-name="P1"><text:span text:style-name="T1">рабочего совещания отделения социального обслуживания на дому № 5 от 26</text:span><text:span text:style-name="T3">.11</text:span><text:span text:style-name="T1">.2025</text:span></text:p>
      <text:p text:style-name="P4">Присутствовали:</text:p>
      <text:list xml:id="list7278950136480142576" text:style-name="L1">
        <text:list-item>
          <text:p text:style-name="P11">Клеина Е.В.</text:p>
        </text:list-item>
        <text:list-item>
          <text:p text:style-name="P11">Ерастова М.Ю.</text:p>
        </text:list-item>
        <text:list-item>
          <text:p text:style-name="P11">Кузнецова Н.В.</text:p>
        </text:list-item>
        <text:list-item>
          <text:p text:style-name="P11">Преображенская И.В.</text:p>
        </text:list-item>
        <text:list-item>
          <text:p text:style-name="P11">Серебрякова Е.Е.</text:p>
        </text:list-item>
        <text:list-item>
          <text:p text:style-name="P11">Иванова Е.Г.</text:p>
        </text:list-item>
        <text:list-item>
          <text:p text:style-name="P11">Былинкина О.В.</text:p>
        </text:list-item>
        <text:list-item>
          <text:p text:style-name="P11">Морозова М.А.</text:p>
        </text:list-item>
        <text:list-item>
          <text:p text:style-name="P11">Доронина Ю.Г.</text:p>
        </text:list-item>
        <text:list-item>
          <text:p text:style-name="P11">Хабарова В.В.</text:p>
        </text:list-item>
        <text:list-item>
          <text:p text:style-name="P11">Березуцкая О.С.</text:p>
        </text:list-item>
        <text:list-item>
          <text:p text:style-name="P12">Лапина К.И.</text:p>
        </text:list-item>
        <text:list-item>
          <text:p text:style-name="P12">Козлова Е.А.</text:p>
        </text:list-item>
      </text:list>
      <text:p text:style-name="P4"/>
      <text:p text:style-name="P4">Отсутствующие: Чурикова О.Ю. отпуск.</text:p>
      <text:p text:style-name="P4"/>
      <text:p text:style-name="P7">Повестка дня:</text:p>
      <text:p text:style-name="P3"/>
      <text:p text:style-name="P5"><text:s text:c="14"/></text:p>
      <text:list xml:id="list3895849784662026307" text:style-name="L2">
        <text:list-item>
          <text:list>
            <text:list-item>
              <text:p text:style-name="P15">Социальное обслуживание насиления. Термины и определения(Национальный стандарт РФ).</text:p>
            </text:list-item>
            <text:list-item>
              <text:p text:style-name="P16">Отчет социального работника Морозовой М.А.</text:p>
            </text:list-item>
            <text:list-item>
              <text:p text:style-name="P16">Оформление рабочего пространства.</text:p>
            </text:list-item>
            <text:list-item>
              <text:p text:style-name="P16">Разное</text:p>
            </text:list-item>
          </text:list>
        </text:list-item>
      </text:list>
      <text:p text:style-name="P3"><text:s/></text:p>
      <text:p text:style-name="P3">По первому вопросу <text:s/>заслушали зав. отд. <text:s/>Мишакову И.Г</text:p>
      <text:p text:style-name="P6">Решение: принять информацию к сведению.</text:p>
      <text:p text:style-name="P9"><text:span text:style-name="T6">По второму вопросу заслушали <text:s/></text:span><text:span text:style-name="T7">соц. работника Морозову М.А.</text:span></text:p>
      <text:p text:style-name="P8">Решение: признать работу соц. работника Морозовой М.А.- удовлетворительной</text:p>
      <text:p text:style-name="P3">По третьему вопросу <text:s/>заслушали зав. отд. <text:s/>Мишакову И.Г</text:p>
      <text:p text:style-name="P8">Решение: принять информацию к сведению.</text:p>
      <text:p text:style-name="P2"><text:span text:style-name="T5"><text:s/></text:span><text:span text:style-name="T4">Разное:</text:span></text:p>
      <text:list xml:id="list2474588802002431243" text:style-name="WW8Num1">
        <text:list-item>
          <text:p text:style-name="P14"><text:s/>о правильном заполнении маршрутных листов, </text:p>
        </text:list-item>
        <text:list-item>
          <text:p text:style-name="P14"><text:s/>о правильном заполнении актов. </text:p>
        </text:list-item>
        <text:list-item>
          <text:p text:style-name="P13"><text:s/>о прохождении <text:span text:style-name="T2">FL</text:span>/соответствии <text:span text:style-name="T2">c</text:span> графиком/.</text:p>
        </text:list-item>
      </text:list>
      <text:p text:style-name="P3"/>
      <text:p text:style-name="P3"/>
      <text:p text:style-name="P3">Зав.отделением №5 <text:s text:c="32"/>И.Г. Мишако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="Times New Roman" fo:font-size="12pt" style:font-size-asian="12pt" style:font-name-complex="Times New Roman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093cm" fo:margin-left="2cm" fo:margin-right="1.27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34:36.41</dc:date>
    <meta:print-date>2019-10-28T12:53:00</meta:print-date>
    <meta:editing-cycles>17</meta:editing-cycles>
    <meta:editing-duration>PT1H22M56S</meta:editing-duration>
    <meta:generator>OpenOffice/4.1.4$Win32 OpenOffice.org_project/414m5$Build-9788</meta:generator>
    <meta:document-statistic meta:table-count="0" meta:image-count="0" meta:object-count="0" meta:page-count="1" meta:paragraph-count="35" meta:word-count="145" meta:character-count="1060"/>
    <dc:creator>Татьяна Шершнева</dc:creator>
  </office:meta>
</office:document-meta>
</file>
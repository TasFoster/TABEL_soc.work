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PT Astra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PT Astra Serif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3.739cm"/>
        </style:tab-stops>
      </style:paragraph-properties>
      <style:text-properties style:font-name="PT Astra Serif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PT Astra Serif" fo:font-size="14pt" style:font-size-asian="14pt" style:font-size-complex="14pt"/>
    </style:style>
    <style:style style:name="P8" style:family="paragraph" style:parent-style-name="Standard">
      <style:text-properties style:font-name="PT Astra Serif" fo:font-size="14pt" style:font-name-asian="Times New Roman" style:font-size-asian="14pt" style:font-name-complex="Times New Roman" style:font-size-complex="14pt" style:language-complex="ar" style:country-complex="SA"/>
    </style:style>
    <style:style style:name="P9" style:family="paragraph" style:parent-style-name="Standard">
      <style:paragraph-properties fo:margin-left="1.129cm" fo:margin-right="0cm" fo:text-align="start" style:justify-single-word="false" fo:text-indent="-1.199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0" style:family="paragraph" style:parent-style-name="Standard">
      <style:paragraph-properties fo:margin-left="1.199cm" fo:margin-right="0cm" fo:text-align="justify" style:justify-single-word="false" fo:text-indent="-1.199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PT Astra Serif" fo:font-size="14pt" style:font-size-asian="14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14" style:family="paragraph" style:parent-style-name="Standard" style:list-style-name="L8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L2">
      <style:paragraph-properties fo:margin-left="1.129cm" fo:margin-right="0cm" fo:text-align="start" style:justify-single-word="false" fo:text-indent="-1.199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6" style:family="paragraph" style:parent-style-name="Standard" style:list-style-name="L2">
      <style:paragraph-properties fo:margin-left="1.129cm" fo:margin-right="0cm" fo:text-align="start" style:justify-single-word="false" fo:text-indent="-1.199cm" style:auto-text-indent="false" style:snap-to-layout-grid="false">
        <style:tab-stops/>
      </style:paragraph-properties>
      <style:text-properties style:font-name="PT Astra Serif" fo:font-size="14pt" style:font-size-asian="14pt" style:font-size-complex="14pt"/>
    </style:style>
    <style:style style:name="P17" style:family="paragraph" style:parent-style-name="Standard" style:list-style-name="L3">
      <style:paragraph-properties fo:margin-left="-0.03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PT Astra Serif" fo:font-size="14pt" style:font-size-asian="14pt" style:font-size-complex="14pt"/>
    </style:style>
    <style:style style:name="P18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9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20" style:family="paragraph" style:parent-style-name="Standard" style:list-style-name="L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21" style:family="paragraph" style:parent-style-name="Standard" style:list-style-name="L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Times New Roman"/>
    </style:style>
    <style:style style:name="T4" style:family="text">
      <style:text-properties style:font-name-asian="Times New Roman" style:font-name-complex="Times New Roman" style:language-complex="ar" style:country-complex="SA"/>
    </style:style>
    <style:style style:name="T5" style:family="text">
      <style:text-properties style:font-name="PT Astra Serif"/>
    </style:style>
    <style:style style:name="T6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439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0.878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318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1.757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2.196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2.635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3.074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3.514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3.953cm" text:min-label-width="0.635cm"/>
        <style:text-properties style:font-name="StarSymbol"/>
      </text:list-level-style-bullet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4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Протокол № 6</text:p>
      <text:p text:style-name="P3">рабочего совещания отделения социального обслуживания на дому № 9</text:p>
      <text:p text:style-name="P3"><text:s text:c="90"/>от 25.06.202<text:span text:style-name="T6">5</text:span></text:p>
      <text:p text:style-name="P5"><text:s text:c="2"/><text:span text:style-name="T3">Присутствовали:</text:span></text:p>
      <text:list xml:id="list8784292299721303011" text:style-name="L1">
        <text:list-item>
          <text:p text:style-name="P11">Барябина О.А.</text:p>
        </text:list-item>
        <text:list-item>
          <text:p text:style-name="P12">Бойкова К.Ю.</text:p>
        </text:list-item>
        <text:list-item>
          <text:p text:style-name="P11">Смарунь Т.В.</text:p>
        </text:list-item>
        <text:list-item>
          <text:p text:style-name="P11"><text:s/>Делиу Г.С. <text:s text:c="2"/></text:p>
        </text:list-item>
        <text:list-item>
          <text:p text:style-name="P11">Обыденнова С.А.</text:p>
        </text:list-item>
        <text:list-item>
          <text:p text:style-name="P11">Беспалова Л.И.</text:p>
        </text:list-item>
        <text:list-item>
          <text:p text:style-name="P11">Коньшина Т.С</text:p>
        </text:list-item>
        <text:list-item>
          <text:p text:style-name="P11">Чепенко Ю.С.</text:p>
        </text:list-item>
        <text:list-item>
          <text:p text:style-name="P11">Мнацаканянц И.В.</text:p>
        </text:list-item>
        <text:list-item>
          <text:p text:style-name="P11">Калинкина Л.М.</text:p>
        </text:list-item>
        <text:list-item>
          <text:p text:style-name="P13">Чипига Е.В.</text:p>
        </text:list-item>
        <text:list-item>
          <text:p text:style-name="P13"><text:s/>Рудник Т.С.</text:p>
        </text:list-item>
      </text:list>
      <text:p text:style-name="P6"><text:s text:c="56"/></text:p>
      <text:p text:style-name="P5"><text:s text:c="8"/>Отсутствующие : Евстратова Г.А., Кошелева С.А. отпуск.</text:p>
      <text:p text:style-name="P2"><text:s text:c="56"/></text:p>
      <text:p text:style-name="P3">Повестка дня</text:p>
      <text:list xml:id="list3953265640650292939" text:style-name="L2">
        <text:list-item>
          <text:list>
            <text:list-item>
              <text:list>
                <text:list-item>
                  <text:p text:style-name="P16">Итоги работы отделения за 1 полугодие 202<text:span text:style-name="T6">5</text:span> года.</text:p>
                </text:list-item>
                <text:list-item>
                  <text:p text:style-name="P15">Отчет социального работника Делиу Г.С. <text:s text:c="2"/></text:p>
                </text:list-item>
                <text:list-item>
                  <text:p text:style-name="P15"><text:span text:style-name="T3">О переводе на самоконтроль соц. работников отделения .</text:span> <text:s text:c="3"/></text:p>
                </text:list-item>
              </text:list>
            </text:list-item>
          </text:list>
        </text:list-item>
      </text:list>
      <text:p text:style-name="P9"><text:s text:c="12"/>4. Разное. <text:s text:c="9"/></text:p>
      <text:list xml:id="list5779392979290288586" text:style-name="L3">
        <text:list-header>
          <text:p text:style-name="P17"><text:s/>1. По первому вопросу заслушали <text:s text:c="2"/>зав. отделением Шершневу Т.И.</text:p>
        </text:list-header>
      </text:list>
      <text:p text:style-name="P7"><text:s text:c="12"/>Решение: работу отделения <text:s/>признать <text:s text:c="3"/>удовлетворительной.</text:p>
      <text:p text:style-name="P4"><text:span text:style-name="T3"><text:s text:c="11"/>2.По второму вопросу заслушали <text:s/></text:span><text:span text:style-name="T4">соц. работника Делиу Г.С. </text:span></text:p>
      <text:p text:style-name="P8"><text:s text:c="14"/>Решение: признать работу соц. работника Делиу Г.С. <text:s/>- удовлетворительной</text:p>
      <text:list xml:id="list2233669329290451187" text:style-name="L4">
        <text:list-header>
          <text:p text:style-name="P18">3.<text:span text:style-name="T3">По третьему вопросу заслушали <text:s/>зав. отд. Шершневу Т.И .,</text:span><text:span text:style-name="T4"> о переводе на самоконтроль соц. работников отделения. БойковуК.Ю.,Обыденнову С.А.,Рудник Т.С., Смарунь Т.В.</text:span></text:p>
        </text:list-header>
      </text:list>
      <text:p text:style-name="P10"><text:s text:c="9"/>4.Разное:</text:p>
      <text:list xml:id="list3814616487985160864" text:style-name="L5">
        <text:list-header>
          <text:p text:style-name="P19"><text:span text:style-name="T1">-</text:span> работа с актами сдачи-приёмки оказанных потребителями услуг, соц. работниками; </text:p>
        </text:list-header>
      </text:list>
      <text:list xml:id="list8354162481612398452" text:style-name="L6">
        <text:list-header>
          <text:p text:style-name="P20"><text:span text:style-name="T1">- </text:span>прохождение флюорографического обследования в соответствии с графиком (один раз в год); </text:p>
          <text:p text:style-name="P20"><text:span text:style-name="T2">-</text:span> <text:s text:c="3"/>Работа с маршрутными листами,</text:p>
        </text:list-header>
      </text:list>
      <text:list xml:id="list7619838148243141013" text:style-name="L7">
        <text:list-item>
          <text:list>
            <text:list-item>
              <text:list>
                <text:list-item>
                  <text:list>
                    <text:list-item>
                      <text:p text:style-name="P21">Работа с личными делами.</text:p>
                      <text:p text:style-name="P21"/>
                      <text:p text:style-name="P21"><text:s text:c="51"/></text:p>
                    </text:list-item>
                  </text:list>
                </text:list-item>
              </text:list>
            </text:list-item>
          </text:list>
        </text:list-item>
      </text:list>
      <text:list xml:id="list5250162690950897072" text:style-name="L8">
        <text:list-header>
          <text:p text:style-name="P14"><text:span text:style-name="T5"><text:s text:c="4"/>зав. Отделением № 9 <text:s text:c="28"/>Т.И. Шершнева <text:s text:c="37"/></text:span><text:s text:c="29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12cm" fo:margin-bottom="0.462cm" fo:margin-left="1.11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8-01-30T11:40:35</meta:creation-date>
    <dc:date>2025-07-29T14:57:20.59</dc:date>
    <meta:print-date>2024-04-08T10:40:27.25</meta:print-date>
    <dc:language>ru-RU</dc:language>
    <meta:editing-cycles>101</meta:editing-cycles>
    <meta:editing-duration>P1DT15H30S</meta:editing-duration>
    <meta:document-statistic meta:table-count="0" meta:image-count="0" meta:object-count="0" meta:page-count="1" meta:paragraph-count="36" meta:word-count="178" meta:character-count="1639"/>
    <meta:user-defined meta:name="Info 1"/>
    <meta:user-defined meta:name="Info 2"/>
    <meta:user-defined meta:name="Info 3"/>
    <meta:user-defined meta:name="Info 4"/>
  </office:meta>
</office:document-meta>
</file>
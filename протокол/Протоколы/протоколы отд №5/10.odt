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list-style-name="WW8Num1">
      <style:paragraph-properties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Standard" style:list-style-name="WW8Num1"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WW8Num1" style:master-page-name="">
      <style:paragraph-properties style:page-number="auto"/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WW8Num1">
      <style:paragraph-properties fo:text-align="justify" style:justify-single-word="false" fo:orphans="0" fo:widows="0" fo:hyphenation-ladder-count="no-limit" style:writing-mode="lr-tb">
        <style:tab-stops/>
      </style:paragraph-properties>
      <style:text-properties style:font-name="Times New Roman" fo:font-size="14pt" style:font-size-asian="14pt" style:font-name-complex="Times New Roman" style:font-size-complex="14pt" fo:hyphenate="false" fo:hyphenation-remain-char-count="2" fo:hyphenation-push-char-count="2"/>
    </style:style>
    <style:style style:name="P15" style:family="paragraph" style:parent-style-name="Text_20_body_20_indent" style:list-style-name="L2">
      <style:paragraph-properties fo:margin-top="0cm" fo:margin-bottom="0cm">
        <style:tab-stops>
          <style:tab-stop style:position="0.318cm"/>
          <style:tab-stop style:position="0.953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ротокол № 10</text:p>
      <text:p text:style-name="P1"><text:span text:style-name="T1">рабочего совещания отделения социального обслуживания на дому № 5 от 29</text:span><text:span text:style-name="T3">.10</text:span><text:span text:style-name="T1">.2025</text:span></text:p>
      <text:p text:style-name="P3">Присутствовали:</text:p>
      <text:list xml:id="list5009470053771721742" text:style-name="L1">
        <text:list-item>
          <text:p text:style-name="P9">Клеина Е.В.</text:p>
        </text:list-item>
        <text:list-item>
          <text:p text:style-name="P9">Ерастова М.Ю.</text:p>
        </text:list-item>
        <text:list-item>
          <text:p text:style-name="P9">Чурикова О.Ю.</text:p>
        </text:list-item>
        <text:list-item>
          <text:p text:style-name="P9">Кузнецова Н.В.</text:p>
        </text:list-item>
        <text:list-item>
          <text:p text:style-name="P9">Преображенская И.В.</text:p>
        </text:list-item>
        <text:list-item>
          <text:p text:style-name="P9">Серебрякова Е.Е.</text:p>
        </text:list-item>
        <text:list-item>
          <text:p text:style-name="P9">Иванова Е.Г.</text:p>
        </text:list-item>
        <text:list-item>
          <text:p text:style-name="P9">Былинкина О.В.</text:p>
        </text:list-item>
        <text:list-item>
          <text:p text:style-name="P9">Морозова М.А.</text:p>
        </text:list-item>
        <text:list-item>
          <text:p text:style-name="P9">Доронина Ю.Г.</text:p>
        </text:list-item>
        <text:list-item>
          <text:p text:style-name="P9">Хабарова В.В.</text:p>
        </text:list-item>
        <text:list-item>
          <text:p text:style-name="P9">Березуцкая О.С.</text:p>
        </text:list-item>
        <text:list-item>
          <text:p text:style-name="P10">Лапина К.И.</text:p>
        </text:list-item>
        <text:list-item>
          <text:p text:style-name="P10">Козлова Е.А.</text:p>
        </text:list-item>
      </text:list>
      <text:p text:style-name="P3"/>
      <text:p text:style-name="P6">Повестка дня:</text:p>
      <text:p text:style-name="P6"/>
      <text:p text:style-name="P4"><text:s text:c="5"/>1. <text:s text:c="2"/>Классификация учреждения социального обслуживания (Национальный стандарт РФ).</text:p>
      <text:list xml:id="list8445770473846190472" text:style-name="L2">
        <text:list-item>
          <text:p text:style-name="P15">Отчет социального работника Хабаровой В.В.</text:p>
        </text:list-item>
        <text:list-item>
          <text:p text:style-name="P15">Разное.</text:p>
        </text:list-item>
      </text:list>
      <text:p text:style-name="P2"><text:s text:c="5"/>По первому вопросу <text:s/>заслушали зав. отд. <text:s/>Мишакову И.Г</text:p>
      <text:p text:style-name="P5">Решение: принять информацию к сведению.</text:p>
      <text:p text:style-name="P7"><text:span text:style-name="T4">По второму вопросу заслушали <text:s/></text:span><text:span text:style-name="T5">соц. работника Хабарову В.В.</text:span></text:p>
      <text:p text:style-name="P7"><text:span text:style-name="T5">Решение: признать работу соц. работника Хабаровой В.В.- удовлетворительной </text:span><text:span text:style-name="T4">Разное:</text:span></text:p>
      <text:list xml:id="list1765614585965051407" text:style-name="WW8Num1">
        <text:list-header>
          <text:p text:style-name="P11"><text:s text:c="2"/></text:p>
        </text:list-header>
        <text:list-item>
          <text:p text:style-name="P13"><text:s/>о правильном заполнении маршрутных листов, </text:p>
        </text:list-item>
        <text:list-item>
          <text:p text:style-name="P12"><text:s/>о правильном заполнении актов. </text:p>
        </text:list-item>
        <text:list-item>
          <text:p text:style-name="P14">о прохождении <text:span text:style-name="T2">FL</text:span>/соответствии <text:span text:style-name="T2">c</text:span> графиком/.</text:p>
          <text:list>
            <text:list-header>
              <text:p text:style-name="P11"/>
            </text:list-header>
          </text:list>
        </text:list-item>
      </text:list>
      <text:p text:style-name="P2"/>
      <text:p text:style-name="P2">Зав.отделением №5 <text:s text:c="33"/>И.Г. <text:s text:c="2"/>Мишако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ru" fo:country="RU" style:font-name-asian="Lucida Sans Unicode" style:font-size-asian="12pt" style:language-asian="zh" style:country-asian="CN" style:font-name-complex="Tahoma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Times New Roman" fo:font-size="12pt" style:font-size-asian="12pt" style:font-name-complex="Times New Roman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Lucida Sans Unicode" style:font-size-asian="8pt" style:font-name-complex="Tahoma" style:font-size-complex="8pt" style:language-complex="ru" style:country-complex="R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074cm" fo:text-indent="-0.635cm" fo:margin-left="1.07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093cm" fo:margin-left="2cm" fo:margin-right="1.27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01-30T12:40:00</meta:creation-date>
    <dc:date>2025-02-14T14:34:48.58</dc:date>
    <meta:print-date>2022-08-18T11:53:20.46</meta:print-date>
    <meta:editing-cycles>19</meta:editing-cycles>
    <meta:editing-duration>PT1H24M29S</meta:editing-duration>
    <meta:generator>OpenOffice/4.1.4$Win32 OpenOffice.org_project/414m5$Build-9788</meta:generator>
    <meta:document-statistic meta:table-count="0" meta:image-count="0" meta:object-count="0" meta:page-count="1" meta:paragraph-count="30" meta:word-count="127" meta:character-count="910"/>
    <dc:creator>Татьяна Шершнева</dc:creator>
  </office:meta>
</office:document-meta>
</file>
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Text_20_body_20_indent">
      <style:paragraph-properties fo:margin-left="0cm" fo:margin-right="0cm" fo:margin-top="0cm" fo:margin-bottom="0cm" fo:text-indent="0cm" style:auto-text-indent="false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L1">
      <style:paragraph-properties fo:text-align="start" style:justify-single-word="false"/>
    </style:style>
    <style:style style:name="P16" style:family="paragraph" style:parent-style-name="Standard" style:list-style-name="WW8Num1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-complex="Times New Roman"/>
    </style:style>
    <style:style style:name="T5" style:family="text">
      <style:text-properties style:font-name-asian="Times New Roman" style:font-name-complex="Times New Roman" style:language-complex="ar" style:country-complex="SA"/>
    </style:style>
    <style:style style:name="T6" style:family="text">
      <style:text-properties fo:font-weight="normal" style:font-weight-asian="normal" style:font-name-complex="Times New Roman" style:font-weight-complex="normal"/>
    </style:style>
    <style:style style:name="T7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№ 2</text:p>
      <text:p text:style-name="P2"><text:span text:style-name="T1">рабочего совещания отделения социального обслуживания на дому № 9 от 26</text:span><text:span text:style-name="T3">.02</text:span><text:span text:style-name="T1">.</text:span><text:span text:style-name="T2">2025</text:span></text:p>
      <text:p text:style-name="P7">Присутствовали:</text:p>
      <text:list xml:id="list4136122715134420321" text:style-name="L1">
        <text:list-item>
          <text:p text:style-name="P12">Барябина О.А.</text:p>
        </text:list-item>
        <text:list-item>
          <text:p text:style-name="P12">Евстратова Г.А.</text:p>
        </text:list-item>
        <text:list-item>
          <text:p text:style-name="P13">Бойкова К.Ю.</text:p>
        </text:list-item>
        <text:list-item>
          <text:p text:style-name="P12">Смарунь Т.В.</text:p>
        </text:list-item>
        <text:list-item>
          <text:p text:style-name="P15"><text:s/><text:span text:style-name="T7">Рудник Т.С. </text:span></text:p>
        </text:list-item>
        <text:list-item>
          <text:p text:style-name="P12"><text:s/>Делиу Г.С. <text:s text:c="2"/></text:p>
        </text:list-item>
        <text:list-item>
          <text:p text:style-name="P12">Кошелева С.А.</text:p>
        </text:list-item>
        <text:list-item>
          <text:p text:style-name="P12">Обыденнова С.А.</text:p>
        </text:list-item>
        <text:list-item>
          <text:p text:style-name="P12">Беспалова Л.И.</text:p>
        </text:list-item>
        <text:list-item>
          <text:p text:style-name="P12">Коньшина Т.С</text:p>
        </text:list-item>
        <text:list-item>
          <text:p text:style-name="P12">Чепенко Ю.С.</text:p>
        </text:list-item>
        <text:list-item>
          <text:p text:style-name="P12">Мнацаканянц И.В.</text:p>
        </text:list-item>
        <text:list-item>
          <text:p text:style-name="P12">Калинкина Л.М.</text:p>
        </text:list-item>
        <text:list-item>
          <text:p text:style-name="P12">Каратаева М.Ф.</text:p>
        </text:list-item>
        <text:list-item>
          <text:p text:style-name="P14">Чипига Е.В.</text:p>
        </text:list-item>
      </text:list>
      <text:p text:style-name="P4">Повестка дня:</text:p>
      <text:p text:style-name="P3"/>
      <text:p text:style-name="P5">1. <text:s/>Контроль за качеством выполнения социальных услуг.</text:p>
      <text:p text:style-name="P10">2. <text:s/>Проведение <text:s/>работы по набору численности, путем работы с участковыми врачами пол. № 10.</text:p>
      <text:p text:style-name="P5">3.Разное</text:p>
      <text:p text:style-name="P3"><text:s/></text:p>
      <text:p text:style-name="P3">По первому вопросу <text:s/>заслушали зав. отд. Шершневу Т.И . </text:p>
      <text:p text:style-name="P6">Решение: принять информацию к сведению.</text:p>
      <text:p text:style-name="P1"><text:span text:style-name="T4">По второму вопросу заслушали <text:s/>зав. отд. Шершневу Т.И ., </text:span><text:span text:style-name="T5">. о проведение <text:s/>работы по набору численности, путем работы с участковыми врачами пол. № 10, оставила координаты Центра и разъяснила условия ,и правила принятия на соц. обслужиание.</text:span></text:p>
      <text:p text:style-name="P3">Разное:</text:p>
      <text:p text:style-name="P3"/>
      <text:p text:style-name="P8"><text:span text:style-name="T6">-</text:span><text:span text:style-name="T4"> работа с актами сдачи-приёмки оказанных потребителям услуг, соц. работниками; </text:span></text:p>
      <text:p text:style-name="P9"><text:span text:style-name="T6">- </text:span><text:span text:style-name="T4">прохождение флюорографического обследования в соответствии с графиком (один раз в год); </text:span></text:p>
      <text:p text:style-name="P9"><text:span text:style-name="T2">-</text:span><text:span text:style-name="T4"> <text:s text:c="3"/>Работа с маршрутными листами.</text:span></text:p>
      <text:list xml:id="list5484126137947699657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6">Работа с личными делами.</text:p>
                    </text:list-item>
                    <text:list-item>
                      <text:p text:style-name="P16"><text:s/>Подворный обход соц. работниками участка .</text:p>
                    </text:list-item>
                    <text:list-item>
                      <text:p text:style-name="P16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>Зав.отделением №9 <text:s text:c="33"/>Т.И. <text:s text:c="2"/>Шершне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7T10:23:40.12</dc:date>
    <meta:print-date>2024-04-08T10:31:23.13</meta:print-date>
    <meta:editing-cycles>12</meta:editing-cycles>
    <meta:editing-duration>PT32M50S</meta:editing-duration>
    <meta:generator>OpenOffice/4.1.7$Win32 OpenOffice.org_project/417m1$Build-9800</meta:generator>
    <meta:document-statistic meta:table-count="0" meta:image-count="0" meta:object-count="0" meta:page-count="1" meta:paragraph-count="34" meta:word-count="192" meta:character-count="1292"/>
  </office:meta>
</office:document-meta>
</file>
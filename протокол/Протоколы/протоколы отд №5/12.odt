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WW8Num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L3"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Text_20_body_20_indent" style:list-style-name="L2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Text_20_body_20_indent" style:list-style-name="L2">
      <style:paragraph-properties fo:margin-left="0cm" fo:margin-right="0cm" fo:margin-top="0cm" fo:margin-bottom="0cm" fo:text-indent="0cm" style:auto-text-indent="false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font-name-asian="Times New Roman" style:font-name-complex="Times New Roman" style:language-complex="ar" style:country-complex="SA"/>
    </style:style>
    <style:style style:name="T5" style:family="text">
      <style:text-properties style:font-name-asian="Times New Roman" style:language-complex="ar" style:country-complex="SA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12</text:p>
      <text:p text:style-name="P1"><text:span text:style-name="T1">рабочего совещания отделения социального обслуживания на дому № 5 от 24</text:span><text:span text:style-name="T2">.12</text:span><text:span text:style-name="T1">.2025</text:span></text:p>
      <text:p text:style-name="P4">Присутствовали:</text:p>
      <text:list xml:id="list3718585562673066631" text:style-name="L3">
        <text:list-item>
          <text:p text:style-name="P15">Клеина Е.В.</text:p>
        </text:list-item>
        <text:list-item>
          <text:p text:style-name="P15">Чурикова О.Ю.</text:p>
        </text:list-item>
        <text:list-item>
          <text:p text:style-name="P15">Кузнецова Н.В.</text:p>
        </text:list-item>
        <text:list-item>
          <text:p text:style-name="P15">Серебрякова Е.Е.</text:p>
        </text:list-item>
        <text:list-item>
          <text:p text:style-name="P15">Былинкина О.В.</text:p>
        </text:list-item>
        <text:list-item>
          <text:p text:style-name="P15">Морозова М.А.</text:p>
        </text:list-item>
        <text:list-item>
          <text:p text:style-name="P15">Хабарова В.В.</text:p>
        </text:list-item>
        <text:list-item>
          <text:p text:style-name="P15">Березуцкая О.С.</text:p>
        </text:list-item>
        <text:list-item>
          <text:p text:style-name="P13">Лапина К.И.</text:p>
        </text:list-item>
        <text:list-item>
          <text:p text:style-name="P13">Козлова Е.А.</text:p>
        </text:list-item>
      </text:list>
      <text:p text:style-name="P3"><text:s text:c="6"/></text:p>
      <text:p text:style-name="P4">Отсутствующие: Ерастова М.Ю., Доронина Ю.Г., Иванова Е.Г., Преображенская И.В., отпуск.</text:p>
      <text:p text:style-name="P4"/>
      <text:p text:style-name="P7">Повестка дня:</text:p>
      <text:p text:style-name="P3"/>
      <text:p text:style-name="P5"><text:s text:c="5"/>1. <text:s text:c="2"/>Задачи и планированиена 2026. </text:p>
      <text:list xml:id="list8167013233992583758" text:style-name="L2">
        <text:list-item>
          <text:p text:style-name="P17">Отчет социального работника Клеиной Е.В.</text:p>
        </text:list-item>
        <text:list-item>
          <text:p text:style-name="P17">Основные направления современной социальной политики.</text:p>
        </text:list-item>
        <text:list-item>
          <text:p text:style-name="P17">Разное <text:s/></text:p>
          <text:p text:style-name="P18"/>
        </text:list-item>
      </text:list>
      <text:p text:style-name="P3"><text:s/></text:p>
      <text:p text:style-name="P3">По первому вопросу <text:s/>заслушали зав. отд. <text:s/>Мишакову И.Г</text:p>
      <text:p text:style-name="P6">Решение: принять информацию к сведению.</text:p>
      <text:p text:style-name="P3">По второму вопросу заслушали <text:s/><text:span text:style-name="T5">соц. работника</text:span> Клеину Е.В.</text:p>
      <text:p text:style-name="P6">Решение: принять информацию к сведению.</text:p>
      <text:p text:style-name="P8"><text:span text:style-name="T6">По третьму вопросу заслушали <text:s/></text:span><text:span text:style-name="T7">соц. работника Чурикову О.Ю.</text:span></text:p>
      <text:p text:style-name="P2"><text:span text:style-name="T4">Решение: признать работу соц. работника <text:s/>Клеиной Е.В.- удовлетворительной </text:span><text:span text:style-name="T3">Разное:</text:span></text:p>
      <text:list xml:id="list8787733127529912560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4">работа с актами сдачи-приёмки оказанных потребителям услуг, соц. работниками; </text:p>
                    </text:list-item>
                    <text:list-item>
                      <text:p text:style-name="P14">прохождение флюорографического обследования в соответствии с графиком (один раз в год); </text:p>
                    </text:list-item>
                    <text:list-item>
                      <text:p text:style-name="P14">Работа с маршрутными листами.</text:p>
                    </text:list-item>
                    <text:list-item>
                      <text:p text:style-name="P14">Работа с личными делами.</text:p>
                    </text:list-item>
                    <text:list-item>
                      <text:p text:style-name="P16">Подворный обход соц. работниками участка .</text:p>
                    </text:list-item>
                    <text:list-item>
                      <text:p text:style-name="P16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>Зав.отделением №5 <text:s text:c="31"/>И.Г. Мишако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17:52.34</dc:date>
    <meta:print-date>2019-10-28T12:53:00</meta:print-date>
    <meta:editing-cycles>15</meta:editing-cycles>
    <meta:editing-duration>PT1H7M39S</meta:editing-duration>
    <meta:generator>OpenOffice/4.1.7$Win32 OpenOffice.org_project/417m1$Build-9800</meta:generator>
    <meta:document-statistic meta:table-count="0" meta:image-count="0" meta:object-count="0" meta:page-count="1" meta:paragraph-count="34" meta:word-count="176" meta:character-count="1278"/>
  </office:meta>
</office:document-meta>
</file>
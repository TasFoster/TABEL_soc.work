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style:font-name-asian="Times New Roman" style:font-size-asian="14pt" style:font-name-complex="Times New Roman" style:font-size-complex="14pt" style:language-complex="ar" style:country-complex="SA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8" style:family="paragraph" style:parent-style-name="Standard">
      <style:paragraph-properties fo:margin-top="0cm" fo:margin-bottom="0cm">
        <style:tab-stops>
          <style:tab-stop style:position="0.318cm"/>
          <style:tab-stop style:position="0.953cm"/>
        </style:tab-stops>
      </style:paragraph-properties>
      <style:text-properties style:font-name="Times New Roman" fo:font-size="14pt" fo:language="en" fo:country="US" style:font-size-asian="14pt" style:font-name-complex="Times New Roman" style:font-size-complex="14pt"/>
    </style:style>
    <style:style style:name="P9" style:family="paragraph" style:parent-style-name="Standard">
      <style:paragraph-properties fo:margin-left="1.953cm" fo:margin-right="0cm" fo:text-align="justify" style:justify-single-word="false" fo:text-indent="-0.635cm" style:auto-text-indent="false">
        <style:tab-stops>
          <style:tab-stop style:position="0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 style:list-style-name="L1"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13" style:family="paragraph" style:parent-style-name="Standard" style:list-style-name="L2">
      <style:paragraph-properties style:snap-to-layout-grid="false"/>
      <style:text-properties style:font-name="Times New Roman" fo:font-size="14pt" style:font-size-asian="14pt" style:font-name-complex="Times New Roman" style:font-size-complex="14pt"/>
    </style:style>
    <style:style style:name="P14" style:family="paragraph" style:parent-style-name="Standard" style:list-style-name="WW8Num1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P15" style:family="paragraph" style:parent-style-name="Standard" style:list-style-name="WW8Num1">
      <style:paragraph-properties fo:margin-left="1.318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style:font-name="Times New Roman" style:font-name-asian="Times New Roman" style:font-name-complex="Times New Roman" style:language-complex="ar" style:country-complex="SA"/>
    </style:style>
    <style:style style:name="T5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cm" fo:text-indent="-0.635cm" fo:margin-left="2.14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8cm" fo:text-indent="-0.635cm" fo:margin-left="2.77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13cm" fo:text-indent="-0.635cm" fo:margin-left="3.41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48cm" fo:text-indent="-0.635cm" fo:margin-left="4.04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83cm" fo:text-indent="-0.635cm" fo:margin-left="4.68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18cm" fo:text-indent="-0.635cm" fo:margin-left="5.31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53cm" fo:text-indent="-0.635cm" fo:margin-left="5.9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88cm" fo:text-indent="-0.635cm" fo:margin-left="6.58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23cm" fo:text-indent="-0.635cm" fo:margin-left="7.22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58cm" fo:text-indent="-0.635cm" fo:margin-left="7.858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Протокол № 4</text:p>
      <text:p text:style-name="P1"><text:span text:style-name="T1">рабочего совещания отделения социального обслуживания на дому № 5 от 26.</text:span><text:span text:style-name="T2">04</text:span><text:span text:style-name="T1">.2023</text:span></text:p>
      <text:p text:style-name="P3"><text:s/>Присутствовали:</text:p>
      <text:list xml:id="list6205877545152167077" text:style-name="L1">
        <text:list-item>
          <text:p text:style-name="P11">Клеина Е.В.</text:p>
        </text:list-item>
        <text:list-item>
          <text:p text:style-name="P11">Ерастова М.Ю.</text:p>
        </text:list-item>
        <text:list-item>
          <text:p text:style-name="P11">Чурикова О.Ю.</text:p>
        </text:list-item>
        <text:list-item>
          <text:p text:style-name="P11">Кузнецова Н.В.</text:p>
        </text:list-item>
        <text:list-item>
          <text:p text:style-name="P11">Преображенская И.В.</text:p>
        </text:list-item>
        <text:list-item>
          <text:p text:style-name="P11">Серебрякова Е.Е.</text:p>
        </text:list-item>
        <text:list-item>
          <text:p text:style-name="P11">Иванова Е.Г.</text:p>
        </text:list-item>
        <text:list-item>
          <text:p text:style-name="P11">Былинкина О.В.</text:p>
        </text:list-item>
        <text:list-item>
          <text:p text:style-name="P11">Морозова М.А.</text:p>
        </text:list-item>
        <text:list-item>
          <text:p text:style-name="P11">Доронина Ю.Г.</text:p>
        </text:list-item>
        <text:list-item>
          <text:p text:style-name="P11">Березуцкая О.С.</text:p>
        </text:list-item>
        <text:list-item>
          <text:p text:style-name="P12">Лапина К.И.</text:p>
        </text:list-item>
        <text:list-item>
          <text:p text:style-name="P12">Козлова Е.А.</text:p>
        </text:list-item>
      </text:list>
      <text:p text:style-name="P3"/>
      <text:p text:style-name="P4"><text:s/>Отсутствующие: Хабарова В.В. отпуск</text:p>
      <text:p text:style-name="P7">Повестка дня:</text:p>
      <text:p text:style-name="P8"><text:s text:c="6"/>1.<text:span text:style-name="T5">Порядок оформления граждан на проживание в стационарном учреждении.</text:span></text:p>
      <text:list xml:id="list262357473930632291" text:style-name="L2">
        <text:list-item>
          <text:p text:style-name="P13">Отчет социального работника Козловой Е.А.</text:p>
        </text:list-item>
        <text:list-item>
          <text:p text:style-name="P13"><text:s/>Разное.</text:p>
        </text:list-item>
      </text:list>
      <text:p text:style-name="P3"><text:s/></text:p>
      <text:p text:style-name="P3">По первому вопросу <text:s/>заслушали зав. отд. Мишакову И.Г. </text:p>
      <text:p text:style-name="P5">Решение: принять информацию к сведению.</text:p>
      <text:p text:style-name="P2"><text:span text:style-name="T3">По второму вопросу заслушали <text:s/></text:span><text:span text:style-name="T4">соц. работника <text:s/>Козлову Е.А</text:span></text:p>
      <text:p text:style-name="P6">Решение: признать работу соц. работника Козловой Е.А. - удовлетворительной.</text:p>
      <text:p text:style-name="P3">Разное: <text:s/></text:p>
      <text:list xml:id="list5187926537726081414" text:style-name="WW8Num1">
        <text:list-item>
          <text:list>
            <text:list-item>
              <text:list>
                <text:list-item>
                  <text:list>
                    <text:list-item>
                      <text:p text:style-name="P14">Работа с маршрутными листами..</text:p>
                    </text:list-item>
                    <text:list-item>
                      <text:p text:style-name="P14">прохождение флюорографического обследования в соответствии с графиком (один раз в год); </text:p>
                    </text:list-item>
                    <text:list-item>
                      <text:p text:style-name="P14">работа с актами сдачи-приёмки оказанных потребителям услуг, соц. работниками;</text:p>
                    </text:list-item>
                    <text:list-item>
                      <text:p text:style-name="P14">Работа с личными делами.</text:p>
                    </text:list-item>
                    <text:list-item>
                      <text:p text:style-name="P14">Поздравление на дому юбиляров не находящихся на обслуживании центра от министерства социального развития.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list xml:id="list34624268" text:continue-numbering="true" text:style-name="WW8Num1">
        <text:list-item>
          <text:list>
            <text:list-item>
              <text:list>
                <text:list-item>
                  <text:list>
                    <text:list-header>
                      <text:p text:style-name="P15"/>
                    </text:list-header>
                  </text:list>
                </text:list-item>
              </text:list>
            </text:list-item>
          </text:list>
        </text:list-item>
      </text:list>
      <text:p text:style-name="P3"><text:s text:c="7"/>Зав.отделением №5 <text:s text:c="36"/>Мишакова И.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" fo:font-size="12pt" fo:language="ru" fo:country="RU" style:font-name-asian="Lucida Sans Unicode" style:font-size-asian="12pt" style:language-asian="zh" style:country-asian="CN" style:font-name-complex="Tahoma" style:font-size-complex="12pt" style:language-complex="ru" style:country-complex="RU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Tahoma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WW8Num1z0" style:family="text"/>
    <style:style style:name="WW8Num2z0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name-asian="Lucida Sans Unicode" style:font-size-asian="8pt" style:font-name-complex="Tahoma" style:font-size-complex="8pt" style:language-complex="ru" style:country-complex="RU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z0" style:num-suffix="." text:bullet-char="">
        <style:list-level-properties text:list-level-position-and-space-mode="label-alignment">
          <style:list-level-label-alignment text:label-followed-by="listtab" text:list-tab-stop-position="1.074cm" fo:text-indent="-0.635cm" fo:margin-left="1.074cm"/>
        </style:list-level-properties>
        <style:text-properties style:font-name="Symbol"/>
      </text:list-level-style-bullet>
      <text:list-level-style-bullet text:level="3" text:style-name="WW8Num1z0" style:num-suffix="." text:bullet-char="">
        <style:list-level-properties text:list-level-position-and-space-mode="label-alignment">
          <style:list-level-label-alignment text:label-followed-by="listtab" text:list-tab-stop-position="1.513cm" fo:text-indent="-0.635cm" fo:margin-left="1.513cm"/>
        </style:list-level-properties>
        <style:text-properties style:font-name="Symbol"/>
      </text:list-level-style-bullet>
      <text:list-level-style-bullet text:level="4" text:style-name="WW8Num1z0" style:num-suffix="." text:bullet-char="">
        <style:list-level-properties text:list-level-position-and-space-mode="label-alignment">
          <style:list-level-label-alignment text:label-followed-by="listtab" text:list-tab-stop-position="1.953cm" fo:text-indent="-0.635cm" fo:margin-left="1.953cm"/>
        </style:list-level-properties>
        <style:text-properties style:font-name="Symbol"/>
      </text:list-level-style-bullet>
      <text:list-level-style-bullet text:level="5" text:style-name="WW8Num1z0" style:num-suffix="." text:bullet-char="">
        <style:list-level-properties text:list-level-position-and-space-mode="label-alignment">
          <style:list-level-label-alignment text:label-followed-by="listtab" text:list-tab-stop-position="2.392cm" fo:text-indent="-0.635cm" fo:margin-left="2.392cm"/>
        </style:list-level-properties>
        <style:text-properties style:font-name="Symbol"/>
      </text:list-level-style-bullet>
      <text:list-level-style-bullet text:level="6" text:style-name="WW8Num1z0" style:num-suffix="." text:bullet-char="">
        <style:list-level-properties text:list-level-position-and-space-mode="label-alignment">
          <style:list-level-label-alignment text:label-followed-by="listtab" text:list-tab-stop-position="2.831cm" fo:text-indent="-0.635cm" fo:margin-left="2.831cm"/>
        </style:list-level-properties>
        <style:text-properties style:font-name="Symbol"/>
      </text:list-level-style-bullet>
      <text:list-level-style-bullet text:level="7" text:style-name="WW8Num1z0" style:num-suffix="." text:bullet-char="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8" text:style-name="WW8Num1z0" style:num-suffix="." text:bullet-char="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  <style:text-properties style:font-name="Symbol"/>
      </text:list-level-style-bullet>
      <text:list-level-style-bullet text:level="9" text:style-name="WW8Num1z0" style:num-suffix="." text:bullet-char="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8-01-30T12:40:00</meta:creation-date>
    <dc:date>2025-02-14T14:36:56.25</dc:date>
    <meta:print-date>2022-03-02T12:02:48.76</meta:print-date>
    <meta:editing-cycles>16</meta:editing-cycles>
    <meta:editing-duration>PT1H24M53S</meta:editing-duration>
    <meta:generator>OpenOffice/4.1.4$Win32 OpenOffice.org_project/414m5$Build-9788</meta:generator>
    <meta:printed-by>Татьяна </meta:printed-by>
    <meta:document-statistic meta:table-count="0" meta:image-count="0" meta:object-count="0" meta:page-count="1" meta:paragraph-count="33" meta:word-count="157" meta:character-count="1128"/>
    <dc:creator>Татьяна Шершнева</dc:creator>
  </office:meta>
</office:document-meta>
</file>
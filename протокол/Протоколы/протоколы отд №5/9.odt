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ext_20_body_20_indent" style:list-style-name="L2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WW8Num1">
      <style:paragraph-properties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-asian="Times New Roman" style:font-name-complex="Times New Roman" style:language-complex="ar" style:country-complex="SA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9</text:p>
      <text:p text:style-name="P1"><text:span text:style-name="T1">рабочего совещания отделения социального обслуживания на дому № 5 от 24</text:span><text:span text:style-name="T2">.09</text:span><text:span text:style-name="T1">.2025</text:span></text:p>
      <text:p text:style-name="P3">Присутствовали:</text:p>
      <text:list xml:id="list2905617448072101855" text:style-name="L1">
        <text:list-item>
          <text:p text:style-name="P10">Клеина Е.В.</text:p>
        </text:list-item>
        <text:list-item>
          <text:p text:style-name="P10">Ерастова М.Ю.</text:p>
        </text:list-item>
        <text:list-item>
          <text:p text:style-name="P10">Чурикова О.Ю.</text:p>
        </text:list-item>
        <text:list-item>
          <text:p text:style-name="P10">Кузнецова Н.В.</text:p>
        </text:list-item>
        <text:list-item>
          <text:p text:style-name="P10">Преображенская И.В.</text:p>
        </text:list-item>
        <text:list-item>
          <text:p text:style-name="P10">Иванова Е.Г.</text:p>
        </text:list-item>
        <text:list-item>
          <text:p text:style-name="P10">Былинкина О.В.</text:p>
        </text:list-item>
        <text:list-item>
          <text:p text:style-name="P10">Морозова М.А.</text:p>
        </text:list-item>
        <text:list-item>
          <text:p text:style-name="P10">Доронина Ю.Г.</text:p>
        </text:list-item>
        <text:list-item>
          <text:p text:style-name="P10">Березуцкая О.С.</text:p>
        </text:list-item>
        <text:list-item>
          <text:p text:style-name="P11">Лапина К.И.</text:p>
          <text:p text:style-name="P11"/>
        </text:list-item>
      </text:list>
      <text:p text:style-name="P3">Отсутствующие: Серебрякова Е.Е., Хабарова В.В., Козлова Е.А. отпуск.</text:p>
      <text:p text:style-name="P3"/>
      <text:p text:style-name="P6">Повестка дня:</text:p>
      <text:p text:style-name="P6"/>
      <text:p text:style-name="P4"><text:s text:c="5"/>1. <text:s/>Контроль качества социальных услуг (Национальный стандарт РФ).</text:p>
      <text:list xml:id="list4453939005049876283" text:style-name="L2">
        <text:list-item>
          <text:p text:style-name="P8">Отчет социального работника Ивановой Е.Г.</text:p>
        </text:list-item>
        <text:list-item>
          <text:p text:style-name="P8">Разное.</text:p>
        </text:list-item>
      </text:list>
      <text:p text:style-name="P2"><text:s text:c="5"/>По первому вопросу <text:s/>заслушали зав. отд. <text:s/>Мишакову И.Г</text:p>
      <text:p text:style-name="P5">Решение: принять информацию к сведению.</text:p>
      <text:p text:style-name="P7"><text:span text:style-name="T4">По второму вопросу заслушали <text:s/></text:span><text:span text:style-name="T5">соц. работника Иванову Е.Г. </text:span></text:p>
      <text:p text:style-name="P7"><text:span text:style-name="T5">Решение: признать работу соц. работника Ивановой Е.Г.- удовлетворительной </text:span><text:span text:style-name="T4">Разное:</text:span></text:p>
      <text:list xml:id="list1802934959244243457" text:style-name="WW8Num1">
        <text:list-header>
          <text:p text:style-name="P12"><text:s text:c="2"/><text:span text:style-name="T3">- <text:s text:c="2"/>проведение субботника.</text:span></text:p>
          <text:list>
            <text:list-header>
              <text:p text:style-name="P12"/>
            </text:list-header>
          </text:list>
        </text:list-header>
      </text:list>
      <text:p text:style-name="P2"/>
      <text:p text:style-name="P2">Зав.отделением №5 <text:s text:c="30"/>И.Г. <text:s/>Мишако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0:48.70</dc:date>
    <meta:print-date>2022-08-18T12:04:38.19</meta:print-date>
    <meta:editing-cycles>19</meta:editing-cycles>
    <meta:editing-duration>PT1H29M53S</meta:editing-duration>
    <meta:generator>OpenOffice/4.1.7$Win32 OpenOffice.org_project/417m1$Build-9800</meta:generator>
    <meta:document-statistic meta:table-count="0" meta:image-count="0" meta:object-count="0" meta:page-count="1" meta:paragraph-count="25" meta:word-count="112" meta:character-count="810"/>
  </office:meta>
</office:document-meta>
</file>
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use-window-font-color="true" style:font-name="Times New Roman" fo:font-size="14pt" fo:language="ru" fo:country="RU" style:letter-kerning="true" style:font-name-asian="Lucida Sans Unicode1" style:font-size-asian="14pt" style:language-asian="zxx" style:country-asian="none" style:font-name-complex="Times New Roman" style:font-size-complex="14pt" style:language-complex="zxx" style:country-complex="non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L3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4pt" fo:background-color="#ffff00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Times New Roman" fo:font-size="14pt" fo:background-color="#ffff00" style:font-size-asian="14pt" style:font-size-complex="14pt"/>
    </style:style>
    <style:style style:name="T1" style:family="text">
      <style:text-properties style:font-name-complex="Times New Roman"/>
    </style:style>
    <style:style style:name="T2" style:family="text">
      <style:text-properties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font-name-complex="Times New Roman"/>
    </style:style>
    <style:style style:name="T4" style:family="text">
      <style:text-properties fo:background-color="#ffff00"/>
    </style:style>
    <style:style style:name="T5" style:family="text">
      <style:text-properties fo:background-color="#ffff00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1</text:p>
      <text:p text:style-name="P1">рабочего совещания отделения социального обслуживания на дому № 9 от <text:span text:style-name="T4">29.01.2025</text:span></text:p>
      <text:p text:style-name="P1"/>
      <text:p text:style-name="P2"/>
      <text:p text:style-name="P4">Присутствовали:</text:p>
      <text:list xml:id="list5503121227629219083" text:style-name="L1">
        <text:list-item>
          <text:p text:style-name="P13">Барябина О.А.</text:p>
        </text:list-item>
        <text:list-item>
          <text:p text:style-name="P13">Евстратова Г.А.</text:p>
        </text:list-item>
        <text:list-item>
          <text:p text:style-name="P14">Бойкова К.Ю.</text:p>
        </text:list-item>
        <text:list-item>
          <text:p text:style-name="P13">Смарунь Т.В.</text:p>
        </text:list-item>
        <text:list-item>
          <text:p text:style-name="P13">Рудник Т.С. </text:p>
        </text:list-item>
        <text:list-item>
          <text:p text:style-name="P13">Делиу Г.С. <text:s text:c="2"/></text:p>
        </text:list-item>
        <text:list-item>
          <text:p text:style-name="P13">Кошелева С.А.</text:p>
        </text:list-item>
        <text:list-item>
          <text:p text:style-name="P13">Обыденнова С.А.</text:p>
        </text:list-item>
        <text:list-item>
          <text:p text:style-name="P13">Беспалова Л.И.</text:p>
        </text:list-item>
        <text:list-item>
          <text:p text:style-name="P13">Коньшина Т.С</text:p>
        </text:list-item>
        <text:list-item>
          <text:p text:style-name="P13">Чепенко Ю.С.</text:p>
        </text:list-item>
        <text:list-item>
          <text:p text:style-name="P13">Мнацаканянц И.В.</text:p>
        </text:list-item>
        <text:list-item>
          <text:p text:style-name="P13">Калинкина Л.М.</text:p>
        </text:list-item>
        <text:list-item>
          <text:p text:style-name="P13">Каратаева М.Ф.</text:p>
        </text:list-item>
        <text:list-item>
          <text:p text:style-name="P13">Чипига Е.В.</text:p>
        </text:list-item>
      </text:list>
      <text:list xml:id="list5571279431917845244" text:style-name="L2">
        <text:list-header>
          <text:p text:style-name="P11"><text:s/></text:p>
          <text:p text:style-name="P11"><text:s/></text:p>
        </text:list-header>
      </text:list>
      <text:p text:style-name="P6">Повестка дня:</text:p>
      <text:p text:style-name="P3"/>
      <text:p text:style-name="P5"><text:s text:c="5"/>1. Планирование работы отделения на 2025 <text:s/>год.</text:p>
      <text:list xml:id="list3814787419512034526" text:style-name="L3">
        <text:list-item>
          <text:p text:style-name="P12">Заключение договоров для дополнительных услуг на 2025 год.</text:p>
        </text:list-item>
        <text:list-item>
          <text:p text:style-name="P12">Разное</text:p>
        </text:list-item>
      </text:list>
      <text:p text:style-name="P3"><text:s/></text:p>
      <text:p text:style-name="P3">По первому вопросу <text:s/>заслушали зав. отд. Шершневу Т.И . она ознакомила с планом работы на 2025 г.</text:p>
      <text:p text:style-name="P7">Решение: принять информацию к сведению.</text:p>
      <text:p text:style-name="P8"><text:span text:style-name="T1">По второму вопросу заслушали <text:s/>зав. отд. Шершневу Т.И., </text:span><text:span text:style-name="T2">о переводе на самоконтроль соц. работников отделения .</text:span><text:span text:style-name="T5">Барябина О.А.,Делиу Г.С.,Калинкина Л.М., Евстратова Г.А.</text:span></text:p>
      <text:p text:style-name="P3">Разное:</text:p>
      <text:p text:style-name="P3"/>
      <text:p text:style-name="P3">- о правильном заполнении маршрутных листов, </text:p>
      <text:p text:style-name="P9">- о правильном заполнении актов. </text:p>
      <text:p text:style-name="P8"><text:span text:style-name="T1">- о прохождении </text:span><text:span text:style-name="T3">FL</text:span><text:span text:style-name="T1">/соответствии </text:span><text:span text:style-name="T3">c</text:span><text:span text:style-name="T1"> графиком/.</text:span></text:p>
      <text:p text:style-name="P3"/>
      <text:p text:style-name="P3"/>
      <text:p text:style-name="P3">За<text:span text:style-name="T4">в.отделением №9 <text:s text:c="36"/>Шершнева Т.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, 'Arial Unicode MS'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97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6-06-21T19:49:17.79</dc:date>
    <meta:print-date>2024-04-08T10:29:38.63</meta:print-date>
    <meta:editing-cycles>17</meta:editing-cycles>
    <meta:editing-duration>PT1H18M44S</meta:editing-duration>
    <meta:generator>OpenOffice/4.1.4$Win32 OpenOffice.org_project/414m5$Build-9788</meta:generator>
    <meta:document-statistic meta:table-count="0" meta:image-count="0" meta:object-count="0" meta:page-count="1" meta:paragraph-count="33" meta:word-count="145" meta:character-count="971"/>
    <dc:creator>Татьяна Шершнева</dc:creator>
  </office:meta>
</office:document-meta>
</file>
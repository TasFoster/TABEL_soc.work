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T Astra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T Astra Serif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PT Astra Serif" fo:font-size="14pt" style:font-size-asian="14pt" style:font-size-complex="14pt"/>
    </style:style>
    <style:style style:name="P8" style:family="paragraph" style:parent-style-name="Standard" style:list-style-name="L2">
      <style:text-properties style:font-name="PT Astra Serif" fo:font-size="14pt" style:font-size-asian="14pt" style:font-size-complex="14pt"/>
    </style:style>
    <style:style style:name="P9" style:family="paragraph" style:parent-style-name="Standard" style:list-style-name="L4">
      <style:text-properties style:font-name="PT Astra Serif" fo:font-size="14pt" style:font-size-asian="14pt" style:font-size-complex="14pt"/>
    </style:style>
    <style:style style:name="P10" style:family="paragraph" style:parent-style-name="Standard" style:list-style-name="L5">
      <style:text-properties style:font-name="PT Astra Serif" fo:font-size="14pt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PT Astra Serif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3" style:master-page-name="">
      <style:paragraph-properties style:page-number="auto"/>
      <style:text-properties style:font-name="PT Astra Serif" fo:font-size="14pt" style:font-size-asian="14pt" style:font-size-complex="14pt"/>
    </style:style>
    <style:style style:name="P15" style:family="paragraph" style:parent-style-name="Standard" style:list-style-name="L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6" style:family="paragraph" style:parent-style-name="Standard" style:list-style-name="L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7" style:family="paragraph" style:parent-style-name="Standard" style:list-style-name="L8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font-name-asian="Times New Roman" style:font-name-complex="Times New Roman" style:language-complex="ar" style:country-complex="SA"/>
    </style:style>
    <style:style style:name="T5" style:family="text">
      <style:text-properties style:font-name="PT Astra Serif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439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0.878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318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1.757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2.196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2.635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3.074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3.514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3.953cm" text:min-label-width="0.635cm"/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4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Протокол № 5</text:p>
      <text:p text:style-name="P2">рабочего совещания отделения социального обслуживания на дому № 9</text:p>
      <text:p text:style-name="P2"><text:s text:c="90"/>от <text:span text:style-name="T7">28</text:span>.05.<text:span text:style-name="T8">2025</text:span></text:p>
      <text:p text:style-name="P4"><text:s text:c="2"/></text:p>
      <text:p text:style-name="P5">Присутствовали:</text:p>
      <text:list xml:id="list3639763724992781825" text:style-name="L1">
        <text:list-item>
          <text:p text:style-name="P6">Барябина О.А.</text:p>
        </text:list-item>
        <text:list-item>
          <text:p text:style-name="P6">Евстратова Г.А.</text:p>
        </text:list-item>
        <text:list-item>
          <text:p text:style-name="P7">Бойкова К.Ю.</text:p>
        </text:list-item>
        <text:list-item>
          <text:p text:style-name="P6">Смарунь Т.В.</text:p>
        </text:list-item>
        <text:list-item>
          <text:p text:style-name="P12"><text:s/><text:span text:style-name="T6">Рудник Т.С. </text:span></text:p>
        </text:list-item>
        <text:list-item>
          <text:p text:style-name="P6"><text:s/>Делиу Г.С. <text:s text:c="2"/></text:p>
        </text:list-item>
        <text:list-item>
          <text:p text:style-name="P6">Кошелева С.А.</text:p>
        </text:list-item>
        <text:list-item>
          <text:p text:style-name="P6">Обыденнова С.А.</text:p>
        </text:list-item>
        <text:list-item>
          <text:p text:style-name="P6">Беспалова Л.И.</text:p>
        </text:list-item>
        <text:list-item>
          <text:p text:style-name="P6">Коньшина Т.С</text:p>
        </text:list-item>
        <text:list-item>
          <text:p text:style-name="P6">Чепенко Ю.С.</text:p>
        </text:list-item>
        <text:list-item>
          <text:p text:style-name="P6">Мнацаканянц И.В.</text:p>
        </text:list-item>
        <text:list-item>
          <text:p text:style-name="P6">Калинкина Л.М.</text:p>
        </text:list-item>
        <text:list-item>
          <text:p text:style-name="P11">Чипига Е.В.</text:p>
        </text:list-item>
      </text:list>
      <text:p text:style-name="P4"><text:s text:c="56"/></text:p>
      <text:p text:style-name="P2">Повестка дня</text:p>
      <text:list xml:id="list1370222442959272942" text:style-name="L2">
        <text:list-item>
          <text:p text:style-name="P8">Подведение итогов проведенных мероприятий, посвященных « Дню Победы»</text:p>
        </text:list-item>
        <text:list-item>
          <text:p text:style-name="P8">Отчет социального работника <text:s/><text:span text:style-name="T8">Смарунь Т.В.</text:span></text:p>
        </text:list-item>
      </text:list>
      <text:p text:style-name="P3"><text:s text:c="5"/>3.Разное.</text:p>
      <text:list xml:id="list3030973642064212916" text:style-name="L3">
        <text:list-header>
          <text:p text:style-name="P14">1.По первому вопросу заслушали информацию <text:s/>зав. отделением Шершневу Т.И.</text:p>
        </text:list-header>
      </text:list>
      <text:p text:style-name="P3"><text:s text:c="11"/>Решение: работу отделения <text:s/>признать <text:s text:c="3"/>удовлетворительной.</text:p>
      <text:list xml:id="list1555964699558970767" text:style-name="L4">
        <text:list-header>
          <text:p text:style-name="P9">2. <text:span text:style-name="T3">По второму вопросу заслушали <text:s/></text:span><text:span text:style-name="T4">соц. работника</text:span> <text:s text:c="2"/><text:span text:style-name="T8">Смарунь Т.В.</text:span></text:p>
        </text:list-header>
      </text:list>
      <text:list xml:id="list8036401956704224551" text:style-name="L5">
        <text:list-header>
          <text:p text:style-name="P10">Решение: работу социального работника признать <text:s text:c="5"/>удовлетворительной.</text:p>
        </text:list-header>
      </text:list>
      <text:p text:style-name="P3"><text:s text:c="10"/>3.Разное:</text:p>
      <text:list xml:id="list1453203331096472840" text:style-name="L6">
        <text:list-header>
          <text:p text:style-name="P15"><text:span text:style-name="T1">-</text:span> работа с актами сдачи-приёмки оказанных потребителями услуг, соц. работниками; </text:p>
        </text:list-header>
      </text:list>
      <text:list xml:id="list2833821364234884526" text:style-name="L7">
        <text:list-header>
          <text:p text:style-name="P16"><text:span text:style-name="T2">-</text:span> <text:s text:c="3"/>Работа с маршрутными листами,</text:p>
        </text:list-header>
      </text:list>
      <text:list xml:id="list9194853186249988163" text:style-name="L8">
        <text:list-item>
          <text:list>
            <text:list-item>
              <text:list>
                <text:list-item>
                  <text:list>
                    <text:list-item>
                      <text:p text:style-name="P17">Работа с личными делами.</text:p>
                      <text:p text:style-name="P17"/>
                      <text:p text:style-name="P17"><text:s text:c="51"/></text:p>
                    </text:list-item>
                  </text:list>
                </text:list-item>
              </text:list>
            </text:list-item>
          </text:list>
        </text:list-item>
      </text:list>
      <text:list xml:id="list6165765810259307927" text:style-name="L9">
        <text:list-header>
          <text:p text:style-name="P13"><text:span text:style-name="T5"><text:s text:c="4"/>зав. Отделением № 9 <text:s text:c="15"/>Т.И. <text:s/>Шершнева <text:s text:c="51"/></text:span><text:s text:c="19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12cm" fo:margin-bottom="0.462cm" fo:margin-left="1.111cm" fo:margin-right="0.94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8-01-30T11:40:35</meta:creation-date>
    <dc:date>2025-07-29T15:12:15.62</dc:date>
    <meta:print-date>2020-09-22T12:05:28.15</meta:print-date>
    <dc:language>ru-RU</dc:language>
    <meta:editing-cycles>97</meta:editing-cycles>
    <meta:editing-duration>PT23H37M46S</meta:editing-duration>
    <meta:document-statistic meta:table-count="0" meta:image-count="0" meta:object-count="0" meta:page-count="1" meta:paragraph-count="34" meta:word-count="132" meta:character-count="1220"/>
    <meta:user-defined meta:name="Info 1"/>
    <meta:user-defined meta:name="Info 2"/>
    <meta:user-defined meta:name="Info 3"/>
    <meta:user-defined meta:name="Info 4"/>
  </office:meta>
</office:document-meta>
</file>
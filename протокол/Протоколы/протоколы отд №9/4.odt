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style:snap-to-layout-grid="false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style:font-name-asian="Times New Roman" style:font-size-asian="14pt" style:font-name-complex="Times New Roman" style:font-size-complex="14pt" style:language-complex="ar" style:country-complex="SA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9" style:family="paragraph" style:parent-style-name="Standard">
      <style:paragraph-properties fo:margin-top="0cm" fo:margin-bottom="0cm">
        <style:tab-stops>
          <style:tab-stop style:position="0.318cm"/>
          <style:tab-stop style:position="0.953cm"/>
        </style:tab-stops>
      </style:paragraph-properties>
      <style:text-properties style:font-name="Times New Roman" fo:font-size="14pt" fo:language="en" fo:country="US" style:font-size-asian="14pt" style:font-name-complex="Times New Roman" style:font-size-complex="14pt"/>
    </style:style>
    <style:style style:name="P10" style:family="paragraph" style:parent-style-name="Standard">
      <style:paragraph-properties fo:margin-left="1.953cm" fo:margin-right="0cm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Standard" style:list-style-name="L1">
      <style:paragraph-properties fo:text-align="start" style:justify-single-word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 style:list-style-name="WW8Num1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6" style:family="paragraph" style:parent-style-name="Standard" style:list-style-name="L1">
      <style:paragraph-properties fo:text-align="start" style:justify-single-word="false"/>
    </style:style>
    <style:style style:name="P17" style:family="paragraph" style:parent-style-name="Standard" style:list-style-name="WW8Num1">
      <style:paragraph-properties fo:margin-left="1.318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style:font-name-asian="Times New Roman" style:font-name-complex="Times New Roman" style:language-complex="ar" style:country-complex="SA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ротокол № 4</text:p>
      <text:p text:style-name="P1"><text:span text:style-name="T1">рабочего совещания отделения социального обслуживания на дому № 9 от 30.</text:span><text:span text:style-name="T2">04</text:span><text:span text:style-name="T1">.2025</text:span></text:p>
      <text:p text:style-name="P4">Присутствовали:</text:p>
      <text:list xml:id="list5232257223822364356" text:style-name="L1">
        <text:list-item>
          <text:p text:style-name="P12">Барябина О.А.</text:p>
        </text:list-item>
        <text:list-item>
          <text:p text:style-name="P13">Бойкова К.Ю.</text:p>
        </text:list-item>
        <text:list-item>
          <text:p text:style-name="P12">Смарунь Т.В.</text:p>
        </text:list-item>
        <text:list-item>
          <text:p text:style-name="P16"><text:s/><text:span text:style-name="T5">Рудник Т.С. </text:span></text:p>
        </text:list-item>
        <text:list-item>
          <text:p text:style-name="P12"><text:s/>Делиу Г.С. <text:s text:c="2"/></text:p>
        </text:list-item>
        <text:list-item>
          <text:p text:style-name="P12">Обыденнова С.А.</text:p>
        </text:list-item>
        <text:list-item>
          <text:p text:style-name="P12">Беспалова Л.И.</text:p>
        </text:list-item>
        <text:list-item>
          <text:p text:style-name="P12">Коньшина Т.С</text:p>
        </text:list-item>
        <text:list-item>
          <text:p text:style-name="P12">Чепенко Ю.С.</text:p>
        </text:list-item>
        <text:list-item>
          <text:p text:style-name="P12">Мнацаканянц И.В.</text:p>
        </text:list-item>
        <text:list-item>
          <text:p text:style-name="P12">Калинкина Л.М.</text:p>
        </text:list-item>
        <text:list-item>
          <text:p text:style-name="P14">Чипига Е.В.</text:p>
        </text:list-item>
        <text:list-item>
          <text:p text:style-name="P14">Евстратова Г.А.</text:p>
        </text:list-item>
        <text:list-item>
          <text:p text:style-name="P14">Кошелева С.А.</text:p>
        </text:list-item>
      </text:list>
      <text:p text:style-name="P8">Повестка дня:</text:p>
      <text:p text:style-name="P9">1.Итоги работы отделения за 1 квартал <text:span text:style-name="T6">2025года</text:span>.</text:p>
      <text:p text:style-name="P6">2. Отчет социального работника Коньшиной Т.С.</text:p>
      <text:p text:style-name="P6">3 Разное.</text:p>
      <text:p text:style-name="P3"><text:s/></text:p>
      <text:p text:style-name="P3">По первому вопросу <text:s/>заслушали зав. отд. Шершневу Т.И . она ознакомила с итогами работы за 1-й квартал 2025 г.</text:p>
      <text:p text:style-name="P5">Решение: принять информацию к сведению.</text:p>
      <text:p text:style-name="P2"><text:span text:style-name="T3">По второму вопросу заслушали <text:s/></text:span><text:span text:style-name="T4">соц. работника Коньшину Т.С.</text:span></text:p>
      <text:p text:style-name="P7">Решение: признать работу соц. работника Коньшиной Т.С. - удовлетворительной</text:p>
      <text:p text:style-name="P3">Разное: <text:s/></text:p>
      <text:list xml:id="list7868348571789600525" text:style-name="WW8Num1">
        <text:list-item>
          <text:list>
            <text:list-item>
              <text:list>
                <text:list-item>
                  <text:list>
                    <text:list-item>
                      <text:p text:style-name="P15">Работа с маршрутными листами..</text:p>
                    </text:list-item>
                    <text:list-item>
                      <text:p text:style-name="P15">прохождение флюорографического обследования в соответствии с графиком (один раз в год); </text:p>
                    </text:list-item>
                    <text:list-item>
                      <text:p text:style-name="P15">работа с актами сдачи-приёмки оказанных потребителям услуг, соц. работниками;</text:p>
                    </text:list-item>
                    <text:list-item>
                      <text:p text:style-name="P15">Работа с личными делами.</text:p>
                    </text:list-item>
                    <text:list-item>
                      <text:p text:style-name="P15">Поздравление на дому юбиляров не находящихся на обслуживании центра от министерства социального развития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35382929" text:continue-numbering="true" text:style-name="WW8Num1">
        <text:list-item>
          <text:list>
            <text:list-item>
              <text:list>
                <text:list-item>
                  <text:list>
                    <text:list-header>
                      <text:p text:style-name="P17"/>
                    </text:list-header>
                  </text:list>
                </text:list-item>
              </text:list>
            </text:list-item>
          </text:list>
        </text:list-item>
      </text:list>
      <text:p text:style-name="P3">Зав.отделением №9 <text:s text:c="29"/>Т.И. <text:s/>Шершнева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2pt" fo:language="ru" fo:country="RU" style:font-name-asian="Lucida Sans Unicode" style:font-size-asian="12pt" style:language-asian="zh" style:country-asian="CN" style:font-name-complex="Tahoma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1z0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Lucida Sans Unicode" style:font-size-asian="8pt" style:font-name-complex="Tahoma" style:font-size-complex="8pt" style:language-complex="ru" style:country-complex="RU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074cm" fo:text-indent="-0.635cm" fo:margin-left="1.074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1.513cm" fo:text-indent="-0.635cm" fo:margin-left="1.513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53cm" fo:text-indent="-0.635cm" fo:margin-left="1.953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8-01-30T12:40:00</meta:creation-date>
    <dc:date>2025-07-29T15:11:08.88</dc:date>
    <meta:print-date>2022-03-02T12:02:48.76</meta:print-date>
    <meta:editing-cycles>15</meta:editing-cycles>
    <meta:editing-duration>PT53M48S</meta:editing-duration>
    <meta:generator>OpenOffice/4.1.7$Win32 OpenOffice.org_project/417m1$Build-9800</meta:generator>
    <meta:printed-by>Татьяна </meta:printed-by>
    <meta:document-statistic meta:table-count="0" meta:image-count="0" meta:object-count="0" meta:page-count="1" meta:paragraph-count="33" meta:word-count="166" meta:character-count="1121"/>
  </office:meta>
</office:document-meta>
</file>
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Text_20_body_20_indent" style:list-style-name="L2">
      <style:paragraph-properties fo:margin-left="0cm" fo:margin-right="0cm" fo:margin-top="0cm" fo:margin-bottom="0cm" fo:text-indent="0cm" style:auto-text-indent="false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 style:list-style-name="WW8Num1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 style:list-style-name="WW8Num1">
      <style:paragraph-properties fo:margin-left="1.953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font-name-complex="Times New Roman"/>
    </style:style>
    <style:style style:name="T4" style:family="text">
      <style:text-properties style:font-name-asian="Times New Roman" style:font-name-complex="Times New Roman" style:language-complex="ar" style:country-complex="SA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style:font-name-asian="Times New Roman" style:font-name-complex="Times New Roman" style:language-complex="ar" style:country-complex="S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отокол № 2</text:p>
      <text:p text:style-name="P1"><text:span text:style-name="T1">рабочего совещания отделения социального обслуживания на дому № 5 от 26</text:span><text:span text:style-name="T2">.02</text:span><text:span text:style-name="T1">.2025</text:span></text:p>
      <text:p text:style-name="P4">Присутствовали:</text:p>
      <text:list xml:id="list5197674076528795792" text:style-name="L1">
        <text:list-item>
          <text:p text:style-name="P11">Клеина Е.В.</text:p>
        </text:list-item>
        <text:list-item>
          <text:p text:style-name="P11">Ерастова М.Ю.</text:p>
        </text:list-item>
        <text:list-item>
          <text:p text:style-name="P11">Чурикова О.Ю.</text:p>
        </text:list-item>
        <text:list-item>
          <text:p text:style-name="P11">Кузнецова Н.В.</text:p>
        </text:list-item>
        <text:list-item>
          <text:p text:style-name="P11">Преображенская И.В.</text:p>
        </text:list-item>
        <text:list-item>
          <text:p text:style-name="P11">Серебрякова Е.Е.</text:p>
        </text:list-item>
        <text:list-item>
          <text:p text:style-name="P11">Иванова Е.Г.</text:p>
        </text:list-item>
        <text:list-item>
          <text:p text:style-name="P11">Былинкина О.В.</text:p>
        </text:list-item>
        <text:list-item>
          <text:p text:style-name="P11">Морозова М.А.</text:p>
        </text:list-item>
        <text:list-item>
          <text:p text:style-name="P11">Доронина Ю.Г.</text:p>
        </text:list-item>
        <text:list-item>
          <text:p text:style-name="P11">Хабарова В.В.</text:p>
        </text:list-item>
        <text:list-item>
          <text:p text:style-name="P11">Березуцкая О.С.</text:p>
        </text:list-item>
        <text:list-item>
          <text:p text:style-name="P12">Лапина К.И.</text:p>
        </text:list-item>
        <text:list-item>
          <text:p text:style-name="P12">Козлова Е.А.</text:p>
        </text:list-item>
      </text:list>
      <text:p text:style-name="P5">Повестка дня:</text:p>
      <text:p text:style-name="P3"/>
      <text:p text:style-name="P6">1. <text:s text:c="4"/>Развитие проектной деятельности в Центре.</text:p>
      <text:list xml:id="list1426727428273097262" text:style-name="L2">
        <text:list-item>
          <text:p text:style-name="P9">Отчет социального работника Дорониной Ю.Г.</text:p>
        </text:list-item>
        <text:list-item>
          <text:p text:style-name="P9">Разное</text:p>
          <text:p text:style-name="P9"/>
        </text:list-item>
      </text:list>
      <text:p text:style-name="P3"><text:s/></text:p>
      <text:p text:style-name="P3">По первому вопросу <text:s/>заслушали зав. отд. <text:s/>Мишакову И.Г</text:p>
      <text:p text:style-name="P7">Решение: принять информацию к сведению.</text:p>
      <text:p text:style-name="P8"><text:span text:style-name="T5">По второму вопросу заслушали <text:s/></text:span><text:span text:style-name="T6">соц. работника Доронину Ю.Г.</text:span></text:p>
      <text:p text:style-name="P2"><text:span text:style-name="T4">Решение: признать работу соц. работника Дорониной Ю.Г.- удовлетворительной </text:span><text:span text:style-name="T3">Разное:</text:span></text:p>
      <text:list xml:id="list3842978694903393747" text:style-name="WW8Num1">
        <text:list-item>
          <text:list>
            <text:list-item>
              <text:list>
                <text:list-item>
                  <text:list>
                    <text:list-item>
                      <text:p text:style-name="P13">работа с актами сдачи-приёмки оказанных потребителям услуг, соц. работниками; </text:p>
                    </text:list-item>
                    <text:list-item>
                      <text:p text:style-name="P13">прохождение флюорографического обследования в соответствии с графиком (один раз в год); </text:p>
                    </text:list-item>
                    <text:list-item>
                      <text:p text:style-name="P13">Работа с маршрутными листами.</text:p>
                    </text:list-item>
                    <text:list-item>
                      <text:p text:style-name="P13">Работа с личными делами.</text:p>
                    </text:list-item>
                    <text:list-item>
                      <text:p text:style-name="P14">Подворный обход соц. работниками участка .</text:p>
                    </text:list-item>
                    <text:list-item>
                      <text:p text:style-name="P14">Поздравление на дому юбиляров не находящихся на обслуживании центра от министерства социального развития.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>Зав.отделением №5 <text:s text:c="36"/>Мишакова И.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WW8Num1z0" style:family="text">
      <style:text-properties style:font-name-complex="Times New Roman"/>
    </style:style>
    <style:style style:name="WW8Num2z0" style:family="text">
      <style:text-properties style:font-name="Times New Roman" fo:font-size="12pt" style:font-size-asian="12pt" style:font-name-complex="Times New Roman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074cm" fo:text-indent="-0.635cm" fo:margin-left="1.074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53cm" fo:text-indent="-0.635cm" fo:margin-left="1.953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94cm" fo:margin-bottom="0.093cm" fo:margin-left="2cm" fo:margin-right="1.274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2-14T14:38:51.30</dc:date>
    <meta:print-date>2019-10-28T12:53:00</meta:print-date>
    <meta:editing-cycles>16</meta:editing-cycles>
    <meta:editing-duration>PT1H31S</meta:editing-duration>
    <meta:generator>OpenOffice/4.1.7$Win32 OpenOffice.org_project/417m1$Build-9800</meta:generator>
    <meta:document-statistic meta:table-count="0" meta:image-count="0" meta:object-count="0" meta:page-count="1" meta:paragraph-count="33" meta:word-count="160" meta:character-count="1113"/>
  </office:meta>
</office:document-meta>
</file>
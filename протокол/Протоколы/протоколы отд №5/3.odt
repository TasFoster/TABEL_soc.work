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9" style:family="paragraph" style:parent-style-name="Standard"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fo:language="en" fo:country="US" style:font-size-asian="14pt" style:font-name-complex="Times New Roman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L2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 style:list-style-name="L2">
      <style:paragraph-properties style:snap-to-layout-gri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 style:list-style-name="WW8Num1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№ 3</text:p>
      <text:p text:style-name="P1"><text:span text:style-name="T1">рабочего совещания отделения социального обслуживания на дому № 5 от 26.</text:span><text:span text:style-name="T2">03</text:span><text:span text:style-name="T1">.2025</text:span></text:p>
      <text:p text:style-name="P2"/>
      <text:p text:style-name="P5"/>
      <text:p text:style-name="P5">Присутствовали:</text:p>
      <text:p text:style-name="P5"/>
      <text:p text:style-name="P9"><text:s text:c="6"/></text:p>
      <text:list xml:id="list531174388254345663" text:style-name="L1">
        <text:list-item>
          <text:p text:style-name="P12">Ерастова М.Ю.</text:p>
        </text:list-item>
        <text:list-item>
          <text:p text:style-name="P12">Клеина Е.В.</text:p>
        </text:list-item>
        <text:list-item>
          <text:p text:style-name="P12">Чурикова О.Ю.</text:p>
        </text:list-item>
        <text:list-item>
          <text:p text:style-name="P12">Кузнецова Н.В.</text:p>
        </text:list-item>
        <text:list-item>
          <text:p text:style-name="P12">Преображенская И.В.</text:p>
        </text:list-item>
        <text:list-item>
          <text:p text:style-name="P12">Иванова Е.Г.</text:p>
        </text:list-item>
        <text:list-item>
          <text:p text:style-name="P12">Былинкина О.В.</text:p>
        </text:list-item>
        <text:list-item>
          <text:p text:style-name="P12">Морозова М.А.</text:p>
        </text:list-item>
        <text:list-item>
          <text:p text:style-name="P12">Доронина Ю.Г.</text:p>
        </text:list-item>
        <text:list-item>
          <text:p text:style-name="P12">Хабарова В.В.</text:p>
        </text:list-item>
        <text:list-item>
          <text:p text:style-name="P12">Березуцкая О.С.</text:p>
        </text:list-item>
        <text:list-item>
          <text:p text:style-name="P13">Лапина К.И.</text:p>
        </text:list-item>
        <text:list-item>
          <text:p text:style-name="P13">Козлова Е.А.</text:p>
        </text:list-item>
      </text:list>
      <text:p text:style-name="P5"><text:s/>Отсутствующие: Серебрякова Е.Е. отпуск</text:p>
      <text:p text:style-name="P6">Повестка дня:</text:p>
      <text:p text:style-name="P4"/>
      <text:p text:style-name="P10"><text:s text:c="5"/>1.Итоги работы отделения за 1 квартал 2025года.</text:p>
      <text:list xml:id="list2360900952531384856" text:style-name="L2">
        <text:list-item>
          <text:p text:style-name="P14">Отчет социального работника Ерастовой М.Ю.</text:p>
        </text:list-item>
        <text:list-item>
          <text:p text:style-name="P16"><text:s/>Разное.</text:p>
        </text:list-item>
      </text:list>
      <text:p text:style-name="P4">По первому вопросу <text:s/>заслушали зав. отд. Мишакову И.Г . она ознакомила с итогами работы за 1-й квартал 2025 г.</text:p>
      <text:p text:style-name="P7">Решение: принять информацию к сведению.</text:p>
      <text:p text:style-name="P3"><text:span text:style-name="T3">По второму вопросу заслушали <text:s/></text:span><text:span text:style-name="T4">соц. работника Ерастову М.Ю.</text:span></text:p>
      <text:p text:style-name="P8">Решение: признать работу соц. работника Ерастовой М.Ю. - удовлетворительной</text:p>
      <text:p text:style-name="P4">Разное:</text:p>
      <text:list xml:id="list5666390879051215519" text:style-name="L3">
        <text:list-item>
          <text:list>
            <text:list-item>
              <text:p text:style-name="P17"><text:span text:style-name="T3">Работа с маршрутными листами.</text:span> </text:p>
            </text:list-item>
            <text:list-item>
              <text:p text:style-name="P15">работа с актами сдачи-приёмки оказанных потребителям услуг, соц. работниками; </text:p>
            </text:list-item>
            <text:list-item>
              <text:p text:style-name="P15">прохождение флюорографического обследования в соответствии с графиком (один раз в год); </text:p>
            </text:list-item>
            <text:list-item>
              <text:p text:style-name="P15">Работа с маршрутными листами.</text:p>
            </text:list-item>
          </text:list>
        </text:list-item>
      </text:list>
      <text:list xml:id="list7319516904434597756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8">Работа с личными делами.</text:p>
                    </text:list-item>
                    <text:list-item>
                      <text:p text:style-name="P18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Зав.отделением №5 <text:s text:c="35"/>И.Г. Мишако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1.046cm" fo:margin-left="2cm" fo:margin-right="1.406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7:14.38</dc:date>
    <meta:print-date>2023-02-28T16:47:58.77</meta:print-date>
    <meta:editing-cycles>18</meta:editing-cycles>
    <meta:editing-duration>PT1H34S</meta:editing-duration>
    <meta:generator>OpenOffice/4.1.4$Win32 OpenOffice.org_project/414m5$Build-9788</meta:generator>
    <meta:document-statistic meta:table-count="0" meta:image-count="0" meta:object-count="0" meta:page-count="1" meta:paragraph-count="34" meta:word-count="172" meta:character-count="1187"/>
    <dc:creator>Татьяна Шершнева</dc:creator>
  </office:meta>
</office:document-meta>
</file>
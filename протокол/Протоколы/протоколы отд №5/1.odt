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P10" style:family="paragraph" style:parent-style-name="Standard">
      <style:text-properties style:use-window-font-color="true" style:font-name="Times New Roman" fo:font-size="14pt" fo:language="ru" fo:country="RU" style:letter-kerning="true" style:font-name-asian="Lucida Sans Unicode1" style:font-size-asian="14pt" style:language-asian="zxx" style:country-asian="none" style:font-name-complex="Times New Roman" style:font-size-complex="14pt" style:language-complex="zxx" style:country-complex="non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L2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name-complex="Times New Roman"/>
    </style:style>
    <style:style style:name="T2" style:family="text">
      <style:text-properties style:font-name-asian="Times New Roman" style:font-name-complex="Times New Roman" style:language-complex="ar" style:country-complex="SA"/>
    </style:style>
    <style:style style:name="T3" style:family="text">
      <style:text-properties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№ 1</text:p>
      <text:p text:style-name="P1">рабочего совещания отделения социального обслуживания на дому № 5 от 29.01.2025</text:p>
      <text:p text:style-name="P3"/>
      <text:p text:style-name="P5">Присутствовали:</text:p>
      <text:list xml:id="list3735175603836981583" text:style-name="L1">
        <text:list-item>
          <text:p text:style-name="P12">Клеина Е.В.</text:p>
        </text:list-item>
        <text:list-item>
          <text:p text:style-name="P12">Ерастова М.Ю.</text:p>
        </text:list-item>
        <text:list-item>
          <text:p text:style-name="P12">Чурикова О.Ю.</text:p>
        </text:list-item>
        <text:list-item>
          <text:p text:style-name="P12">Кузнецова Н.В.</text:p>
        </text:list-item>
        <text:list-item>
          <text:p text:style-name="P12">Преображенская И.В.</text:p>
        </text:list-item>
        <text:list-item>
          <text:p text:style-name="P12">Серебрякова Е.Е.</text:p>
        </text:list-item>
        <text:list-item>
          <text:p text:style-name="P12">Иванова Е.Г.</text:p>
        </text:list-item>
        <text:list-item>
          <text:p text:style-name="P12">Былинкина О.В.</text:p>
        </text:list-item>
        <text:list-item>
          <text:p text:style-name="P12">Морозова М.А.</text:p>
        </text:list-item>
        <text:list-item>
          <text:p text:style-name="P12">Доронина Ю.Г.</text:p>
        </text:list-item>
        <text:list-item>
          <text:p text:style-name="P12">Хабарова В.В.</text:p>
        </text:list-item>
        <text:list-item>
          <text:p text:style-name="P12">Березуцкая О.С.</text:p>
        </text:list-item>
        <text:list-item>
          <text:p text:style-name="P13">Лапина К.И.</text:p>
        </text:list-item>
        <text:list-item>
          <text:p text:style-name="P13">Козлова Е.А.</text:p>
        </text:list-item>
      </text:list>
      <text:p text:style-name="P5"><text:s text:c="8"/></text:p>
      <text:p text:style-name="P6">Повестка дня:</text:p>
      <text:p text:style-name="P4"/>
      <text:list xml:id="list1632641318792030628" text:style-name="L2">
        <text:list-item>
          <text:list>
            <text:list-item>
              <text:p text:style-name="P14">Планирование работы отделения на 2025 <text:s/>год.</text:p>
            </text:list-item>
            <text:list-item>
              <text:p text:style-name="P14">Отчет социального работника Березуцкой О.С.</text:p>
            </text:list-item>
            <text:list-item>
              <text:p text:style-name="P14">Разное.</text:p>
            </text:list-item>
          </text:list>
        </text:list-item>
      </text:list>
      <text:p text:style-name="P4"><text:s/></text:p>
      <text:p text:style-name="P4">По первому вопросу <text:s/>заслушали зав. отд. Мишакову И.Г . она ознакомила с планом работы на 2025 г.</text:p>
      <text:p text:style-name="P7">Решение: принять информацию к сведению.</text:p>
      <text:p text:style-name="P2"><text:span text:style-name="T4">По второму вопросу заслушали <text:s/></text:span><text:span text:style-name="T5">соц. работника Березуцкую О.С.</text:span></text:p>
      <text:p text:style-name="P9"><text:span text:style-name="T2">Решение: признать работу соц. работника </text:span>Березуцкой О.С.<text:span text:style-name="T2"> - удовлетворительной</text:span></text:p>
      <text:p text:style-name="P4">Разное:</text:p>
      <text:p text:style-name="P4">- о правильном заполнении маршрутных листов, </text:p>
      <text:p text:style-name="P10">- о правильном заполнении актов. </text:p>
      <text:p text:style-name="P8"><text:span text:style-name="T1">- о прохождении </text:span><text:span text:style-name="T3">FL</text:span><text:span text:style-name="T1">/соответствии </text:span><text:span text:style-name="T3">c</text:span><text:span text:style-name="T1"> графиком/.</text:span></text:p>
      <text:p text:style-name="P4"/>
      <text:p text:style-name="P4"/>
      <text:p text:style-name="P4">Зав.отделением №5 <text:s text:c="36"/>Мишакова И.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, 'Arial Unicode MS'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1.97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7:08.16</dc:date>
    <meta:print-date>2019-10-28T12:53:00</meta:print-date>
    <meta:editing-cycles>21</meta:editing-cycles>
    <meta:editing-duration>P1DT1H50M38S</meta:editing-duration>
    <meta:generator>OpenOffice/4.1.4$Win32 OpenOffice.org_project/414m5$Build-9788</meta:generator>
    <meta:document-statistic meta:table-count="0" meta:image-count="0" meta:object-count="0" meta:page-count="1" meta:paragraph-count="32" meta:word-count="135" meta:character-count="916"/>
    <dc:creator>Татьяна Шершнева</dc:creator>
  </office:meta>
</office:document-meta>
</file>
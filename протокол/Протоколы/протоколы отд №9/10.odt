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PT Astra Serif" fo:font-size="14pt" fo:language="ru" fo:country="RU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top="0.176cm" fo:margin-bottom="0.176cm" fo:orphans="2" fo:widows="2" fo:hyphenation-ladder-count="no-limit"/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fo:hyphenate="true" fo:hyphenation-remain-char-count="2" fo:hyphenation-push-char-count="2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PT Astra Serif" fo:font-size="14pt" style:font-size-asian="14pt" style:font-name-complex="Times New Roman" style:font-size-complex="14pt"/>
    </style:style>
    <style:style style:name="P10" style:family="paragraph" style:parent-style-name="Standard" style:list-style-name="L2">
      <style:paragraph-properties fo:margin-top="0.176cm" fo:margin-bottom="0.176cm" fo:orphans="2" fo:widows="2" fo:hyphenation-ladder-count="no-limit"/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fo:hyphenate="true" fo:hyphenation-remain-char-count="2" fo:hyphenation-push-char-count="2"/>
    </style:style>
    <style:style style:name="T1" style:family="text">
      <style:text-properties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отокол № 10</text:p>
      <text:p text:style-name="P1">рабочего совещания отделения социального обслуживания на дому № 9 от 29.10.2025 г.</text:p>
      <text:p text:style-name="P4"><text:s/><text:span text:style-name="T1">Присутствовали:</text:span></text:p>
      <text:list xml:id="list1865446225318515658" text:style-name="L1">
        <text:list-item>
          <text:p text:style-name="P8">Евстратова Г.А.</text:p>
        </text:list-item>
        <text:list-item>
          <text:p text:style-name="P8">Рудник Т.С. </text:p>
        </text:list-item>
        <text:list-item>
          <text:p text:style-name="P8">Делиу Г.С. </text:p>
        </text:list-item>
        <text:list-item>
          <text:p text:style-name="P8">Булычева И.А.</text:p>
        </text:list-item>
        <text:list-item>
          <text:p text:style-name="P8">Кошелева С.А.</text:p>
        </text:list-item>
        <text:list-item>
          <text:p text:style-name="P8">Коньшина Т.С</text:p>
        </text:list-item>
        <text:list-item>
          <text:p text:style-name="P8">Обыденнова С.А.</text:p>
        </text:list-item>
        <text:list-item>
          <text:p text:style-name="P8">Беспалова Л.И.</text:p>
        </text:list-item>
        <text:list-item>
          <text:p text:style-name="P8">Чепенко Ю.С.</text:p>
        </text:list-item>
        <text:list-item>
          <text:p text:style-name="P8">Калинкина Л.М.</text:p>
        </text:list-item>
        <text:list-item>
          <text:p text:style-name="P8">Барябина О.А.</text:p>
        </text:list-item>
        <text:list-item>
          <text:p text:style-name="P9">Чипига Е.В.</text:p>
        </text:list-item>
        <text:list-item>
          <text:p text:style-name="P9">Смарунь Т.В</text:p>
        </text:list-item>
      </text:list>
      <text:p text:style-name="P5"/>
      <text:p text:style-name="P5"><text:s text:c="2"/>Отсутствующие : Бойкова К.Ю., Мнацаканянц И.В. отпуск.</text:p>
      <text:p text:style-name="P3"/>
      <text:p text:style-name="P1">Повестка дня: </text:p>
      <text:list xml:id="list1407185988730910623" text:style-name="L2">
        <text:list-item>
          <text:p text:style-name="P10">Контроль за качеством выполнения социальных услуг.</text:p>
        </text:list-item>
        <text:list-item>
          <text:p text:style-name="P10">Отчет соц. работника Смарунь Т.В.</text:p>
        </text:list-item>
      </text:list>
      <text:p text:style-name="P6"><text:s text:c="5"/>3. Разное.</text:p>
      <text:p text:style-name="P6">По первому вопросу заслушали зав. отделением Шершнева Т.И., она ознакомила с анализом качества ведения актов приемки оказания социальных услуг. </text:p>
      <text:p text:style-name="P6">Решение: принять информацию к сведению.</text:p>
      <text:p text:style-name="P6">По второму вопросу заслушали отчет соц. работника Смарунь Т.В. о выполнении гос задания за 9 месяцев.</text:p>
      <text:p text:style-name="P6">Решение: признать работу удовлетворительной.</text:p>
      <text:p text:style-name="P6">Разное:- <text:s text:c="2"/>проведение субботника.</text:p>
      <text:p text:style-name="P2">Зав. Отделением № 9 <text:s text:c="33"/>Шершнева Т.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176cm" fo:orphans="2" fo:widows="2" fo:hyphenation-ladder-count="no-limit"/>
      <style:text-properties style:font-name="Times New Roman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7-29T15:16:38.57</dc:date>
    <meta:print-date>2024-04-08T10:53:28.18</meta:print-date>
    <meta:editing-cycles>19</meta:editing-cycles>
    <meta:editing-duration>PT2H9M22S</meta:editing-duration>
    <meta:generator>OpenOffice/4.1.7$Win32 OpenOffice.org_project/417m1$Build-9800</meta:generator>
    <meta:document-statistic meta:table-count="0" meta:image-count="0" meta:object-count="0" meta:page-count="1" meta:paragraph-count="27" meta:word-count="132" meta:character-count="906"/>
  </office:meta>
</office:document-meta>
</file>
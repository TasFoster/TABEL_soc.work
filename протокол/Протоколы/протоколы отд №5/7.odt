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style:snap-to-layout-gri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Standard" style:list-style-name="WW8Num1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 style:list-style-name="WW8Num1">
      <style:paragraph-properties fo:margin-left="1.953cm" fo:margin-right="0cm" fo:text-align="justify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14" style:family="paragraph" style:parent-style-name="Text_20_body_20_indent" style:list-style-name="L2">
      <style:paragraph-properties fo:margin-top="0cm" fo:margin-bottom="0cm">
        <style:tab-stops>
          <style:tab-stop style:position="0.318cm"/>
          <style:tab-stop style:position="0.953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Text_20_body_20_indent" style:list-style-name="L2" style:master-page-name="">
      <style:paragraph-properties fo:margin-left="-0.397cm" fo:margin-right="0cm" fo:margin-top="0cm" fo:margin-bottom="0cm" fo:orphans="0" fo:widows="0" fo:hyphenation-ladder-count="no-limit" fo:text-indent="0cm" style:auto-text-indent="false" style:page-number="auto" style:writing-mode="lr-tb">
        <style:tab-stops>
          <style:tab-stop style:position="0.318cm"/>
          <style:tab-stop style:position="0.953cm"/>
        </style:tab-stops>
      </style:paragraph-properties>
      <style:text-properties style:font-name="Times New Roman" fo:font-size="14pt" style:font-size-asian="14pt" style:font-name-complex="Times New Roman" style:font-size-complex="14pt" fo:hyphenate="false" fo:hyphenation-remain-char-count="2" fo:hyphenation-push-char-count="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style:font-name-complex="Times New Roman"/>
    </style:style>
    <style:style style:name="T4" style:family="text">
      <style:text-properties style:font-name-asian="Times New Roman" style:font-name-complex="Times New Roman" style:language-complex="ar" style:country-complex="SA"/>
    </style:style>
    <style:style style:name="T5" style:family="text">
      <style:text-properties style:font-name="Times New Roman" style:font-name-complex="Times New Roman"/>
    </style:style>
    <style:style style:name="T6" style:family="text">
      <style:text-properties style:font-name="Times New Roman" style:font-name-asian="Times New Roman" style:font-name-complex="Times New Roman" style:language-complex="ar" style:country-complex="SA"/>
    </style:style>
    <style:style style:name="T7" style:family="text">
      <style:text-properties fo:language="ru" fo:country="RU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cm" fo:text-indent="-0.635cm" fo:margin-left="2.14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8cm" fo:text-indent="-0.635cm" fo:margin-left="2.77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13cm" fo:text-indent="-0.635cm" fo:margin-left="3.41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48cm" fo:text-indent="-0.635cm" fo:margin-left="4.04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83cm" fo:text-indent="-0.635cm" fo:margin-left="4.68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18cm" fo:text-indent="-0.635cm" fo:margin-left="5.31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53cm" fo:text-indent="-0.635cm" fo:margin-left="5.9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88cm" fo:text-indent="-0.635cm" fo:margin-left="6.58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23cm" fo:text-indent="-0.635cm" fo:margin-left="7.22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58cm" fo:text-indent="-0.635cm" fo:margin-left="7.858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Протокол № 7</text:p>
      <text:p text:style-name="P1"><text:span text:style-name="T1">рабочего совещания отделения социального обслуживания на дому № 5 от 30</text:span><text:span text:style-name="T2">.07.202</text:span><text:span text:style-name="T7">5</text:span></text:p>
      <text:p text:style-name="P4">Присутствовали:</text:p>
      <text:list xml:id="list3153112282104881725" text:style-name="L1">
        <text:list-item>
          <text:p text:style-name="P10">Клеина Е.В.</text:p>
        </text:list-item>
        <text:list-item>
          <text:p text:style-name="P10">Ерастова М.Ю.</text:p>
        </text:list-item>
        <text:list-item>
          <text:p text:style-name="P10">Чурикова О.Ю.</text:p>
        </text:list-item>
        <text:list-item>
          <text:p text:style-name="P10">Кузнецова Н.В.</text:p>
        </text:list-item>
        <text:list-item>
          <text:p text:style-name="P10">Преображенская И.В.</text:p>
        </text:list-item>
        <text:list-item>
          <text:p text:style-name="P10">Серебрякова Е.Е.</text:p>
        </text:list-item>
        <text:list-item>
          <text:p text:style-name="P10">Былинкина О.В.</text:p>
        </text:list-item>
        <text:list-item>
          <text:p text:style-name="P10">Доронина Ю.Г.</text:p>
        </text:list-item>
        <text:list-item>
          <text:p text:style-name="P10">Хабарова В.В.</text:p>
        </text:list-item>
        <text:list-item>
          <text:p text:style-name="P11">Лапина К.И.</text:p>
        </text:list-item>
        <text:list-item>
          <text:p text:style-name="P11">Козлова Е.А.</text:p>
        </text:list-item>
      </text:list>
      <text:p text:style-name="P4">Отсутствующие: Морозова М.А.,Березуцкая О.С., Иванова Е.Г. отпуск.</text:p>
      <text:p text:style-name="P4"/>
      <text:p text:style-name="P7">Повестка дня:</text:p>
      <text:p text:style-name="P5"><text:s text:c="5"/>1. <text:s/>Инновационные формы работы по обслуживанию рызличных категорий граждан.</text:p>
      <text:list xml:id="list2430605067598116124" text:style-name="L2">
        <text:list-item>
          <text:p text:style-name="P14">Отчет социального работника Былинкиной О.В.</text:p>
        </text:list-item>
        <text:list-item>
          <text:p text:style-name="P14">Разное.</text:p>
          <text:list>
            <text:list-item>
              <text:list>
                <text:list-item>
                  <text:list>
                    <text:list-header>
                      <text:p text:style-name="P15"><text:s/></text:p>
                    </text:list-header>
                  </text:list>
                </text:list-item>
              </text:list>
            </text:list-item>
          </text:list>
        </text:list-item>
      </text:list>
      <text:p text:style-name="P3">По первому вопросу <text:s/>заслушали зав. отд. <text:s/>Мишакову И.Г</text:p>
      <text:p text:style-name="P6">Решение: принять информацию к сведению.</text:p>
      <text:p text:style-name="P8"><text:span text:style-name="T5">По второму вопросу заслушали <text:s/></text:span><text:span text:style-name="T6">соц. работника Былинкину О.В.</text:span></text:p>
      <text:p text:style-name="P2"><text:span text:style-name="T4">Решение: признать работу соц. работника Былинкиной О.В. - удовлетворительной </text:span><text:span text:style-name="T3">Разное:</text:span></text:p>
      <text:list xml:id="list7071263036705816065" text:style-name="WW8Num1">
        <text:list-item>
          <text:list>
            <text:list-item>
              <text:list>
                <text:list-item>
                  <text:list>
                    <text:list-item>
                      <text:p text:style-name="P12">работа с актами сдачи-приёмки оказанных потребителям услуг, соц. работниками; </text:p>
                    </text:list-item>
                    <text:list-item>
                      <text:p text:style-name="P12">прохождение флюорографического обследования в соответствии с графиком (один раз в год); </text:p>
                    </text:list-item>
                    <text:list-item>
                      <text:p text:style-name="P12">Работа с маршрутными листами.</text:p>
                    </text:list-item>
                    <text:list-item>
                      <text:p text:style-name="P12">Работа с личными делами.</text:p>
                    </text:list-item>
                    <text:list-item>
                      <text:p text:style-name="P13">Подворный обход соц. работниками участка .</text:p>
                    </text:list-item>
                    <text:list-item>
                      <text:p text:style-name="P13">Поздравление на дому юбиляров не находящихся на обслуживании центра от министерства социального развития.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p text:style-name="P3">Зав.отделением №5 <text:s text:c="28"/>И.Г. Мишакова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" fo:font-size="12pt" fo:language="ru" fo:country="RU" style:font-name-asian="Lucida Sans Unicode" style:font-size-asian="12pt" style:language-asian="zh" style:country-asian="CN" style:font-name-complex="Tahoma" style:font-size-complex="12pt" style:language-complex="ru" style:country-complex="RU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WW8Num1z0" style:family="text">
      <style:text-properties style:font-name-complex="Times New Roman"/>
    </style:style>
    <style:style style:name="WW8Num2z0" style:family="text">
      <style:text-properties style:font-name="Times New Roman" fo:font-size="12pt" style:font-size-asian="12pt" style:font-name-complex="Times New Roman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name-asian="Lucida Sans Unicode" style:font-size-asian="8pt" style:font-name-complex="Tahoma" style:font-size-complex="8pt" style:language-complex="ru" style:country-complex="RU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text:list-tab-stop-position="1.074cm" fo:text-indent="-0.635cm" fo:margin-left="1.074cm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text:list-tab-stop-position="1.513cm" fo:text-indent="-0.635cm" fo:margin-left="1.513cm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text:list-tab-stop-position="1.953cm" fo:text-indent="-0.635cm" fo:margin-left="1.953cm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text:list-tab-stop-position="2.392cm" fo:text-indent="-0.635cm" fo:margin-left="2.392cm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text:list-tab-stop-position="2.831cm" fo:text-indent="-0.635cm" fo:margin-left="2.831cm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94cm" fo:margin-bottom="0.093cm" fo:margin-left="2cm" fo:margin-right="1.274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8-01-30T12:40:00</meta:creation-date>
    <dc:date>2025-02-14T14:34:57.23</dc:date>
    <meta:print-date>2022-08-18T11:28:53.39</meta:print-date>
    <meta:editing-cycles>18</meta:editing-cycles>
    <meta:editing-duration>PT1H16M15S</meta:editing-duration>
    <meta:generator>OpenOffice/4.1.4$Win32 OpenOffice.org_project/414m5$Build-9788</meta:generator>
    <meta:document-statistic meta:table-count="0" meta:image-count="0" meta:object-count="0" meta:page-count="1" meta:paragraph-count="31" meta:word-count="162" meta:character-count="1160"/>
    <dc:creator>Татьяна Шершнева</dc:creator>
  </office:meta>
</office:document-meta>
</file>
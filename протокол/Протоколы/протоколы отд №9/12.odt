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charset="x-symbol"/>
    <style:font-face style:name="Mangal1" svg:font-family="Mangal"/>
    <style:font-face style:name="OpenSymbol1" svg:font-family="OpenSymbol"/>
    <style:font-face style:name="OpenSymbol" svg:font-family="OpenSymbol, 'Arial Unicode MS'"/>
    <style:font-face style:name="Lucida Sans Unicode1" svg:font-family="'Lucida Sans Unicode'" style:font-pitch="variable"/>
    <style:font-face style:name="Tahoma1" svg:font-family="Tahoma" style:font-pitch="variable"/>
    <style:font-face style:name="PT Astra Serif" svg:font-family="'PT Astra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PT Astra Serif" fo:font-size="14pt" fo:language="en" fo:country="US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PT Astra Serif" fo:font-size="14pt" fo:language="en" fo:country="US" fo:font-weight="bold" style:font-size-asian="14pt" style:font-weight-asian="bold" style:font-size-complex="14pt" style:font-weight-complex="bold"/>
    </style:style>
    <style:style style:name="P3" style:family="paragraph" style:parent-style-name="Standard">
      <style:text-properties style:font-name="PT Astra Serif" fo:font-size="14pt" fo:language="en" fo:country="US" style:font-size-asian="14pt" style:font-size-complex="14pt"/>
    </style:style>
    <style:style style:name="P4" style:family="paragraph" style:parent-style-name="Standard">
      <style:paragraph-properties fo:text-align="center" style:justify-single-word="false"/>
      <style:text-properties style:font-name="PT Astra Serif" fo:font-size="14pt" fo:language="en" fo:country="US" style:font-size-asian="14pt" style:font-size-complex="14pt"/>
    </style:style>
    <style:style style:name="P5" style:family="paragraph" style:parent-style-name="Standard">
      <style:paragraph-properties fo:text-align="start" style:justify-single-word="false"/>
      <style:text-properties style:font-name="PT Astra Serif" fo:font-size="14pt" fo:language="en" fo:country="US" style:font-size-asian="14pt" style:font-size-complex="14pt"/>
    </style:style>
    <style:style style:name="P6" style:family="paragraph" style:parent-style-name="Standard">
      <style:paragraph-properties fo:text-align="justify" style:justify-single-word="false"/>
      <style:text-properties style:font-name="PT Astra Serif" fo:font-size="14pt" fo:language="en" fo:country="US" style:font-size-asian="14pt" style:font-size-complex="14pt"/>
    </style:style>
    <style:style style:name="P7" style:family="paragraph" style:parent-style-name="Standard">
      <style:paragraph-properties fo:text-align="start" style:justify-single-word="false"/>
      <style:text-properties style:font-name="PT Astra Serif" fo:font-size="14pt" fo:language="en" fo:country="US" style:font-size-asian="14pt" style:font-name-complex="Times New Roman" style:font-size-complex="14pt"/>
    </style:style>
    <style:style style:name="P8" style:family="paragraph" style:parent-style-name="Standard">
      <style:paragraph-properties fo:text-align="justify" style:justify-single-word="false"/>
      <style:text-properties style:font-name="PT Astra Serif" fo:font-size="14pt" fo:language="en" fo:country="US" style:font-name-asian="Times New Roman" style:font-size-asian="14pt" style:font-name-complex="Times New Roman" style:font-size-complex="14pt" style:language-complex="ar" style:country-complex="SA"/>
    </style:style>
    <style:style style:name="P9" style:family="paragraph" style:parent-style-name="Standard" style:master-page-name="Standard">
      <style:paragraph-properties fo:text-align="center" style:justify-single-word="false" style:page-number="auto"/>
      <style:text-properties style:font-name="PT Astra Serif" fo:font-size="14pt" fo:language="en" fo:country="US" fo:font-weight="bold" style:font-size-asian="14pt" style:font-weight-asian="bold" style:font-size-complex="14pt" style:font-weight-complex="bold"/>
    </style:style>
    <style:style style:name="P10" style:family="paragraph" style:parent-style-name="Standard" style:list-style-name="L1">
      <style:paragraph-properties fo:text-align="start" style:justify-single-word="false"/>
      <style:text-properties style:font-name="PT Astra Serif" fo:font-size="14pt" fo:language="en" fo:country="US" style:font-size-asian="14pt" style:font-size-complex="14pt"/>
    </style:style>
    <style:style style:name="P11" style:family="paragraph" style:parent-style-name="Standard" style:list-style-name="L1">
      <style:paragraph-properties fo:text-align="start" style:justify-single-word="false">
        <style:tab-stops>
          <style:tab-stop style:position="0cm"/>
        </style:tab-stops>
      </style:paragraph-properties>
      <style:text-properties style:font-name="PT Astra Serif" fo:font-size="14pt" fo:language="en" fo:country="US" style:font-size-asian="14pt" style:font-size-complex="14pt"/>
    </style:style>
    <style:style style:name="P12" style:family="paragraph" style:parent-style-name="Standard" style:list-style-name="L3">
      <style:paragraph-properties fo:text-align="start" style:justify-single-word="false"/>
      <style:text-properties style:font-name="PT Astra Serif" fo:font-size="14pt" fo:language="en" fo:country="US" style:font-size-asian="14pt" style:font-size-complex="14pt"/>
    </style:style>
    <style:style style:name="P13" style:family="paragraph" style:parent-style-name="Standard" style:list-style-name="WW8Num1">
      <style:paragraph-properties fo:text-align="start" style:justify-single-word="false"/>
      <style:text-properties style:font-name="PT Astra Serif" fo:font-size="14pt" fo:language="en" fo:country="US" style:font-size-asian="14pt" style:font-size-complex="14pt"/>
    </style:style>
    <style:style style:name="P14" style:family="paragraph" style:parent-style-name="Standard" style:list-style-name="L2">
      <style:text-properties style:font-name="PT Astra Serif" fo:font-size="14pt" fo:language="en" fo:country="US" style:font-size-asian="14pt" style:font-size-complex="14pt"/>
    </style:style>
    <style:style style:name="P15" style:family="paragraph" style:parent-style-name="Standard" style:list-style-name="L1">
      <style:paragraph-properties fo:text-align="start" style:justify-single-word="false"/>
      <style:text-properties style:font-name="PT Astra Serif" fo:font-size="14pt" fo:language="en" fo:country="US" style:font-size-asian="14pt" style:font-name-complex="Times New Roman" style:font-size-complex="14pt"/>
    </style:style>
    <style:style style:name="P16" style:family="paragraph" style:parent-style-name="Standard" style:list-style-name="WW8Num1">
      <style:paragraph-properties fo:text-align="start" style:justify-single-word="false"/>
      <style:text-properties style:use-window-font-color="true" style:font-name="PT Astra Serif" fo:font-size="14pt" fo:language="en" fo:country="US" style:letter-kerning="true" style:font-name-asian="Lucida Sans Unicode1" style:font-size-asian="14pt" style:language-asian="zxx" style:country-asian="none" style:font-name-complex="Tahoma1" style:font-size-complex="14pt" style:language-complex="zxx" style:country-complex="none"/>
    </style:style>
    <style:style style:name="T1" style:family="text">
      <style:text-properties style:font-name-asian="Times New Roman" style:font-name-complex="Arial" style:language-complex="ar" style:country-complex="SA"/>
    </style:style>
    <style:style style:name="T2" style:family="text">
      <style:text-properties style:font-name-complex="Times New Roman"/>
    </style:style>
    <style:style style:name="T3" style:family="text">
      <style:text-properties fo:language="ru" fo:country="RU"/>
    </style:style>
    <style:style style:name="T4" style:family="text">
      <style:text-properties style:font-name-complex="Ari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2cm" fo:text-indent="-0.635cm" fo:margin-left="1.40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37cm" fo:text-indent="-0.635cm" fo:margin-left="2.03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72cm" fo:text-indent="-0.635cm" fo:margin-left="2.67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307cm" fo:text-indent="-0.635cm" fo:margin-left="3.30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42cm" fo:text-indent="-0.635cm" fo:margin-left="3.94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77cm" fo:text-indent="-0.635cm" fo:margin-left="4.57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212cm" fo:text-indent="-0.635cm" fo:margin-left="5.21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47cm" fo:text-indent="-0.635cm" fo:margin-left="5.84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82cm" fo:text-indent="-0.635cm" fo:margin-left="6.48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117cm" fo:text-indent="-0.635cm" fo:margin-left="7.117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2cm" fo:text-indent="-0.635cm" fo:margin-left="1.40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37cm" fo:text-indent="-0.635cm" fo:margin-left="2.03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72cm" fo:text-indent="-0.635cm" fo:margin-left="2.67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307cm" fo:text-indent="-0.635cm" fo:margin-left="3.30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42cm" fo:text-indent="-0.635cm" fo:margin-left="3.94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77cm" fo:text-indent="-0.635cm" fo:margin-left="4.57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212cm" fo:text-indent="-0.635cm" fo:margin-left="5.21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47cm" fo:text-indent="-0.635cm" fo:margin-left="5.84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82cm" fo:text-indent="-0.635cm" fo:margin-left="6.48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117cm" fo:text-indent="-0.635cm" fo:margin-left="7.117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Протокол № 12</text:p>
      <text:p text:style-name="P2">рабочего совещания отделения социального обслуживания на дому № 9 </text:p>
      <text:p text:style-name="P2">от <text:span text:style-name="T3">24</text:span>.12.202<text:span text:style-name="T3">5</text:span> г.</text:p>
      <text:p text:style-name="P2"/>
      <text:p text:style-name="P4"/>
      <text:p text:style-name="P7">Присутствовали:</text:p>
      <text:list xml:id="list5057135335924103230" text:style-name="L1">
        <text:list-item>
          <text:p text:style-name="P10">Барябина О.А.</text:p>
        </text:list-item>
        <text:list-item>
          <text:p text:style-name="P10">Евстратова Г.А.</text:p>
        </text:list-item>
        <text:list-item>
          <text:p text:style-name="P11">Бойкова К.Ю.</text:p>
        </text:list-item>
        <text:list-item>
          <text:p text:style-name="P10">Смарунь Т.В.</text:p>
        </text:list-item>
        <text:list-item>
          <text:p text:style-name="P10"><text:s/>Рудник Т.С. </text:p>
        </text:list-item>
        <text:list-item>
          <text:p text:style-name="P10"><text:s/>Делиу Г.С. <text:s text:c="2"/></text:p>
        </text:list-item>
        <text:list-item>
          <text:p text:style-name="P10">Кошелева С.А.</text:p>
        </text:list-item>
        <text:list-item>
          <text:p text:style-name="P10">Обыденнова С.А.</text:p>
        </text:list-item>
        <text:list-item>
          <text:p text:style-name="P10">Беспалова Л.И.</text:p>
        </text:list-item>
        <text:list-item>
          <text:p text:style-name="P10">Коньшина Т.С</text:p>
        </text:list-item>
        <text:list-item>
          <text:p text:style-name="P10">Чепенко Ю.С.</text:p>
        </text:list-item>
        <text:list-item>
          <text:p text:style-name="P10">Мнацаканянц И.В.</text:p>
        </text:list-item>
        <text:list-item>
          <text:p text:style-name="P10">Калинкина Л.М.</text:p>
        </text:list-item>
        <text:list-item>
          <text:p text:style-name="P10">Булычева И.А.</text:p>
        </text:list-item>
        <text:list-item>
          <text:p text:style-name="P15">Чипига Е.В.</text:p>
          <text:p text:style-name="P15"/>
        </text:list-item>
      </text:list>
      <text:p text:style-name="P2">Повестка дня:</text:p>
      <text:p text:style-name="P3"/>
      <text:p text:style-name="P3"><text:s text:c="6"/>1.Итоги работы отделения за 2 полугодие 202<text:span text:style-name="T3">5</text:span> года.</text:p>
      <text:list xml:id="list7886479444328967219" text:style-name="L2">
        <text:list-item>
          <text:p text:style-name="P14">Отчет социального работника <text:span text:style-name="T2">Чипига Е.В.</text:span></text:p>
        </text:list-item>
        <text:list-item>
          <text:p text:style-name="P14"><text:s/>Разное.</text:p>
        </text:list-item>
      </text:list>
      <text:p text:style-name="P3"><text:s/></text:p>
      <text:p text:style-name="P3">По первому вопросу <text:s/>заслушали зав. отд. Шершневу Т.И . </text:p>
      <text:p text:style-name="P6">Решение: работу отделения <text:s/>признать <text:s text:c="3"/>удовлетворительной.</text:p>
      <text:p text:style-name="P3">По второму вопросу заслушали <text:s/>социального работника <text:span text:style-name="T2">Чипига Е.В.</text:span>, она ознакомила <text:span text:style-name="T1">с анализом качества ведения актов приемки оказания социальных услуг.</text:span></text:p>
      <text:p text:style-name="P8"><text:span text:style-name="T4">Решение: признать работу соц. работника </text:span>Чипига Е.В.<text:span text:style-name="T4"> - удовлетворительной</text:span></text:p>
      <text:p text:style-name="P3">Разное:</text:p>
      <text:list xml:id="list4318183353573350612" text:style-name="L3">
        <text:list-item>
          <text:p text:style-name="P12">о правильном заполнении маршрутных листов,</text:p>
        </text:list-item>
      </text:list>
      <text:list xml:id="list7863294152119843501" text:style-name="WW8Num1">
        <text:list-item>
          <text:p text:style-name="P16">решении вопроса о переводе на самоконтроль</text:p>
        </text:list-item>
        <text:list-item>
          <text:p text:style-name="P13">о прохождении FL/соответствии c графиком/.</text:p>
        </text:list-item>
        <text:list-item>
          <text:p text:style-name="P13">Поздравление на дому юбиляров не находящихся на обслуживании центра от министерства социального развития.</text:p>
        </text:list-item>
      </text:list>
      <text:p text:style-name="P5"/>
      <text:p text:style-name="P3"/>
      <text:p text:style-name="P3"/>
      <text:p text:style-name="P1">Зав.отделением №9 <text:s text:c="36"/>Шершнева Т.И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charset="x-symbol"/>
    <style:font-face style:name="Mangal1" svg:font-family="Mangal"/>
    <style:font-face style:name="OpenSymbol1" svg:font-family="OpenSymbol"/>
    <style:font-face style:name="OpenSymbol" svg:font-family="OpenSymbol, 'Arial Unicode MS'"/>
    <style:font-face style:name="Lucida Sans Unicode1" svg:font-family="'Lucida Sans Unicode'" style:font-pitch="variable"/>
    <style:font-face style:name="Tahoma1" svg:font-family="Tahoma" style:font-pitch="variable"/>
    <style:font-face style:name="PT Astra Serif" svg:font-family="'PT Astra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ru" fo:country="RU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Arial" fo:font-size="12pt" fo:language="ru" fo:country="RU" style:font-name-asian="Lucida Sans Unicode" style:font-size-asian="12pt" style:language-asian="zh" style:country-asian="CN" style:font-name-complex="Tahoma" style:font-size-complex="12pt" style:language-complex="ru" style:country-complex="RU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Arial" style:font-name-complex="Tahoma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itle" style:family="paragraph" style:parent-style-name="Heading" style:next-style-name="Subtitle" style:class="chapter"/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Название1" style:family="paragraph" style:parent-style-name="Standard">
      <style:paragraph-properties fo:margin-top="0.212cm" fo:margin-bottom="0.212cm" text:number-lines="false" text:line-number="0"/>
      <style:text-properties style:font-name="Arial" fo:font-size="12pt" fo:font-style="italic" style:font-size-asian="12pt" style:font-style-asian="italic" style:font-name-complex="Tahoma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Tahoma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WW8Num1z0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Основной_20_шрифт_20_абзаца" style:display-name="Основной шрифт абзаца" style:family="text"/>
    <style:style style:name="Numbering_20_Symbols" style:display-name="Numbering Symbols" style:family="text"/>
    <style:style style:name="Текст_20_выноски_20_Знак" style:display-name="Текст выноски Знак" style:family="text" style:parent-style-name="Основной_20_шрифт_20_абзаца">
      <style:text-properties style:font-name="Tahoma" fo:font-size="8pt" style:font-name-asian="Lucida Sans Unicode" style:font-size-asian="8pt" style:font-name-complex="Tahoma" style:font-size-complex="8pt" style:language-complex="ru" style:country-complex="RU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bullet text:level="1" text:style-name="WW8Num1z0" style:num-suffix=".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z0" style:num-suffix=".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z0" style:num-suffix=".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z0" style:num-suffix=".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z0" style:num-suffix=".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z0" style:num-suffix=".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z0" style:num-suffix=".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z0" style:num-suffix=".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z0" style:num-suffix=".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#ffffff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8-01-30T12:40:00</meta:creation-date>
    <dc:date>2025-07-29T15:17:33.89</dc:date>
    <meta:print-date>2019-10-28T12:53:00</meta:print-date>
    <meta:editing-cycles>14</meta:editing-cycles>
    <meta:editing-duration>PT46M7S</meta:editing-duration>
    <meta:generator>OpenOffice/4.1.7$Win32 OpenOffice.org_project/417m1$Build-9800</meta:generator>
    <meta:document-statistic meta:table-count="0" meta:image-count="0" meta:object-count="0" meta:page-count="1" meta:paragraph-count="34" meta:word-count="159" meta:character-count="1108"/>
  </office:meta>
</office:document-meta>
</file>
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 style:list-style-name="L2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 style:list-style-name="L1">
      <style:paragraph-properties fo:text-align="start" style:justify-single-word="false"/>
    </style:style>
    <style:style style:name="P19" style:family="paragraph" style:parent-style-name="Standard" style:list-style-name="WW8Num1">
      <style:paragraph-properties fo:margin-left="1.953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language="en" fo:country="US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style:font-name-asian="Times New Roman" style:font-name-complex="Times New Roman" style:language-complex="ar" style:country-complex="SA"/>
    </style:style>
    <style:style style:name="T5" style:family="text">
      <style:text-properties style:font-name="Times New Roman" fo:font-weight="normal" style:font-weight-asian="normal" style:font-name-complex="Times New Roman" style:font-weight-complex="normal"/>
    </style:style>
    <style:style style:name="T6" style:family="text">
      <style:text-properties style:font-name="Times New Roman" fo:font-weight="bold" style:font-weight-asian="bold" style:font-name-complex="Times New Roman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9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Протокол № 3</text:p>
      <text:p text:style-name="P1"><text:span text:style-name="T1">рабочего совещания отделения социального обслуживания на дому № 9 от</text:span><text:span text:style-name="T8"> 26.03.2025</text:span></text:p>
      <text:p text:style-name="P2"/>
      <text:p text:style-name="P5"/>
      <text:p text:style-name="P5">Присутствовали:</text:p>
      <text:list xml:id="list2329185665388383425" text:style-name="L1">
        <text:list-item>
          <text:p text:style-name="P14">Барябина О.А.</text:p>
        </text:list-item>
        <text:list-item>
          <text:p text:style-name="P14">Евстратова Г.А.</text:p>
        </text:list-item>
        <text:list-item>
          <text:p text:style-name="P15">Бойкова К.Ю.</text:p>
        </text:list-item>
        <text:list-item>
          <text:p text:style-name="P14">Смарунь Т.В.</text:p>
        </text:list-item>
        <text:list-item>
          <text:p text:style-name="P18"><text:s/><text:span text:style-name="T7">Рудник Т.С. </text:span></text:p>
        </text:list-item>
        <text:list-item>
          <text:p text:style-name="P14"><text:s/>Делиу Г.С. <text:s text:c="2"/></text:p>
        </text:list-item>
        <text:list-item>
          <text:p text:style-name="P14">Кошелева С.А.</text:p>
        </text:list-item>
        <text:list-item>
          <text:p text:style-name="P14">Обыденнова С.А.</text:p>
        </text:list-item>
        <text:list-item>
          <text:p text:style-name="P14">Беспалова Л.И.</text:p>
        </text:list-item>
        <text:list-item>
          <text:p text:style-name="P14">Коньшина Т.С</text:p>
        </text:list-item>
        <text:list-item>
          <text:p text:style-name="P14">Чепенко Ю.С.</text:p>
        </text:list-item>
        <text:list-item>
          <text:p text:style-name="P14">Мнацаканянц И.В.</text:p>
        </text:list-item>
        <text:list-item>
          <text:p text:style-name="P14">Калинкина Л.М.</text:p>
        </text:list-item>
        <text:list-item>
          <text:p text:style-name="P16">Чипига Е.В.</text:p>
          <text:p text:style-name="P16"/>
        </text:list-item>
      </text:list>
      <text:p text:style-name="P6">Повестка дня:</text:p>
      <text:p text:style-name="P4"/>
      <text:p text:style-name="P10"><text:span text:style-name="T2"><text:s text:c="3"/>1. </text:span><text:span text:style-name="T3">Проведение <text:s/>работы по набору численности, <text:s/>при подворном обходе на участке потенциальных клиентов оставлять визитку с координатами Центра.</text:span></text:p>
      <text:list xml:id="list2253587280282437450" text:style-name="L2">
        <text:list-item>
          <text:p text:style-name="P17">Отчет социального работника Барябиной О.А.</text:p>
        </text:list-item>
      </text:list>
      <text:p text:style-name="P7"><text:s text:c="5"/>3. Разное.</text:p>
      <text:p text:style-name="P4"><text:s/></text:p>
      <text:p text:style-name="P4">По первому вопросу <text:s/>заслушали зав. отд. Шершневу Т.И . она отчиталась о проведении <text:s/>работы <text:s/>по набору численности,при подворном обходе на участке потенциальных потребителей социальных услуг и оставили визитку с координатами филиала.</text:p>
      <text:p text:style-name="P8">Решение: признать работу <text:s/>по набору численности - удовлетворительной</text:p>
      <text:p text:style-name="P3"><text:span text:style-name="T3">По второму вопросу заслушали <text:s/></text:span><text:span text:style-name="T4">соц. работника Барябину О.А.</text:span></text:p>
      <text:p text:style-name="P9">Решение: признать работу соц. работника Барябин<text:span text:style-name="T9">ой</text:span> О.А. - удовлетворительной</text:p>
      <text:p text:style-name="P4">Разное:</text:p>
      <text:p text:style-name="P11"><text:span text:style-name="T5">-</text:span><text:span text:style-name="T3"> работа с актами сдачи-приёмки оказанных потребителям услуг, соц. работниками; </text:span></text:p>
      <text:p text:style-name="P12"><text:span text:style-name="T5">- </text:span><text:span text:style-name="T3">прохождение флюорографического обследования в соответствии с графиком (один раз в год); </text:span></text:p>
      <text:p text:style-name="P12"><text:span text:style-name="T6">-</text:span><text:span text:style-name="T3"> <text:s text:c="3"/>Работа с маршрутными листами.</text:span></text:p>
      <text:list xml:id="list3319962962431553534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9">Работа с личными делами.</text:p>
                    </text:list-item>
                    <text:list-item>
                      <text:p text:style-name="P19">Поздравление на дому юбиляров не находящихся на обслуживании центра от министерства социального развития.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Зав.отделением №9 <text:s text:c="29"/>Т.И. <text:s/>Шершнев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1.046cm" fo:margin-left="2cm" fo:margin-right="1.406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7-29T15:10:26.60</dc:date>
    <meta:print-date>2023-03-02T08:39:12.91</meta:print-date>
    <meta:editing-cycles>16</meta:editing-cycles>
    <meta:editing-duration>P2DT22M37S</meta:editing-duration>
    <meta:generator>OpenOffice/4.1.7$Win32 OpenOffice.org_project/417m1$Build-9800</meta:generator>
    <meta:document-statistic meta:table-count="0" meta:image-count="0" meta:object-count="0" meta:page-count="1" meta:paragraph-count="33" meta:word-count="192" meta:character-count="1379"/>
  </office:meta>
</office:document-meta>
</file>
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Segoe UI" svg:font-family="'Segoe UI'" style:font-adornments="Обычный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 style:list-style-name="L1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2"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16" style:family="paragraph" style:parent-style-name="Standard" style:list-style-name="L1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fo:language="en" fo:country="US" style:font-size-asian="14pt" style:font-name-complex="Times New Roman" style:font-size-complex="14pt"/>
    </style:style>
    <style:style style:name="P17" style:family="paragraph" style:parent-style-name="Standard" style:list-style-name="L1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Times New Roman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name-asian="Times New Roman" style:font-name-complex="Times New Roman" style:language-complex="ar" style:country-complex="SA"/>
    </style:style>
    <style:style style:name="T6" style:family="text">
      <style:text-properties style:font-name-asian="Times New Roman" style:font-name-complex="Times New Roman" style:language-complex="ar" style:country-complex="SA"/>
    </style:style>
    <style:style style:name="T7" style:family="text">
      <style:text-properties fo:language="ru" fo:country="RU"/>
    </style:style>
    <style:style style:name="T8" style:family="text">
      <style:text-properties fo:language="ru" fo:country="RU" style:font-name-asian="Times New Roman" style:font-name-complex="Times New Roman" style:language-complex="ar" style:country-complex="SA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4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923818001038457" text:style-name="L1">
        <text:list-header>
          <text:p text:style-name="P4">Протокол № 5</text:p>
          <text:p text:style-name="P6"><text:span text:style-name="T1">рабочего совещания отделения социального обслуживания на дому № 5 от 28</text:span><text:span text:style-name="T4">.05</text:span><text:span text:style-name="T1">.2025</text:span></text:p>
        </text:list-header>
      </text:list>
      <text:p text:style-name="P1"/>
      <text:p text:style-name="P3">Присутствовали:</text:p>
      <text:list xml:id="list936485282832364116" text:style-name="L2">
        <text:list-item>
          <text:p text:style-name="P10">Клеина Е.В.</text:p>
        </text:list-item>
        <text:list-item>
          <text:p text:style-name="P10">Ерастова М.Ю.</text:p>
        </text:list-item>
        <text:list-item>
          <text:p text:style-name="P10">Чурикова О.Ю.</text:p>
        </text:list-item>
        <text:list-item>
          <text:p text:style-name="P10">Кузнецова Н.В.</text:p>
        </text:list-item>
        <text:list-item>
          <text:p text:style-name="P10">Преображенская И.В.</text:p>
        </text:list-item>
        <text:list-item>
          <text:p text:style-name="P10">Серебрякова Е.Е.</text:p>
        </text:list-item>
        <text:list-item>
          <text:p text:style-name="P10">Иванова Е.Г.</text:p>
        </text:list-item>
        <text:list-item>
          <text:p text:style-name="P10">Морозова М.А.</text:p>
        </text:list-item>
        <text:list-item>
          <text:p text:style-name="P10">Доронина Ю.Г.</text:p>
        </text:list-item>
        <text:list-item>
          <text:p text:style-name="P10">Хабарова В.В.</text:p>
        </text:list-item>
        <text:list-item>
          <text:p text:style-name="P10">Березуцкая О.С.</text:p>
        </text:list-item>
        <text:list-item>
          <text:p text:style-name="P11">Лапина К.И.</text:p>
        </text:list-item>
        <text:list-item>
          <text:p text:style-name="P11">Козлова Е.А.</text:p>
        </text:list-item>
      </text:list>
      <text:p text:style-name="P3">Отсутствующие: Былинкина О.В. отпуск</text:p>
      <text:list xml:id="list34648876" text:continue-list="list93923818001038457" text:style-name="L1">
        <text:list-header>
          <text:p text:style-name="P5">Повестка дня:</text:p>
        </text:list-header>
        <text:list-item>
          <text:p text:style-name="P16"><text:s/><text:span text:style-name="T7">Организация контроля,его основные формы и виды.</text:span></text:p>
        </text:list-item>
        <text:list-item>
          <text:p text:style-name="P16"><text:s/>Отчет социального работника Лапин<text:span text:style-name="T7">ой</text:span> К.И.</text:p>
        </text:list-item>
        <text:list-item>
          <text:p text:style-name="P17"><text:s/>Разное.</text:p>
          <text:p text:style-name="P12">По первому вопросу <text:s/>заслушали зав. отд. Мишакову И.Г.</text:p>
          <text:p text:style-name="P13">Решение: принять информацию к сведению.</text:p>
          <text:p text:style-name="P7"><text:span text:style-name="T2">По второму вопросу заслушали <text:s/></text:span><text:span text:style-name="T6">соц. работника </text:span><text:span text:style-name="T5">Лапин</text:span><text:span text:style-name="T8">у</text:span><text:span text:style-name="T5"> К.И.</text:span></text:p>
          <text:p text:style-name="P15">Решение: признать работу соц. работника <text:span text:style-name="T3">Лапин</text:span><text:span text:style-name="T7">ой</text:span><text:span text:style-name="T3"> К.И.</text:span> -удовлетворительной.</text:p>
          <text:p text:style-name="P12">Разное:</text:p>
        </text:list-item>
      </text:list>
      <text:list xml:id="list5068957716491309515" text:style-name="L3">
        <text:list-item>
          <text:list>
            <text:list-item>
              <text:p text:style-name="P8"><text:span text:style-name="T2">Работа с маршрутными листами.</text:span> </text:p>
            </text:list-item>
            <text:list-item>
              <text:p text:style-name="P14">работа с актами сдачи-приёмки оказанных потребителям услуг, соц. работниками; </text:p>
            </text:list-item>
            <text:list-item>
              <text:p text:style-name="P14">прохождение флюорографического обследования в соответствии с графиком (один раз в год); </text:p>
            </text:list-item>
            <text:list-item>
              <text:p text:style-name="P8"><text:s/><text:span text:style-name="T2">Работа с маршрутными листами.</text:span></text:p>
            </text:list-item>
            <text:list-item>
              <text:p text:style-name="P14"><text:s/>Работа с личными делами.</text:p>
            </text:list-item>
            <text:list-item>
              <text:p text:style-name="P14"><text:s/>Поздравление на дому юбиляров не находящихся на обслуживании центра от министерства социального развития.</text:p>
            </text:list-item>
          </text:list>
        </text:list-item>
      </text:list>
      <text:p text:style-name="P2"/>
      <text:list xml:id="list34657577" text:continue-list="list34648876" text:style-name="L1">
        <text:list-item>
          <text:list>
            <text:list-header>
              <text:p text:style-name="P13"/>
              <text:p text:style-name="P13"/>
              <text:p text:style-name="P13"/>
            </text:list-header>
          </text:list>
          <text:p text:style-name="P12"/>
          <text:p text:style-name="P9"><text:span text:style-name="T2">Зав.отделением №5 <text:s text:c="32"/>И.Г. Мишакова</text:span> <text:s text:c="1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Segoe UI" svg:font-family="'Segoe UI'" style:font-adornments="Обычный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0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fo:font-family="Symbol" style:font-charset="x-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fo:font-family="Symbol" style:font-charset="x-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fo:font-family="Symbol" style:font-charset="x-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fo:font-family="Symbol" style:font-charset="x-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fo:font-family="Symbol" style:font-charset="x-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fo:font-family="Symbol" style:font-charset="x-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fo:font-family="Symbol" style:font-charset="x-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23cm" fo:margin-bottom="0.462cm" fo:margin-left="1.111cm" fo:margin-right="1.29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8-01-30T11:40:35</meta:creation-date>
    <dc:date>2025-02-14T14:39:09.32</dc:date>
    <meta:print-date>2023-02-28T16:55:59.71</meta:print-date>
    <dc:language>ru-RU</dc:language>
    <meta:editing-cycles>100</meta:editing-cycles>
    <meta:editing-duration>PT23H56M41S</meta:editing-duration>
    <meta:document-statistic meta:table-count="0" meta:image-count="0" meta:object-count="0" meta:page-count="1" meta:paragraph-count="33" meta:word-count="160" meta:character-count="1133"/>
    <meta:user-defined meta:name="Info 1"/>
    <meta:user-defined meta:name="Info 2"/>
    <meta:user-defined meta:name="Info 3"/>
    <meta:user-defined meta:name="Info 4"/>
  </office:meta>
</office:document-meta>
</file>